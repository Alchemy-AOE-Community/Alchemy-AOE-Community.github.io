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0.8827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1.4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31">
      <style:table-cell-properties fo:border="0.74pt solid #000000"/>
    </style:style>
    <style:style style:name="ce8" style:family="table-cell" style:parent-style-name="Default" style:data-style-name="N131">
      <style:table-cell-properties fo:background-color="#eeeeee" fo:border="0.74pt solid #000000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#eeeeee" fo:border="0.74pt solid #000000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Wil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nzanito</text:p>
          </table:table-cell>
          <table:table-cell table:style-name="ce4" office:value-type="string" calcext:value-type="string">
            <text:p>Jasuni 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kiritastrich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ubin2000</text:p>
          </table:table-cell>
          <table:table-cell table:style-name="ce4" office:value-type="string" calcext:value-type="string">
            <text:p>__oladushek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Jskil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Benderandchill 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string" calcext:value-type="string">
            <text:p>xRav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LoreDek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Pl0tterGhos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string" calcext:value-type="string">
            <text:p>aje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Ezioauditore010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string" calcext:value-type="string">
            <text:p>Manzan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orteraiger</text:p>
          </table:table-cell>
          <table:table-cell table:style-name="ce4" office:value-type="string" calcext:value-type="string">
            <text:p>jasouki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string" calcext:value-type="string">
            <text:p>Jasuni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aubin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iritastrich </text:p>
          </table:table-cell>
          <table:table-cell table:style-name="ce4" office:value-type="string" calcext:value-type="string">
            <text:p>RAY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Qeet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Jskillz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Benderandchill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The Otter On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gWarrior</text:p>
          </table:table-cell>
          <table:table-cell table:style-name="ce4" office:value-type="string" calcext:value-type="string">
            <text:p>Flying Mous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Ezioauditore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Banana Philosophe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string" calcext:value-type="string">
            <text:p>Fortera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ushWerewolf </text:p>
          </table:table-cell>
          <table:table-cell table:style-name="ce4" office:value-type="string" calcext:value-type="string">
            <text:p>Manzanit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Jasuni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R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ubin2000</text:p>
          </table:table-cell>
          <table:table-cell table:style-name="ce4" office:value-type="string" calcext:value-type="string">
            <text:p>Hydu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string" calcext:value-type="string">
            <text:p>Qeet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maxymczech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string" calcext:value-type="string">
            <text:p>JagWarr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 </text:p>
          </table:table-cell>
          <table:table-cell table:style-name="ce4" office:value-type="string" calcext:value-type="string">
            <text:p>The Otter On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4" office:value-type="string" calcext:value-type="string">
            <text:p>Flying Mous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Banana Philosop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Forteraige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string" calcext:value-type="string">
            <text:p>PlushWerewolf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zioauditore0109</text:p>
          </table:table-cell>
          <table:table-cell table:style-name="ce4" office:value-type="string" calcext:value-type="string">
            <text:p>Manzanit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ubin2000</text:p>
          </table:table-cell>
          <table:table-cell table:style-name="ce4" office:value-type="string" calcext:value-type="string">
            <text:p>RAY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Qeetsa</text:p>
          </table:table-cell>
          <table:table-cell table:style-name="ce4" office:value-type="string" calcext:value-type="string">
            <text:p>Benderandchill 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xRav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skillz</text:p>
          </table:table-cell>
          <table:table-cell table:style-name="ce4" office:value-type="string" calcext:value-type="string">
            <text:p>LoreDek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he Otter One</text:p>
          </table:table-cell>
          <table:table-cell table:style-name="ce5" office:value-type="string" calcext:value-type="string">
            <text:p>NOPE158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4" office:value-type="string" calcext:value-type="string">
            <text:p>ajeoma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Ezioauditore010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4" office:value-type="string" calcext:value-type="string">
            <text:p>jasouki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5" office:value-type="string" calcext:value-type="string">
            <text:p>Jasuni </text:p>
          </table:table-cell>
          <table:table-cell table:style-name="ce5" office:value-type="float" office:value="5" calcext:value-type="float">
            <text:p>5</text:p>
          </table:table-cell>
        </table:table-row>
      </table:table>
      <table:table table:name="Seeding_Summary" table:style-name="ta1"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9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6" office:value-type="string" calcext:value-type="string" table:number-columns-spanned="1" table:number-rows-spanned="2">
            <text:p>Name</text:p>
          </table:table-cell>
          <table:table-cell table:style-name="ce6" office:value-type="string" calcext:value-type="string" table:number-columns-spanned="2" table:number-rows-spanned="1">
            <text:p>Game Rate</text:p>
          </table:table-cell>
          <table:covered-table-cell table:style-name="ce6"/>
          <table:table-cell table:style-name="ce6" office:value-type="string" calcext:value-type="string">
            <text:p>Behavior Factor</text:p>
          </table:table-cell>
          <table:table-cell table:style-name="ce6" office:value-type="string" calcext:value-type="string">
            <text:p>Tournament Elo</text:p>
          </table:table-cell>
          <table:table-cell table:style-name="ce6" office:value-type="string" calcext:value-type="string">
            <text:p>Ranked Elo</text:p>
          </table:table-cell>
          <table:table-cell table:style-name="ce6" office:value-type="string" calcext:value-type="string">
            <text:p>Final Elo</text:p>
          </table:table-cell>
        </table:table-row>
        <table:table-row table:style-name="ro1">
          <table:covered-table-cell table:style-name="ce6"/>
          <table:table-cell table:style-name="ce6" office:value-type="string" calcext:value-type="string">
            <text:p>League</text:p>
          </table:table-cell>
          <table:table-cell table:style-name="ce6" office:value-type="string" calcext:value-type="string">
            <text:p>Ranked</text:p>
          </table:table-cell>
          <table:table-cell table:style-name="ce6" office:value-type="string" calcext:value-type="string">
            <text:p>Tournament Fraction</text:p>
          </table:table-cell>
          <table:table-cell table:style-name="ce6" office:value-type="string" calcext:value-type="string">
            <text:p>Historical</text:p>
          </table:table-cell>
          <table:table-cell table:style-name="ce6" office:value-type="string" calcext:value-type="string">
            <text:p>Point 3/4</text:p>
          </table:table-cell>
          <table:table-cell table:style-name="ce6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7.6" calcext:value-type="float">
            <text:p>7.6</text:p>
          </table:table-cell>
          <table:table-cell office:value-type="float" office:value="216.357142857143" calcext:value-type="float">
            <text:p>216.4</text:p>
          </table:table-cell>
          <table:table-cell office:value-type="percentage" office:value="0.0000864512265987272" calcext:value-type="percentage">
            <text:p>0.01%</text:p>
          </table:table-cell>
          <table:table-cell office:value-type="float" office:value="2151.70690084401" calcext:value-type="float">
            <text:p>2151.7</text:p>
          </table:table-cell>
          <table:table-cell office:value-type="float" office:value="2251.43881198275" calcext:value-type="float">
            <text:p>2251.4</text:p>
          </table:table-cell>
          <table:table-cell office:value-type="float" office:value="2251.4301900367" calcext:value-type="float">
            <text:p>2251.4</text:p>
          </table:table-cell>
        </table:table-row>
        <table:table-row table:style-name="ro1">
          <table:table-cell table:style-name="ce4" office:value-type="string" calcext:value-type="string">
            <text:p>aubin2000</text:p>
          </table:table-cell>
          <table:table-cell table:style-name="ce8" office:value-type="float" office:value="8" calcext:value-type="float">
            <text:p>8.0</text:p>
          </table:table-cell>
          <table:table-cell table:style-name="ce8" office:value-type="float" office:value="96.6666666666667" calcext:value-type="float">
            <text:p>96.7</text:p>
          </table:table-cell>
          <table:table-cell table:style-name="ce10" office:value-type="percentage" office:value="0.00548398706420972" calcext:value-type="percentage">
            <text:p>0.55%</text:p>
          </table:table-cell>
          <table:table-cell table:style-name="ce8" office:value-type="float" office:value="2112.71089598447" calcext:value-type="float">
            <text:p>2112.7</text:p>
          </table:table-cell>
          <table:table-cell table:style-name="ce8" office:value-type="float" office:value="2128.88721020983" calcext:value-type="float">
            <text:p>2128.9</text:p>
          </table:table-cell>
          <table:table-cell table:style-name="ce8" office:value-type="float" office:value="2128.79849951187" calcext:value-type="float">
            <text:p>2128.8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6.66666666666667" calcext:value-type="float">
            <text:p>6.7</text:p>
          </table:table-cell>
          <table:table-cell office:value-type="float" office:value="297.428571428571" calcext:value-type="float">
            <text:p>297.4</text:p>
          </table:table-cell>
          <table:table-cell office:value-type="percentage" office:value="0.00000564148818849031" calcext:value-type="percentage">
            <text:p>0.00%</text:p>
          </table:table-cell>
          <table:table-cell office:value-type="float" office:value="1939.74809200913" calcext:value-type="float">
            <text:p>1939.7</text:p>
          </table:table-cell>
          <table:table-cell office:value-type="float" office:value="2090.97615757028" calcext:value-type="float">
            <text:p>2091.0</text:p>
          </table:table-cell>
          <table:table-cell office:value-type="float" office:value="2090.97530441893" calcext:value-type="float">
            <text:p>2091.0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8" office:value-type="float" office:value="8.11111111111111" calcext:value-type="float">
            <text:p>8.1</text:p>
          </table:table-cell>
          <table:table-cell table:style-name="ce8" office:value-type="float" office:value="14.1428571428571" calcext:value-type="float">
            <text:p>14.1</text:p>
          </table:table-cell>
          <table:table-cell table:style-name="ce10" office:value-type="percentage" office:value="0.576908530905278" calcext:value-type="percentage">
            <text:p>57.69%</text:p>
          </table:table-cell>
          <table:table-cell table:style-name="ce8" office:value-type="float" office:value="2094.59468697848" calcext:value-type="float">
            <text:p>2094.6</text:p>
          </table:table-cell>
          <table:table-cell table:style-name="ce8" office:value-type="float" office:value="2063.92799769745" calcext:value-type="float">
            <text:p>2063.9</text:p>
          </table:table-cell>
          <table:table-cell table:style-name="ce8" office:value-type="float" office:value="2081.6198723583" calcext:value-type="float">
            <text:p>2081.6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6" calcext:value-type="float">
            <text:p>6.0</text:p>
          </table:table-cell>
          <table:table-cell office:value-type="float" office:value="91.6666666666667" calcext:value-type="float">
            <text:p>91.7</text:p>
          </table:table-cell>
          <table:table-cell office:value-type="percentage" office:value="-1" calcext:value-type="percentage">
            <text:p>-100.00%</text:p>
          </table:table-cell>
          <table:table-cell office:value-type="float" office:value="1985.48089774814" calcext:value-type="float">
            <text:p>1985.5</text:p>
          </table:table-cell>
          <table:table-cell office:value-type="float" office:value="1658.57844546519" calcext:value-type="float">
            <text:p>1658.6</text:p>
          </table:table-cell>
          <table:table-cell office:value-type="float" office:value="1985.48089774814" calcext:value-type="float">
            <text:p>1985.5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8" office:value-type="float" office:value="7.95" calcext:value-type="float">
            <text:p>8.0</text:p>
          </table:table-cell>
          <table:table-cell table:style-name="ce8" office:value-type="float" office:value="11.7857142857143" calcext:value-type="float">
            <text:p>11.8</text:p>
          </table:table-cell>
          <table:table-cell table:style-name="ce10" office:value-type="percentage" office:value="0.664019917860714" calcext:value-type="percentage">
            <text:p>66.40%</text:p>
          </table:table-cell>
          <table:table-cell table:style-name="ce8" office:value-type="float" office:value="1851.35139916918" calcext:value-type="float">
            <text:p>1851.4</text:p>
          </table:table-cell>
          <table:table-cell table:style-name="ce8" office:value-type="float" office:value="1788.83732122372" calcext:value-type="float">
            <text:p>1788.8</text:p>
          </table:table-cell>
          <table:table-cell table:style-name="ce8" office:value-type="float" office:value="1830.34791412621" calcext:value-type="float">
            <text:p>1830.3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6.2" calcext:value-type="float">
            <text:p>6.2</text:p>
          </table:table-cell>
          <table:table-cell office:value-type="float" office:value="28.1818181818182" calcext:value-type="float">
            <text:p>28.2</text:p>
          </table:table-cell>
          <table:table-cell office:value-type="percentage" office:value="0.122812444174185" calcext:value-type="percentage">
            <text:p>12.28%</text:p>
          </table:table-cell>
          <table:table-cell office:value-type="float" office:value="1746.94683921768" calcext:value-type="float">
            <text:p>1746.9</text:p>
          </table:table-cell>
          <table:table-cell office:value-type="float" office:value="1803.29134873737" calcext:value-type="float">
            <text:p>1803.3</text:p>
          </table:table-cell>
          <table:table-cell office:value-type="float" office:value="1796.37154180746" calcext:value-type="float">
            <text:p>1796.4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8" office:value-type="float" office:value="6.53846153846154" calcext:value-type="float">
            <text:p>6.5</text:p>
          </table:table-cell>
          <table:table-cell table:style-name="ce8" office:value-type="float" office:value="205.071428571429" calcext:value-type="float">
            <text:p>205.1</text:p>
          </table:table-cell>
          <table:table-cell table:style-name="ce10" office:value-type="percentage" office:value="0.00004958045085246" calcext:value-type="percentage">
            <text:p>0.00%</text:p>
          </table:table-cell>
          <table:table-cell table:style-name="ce8" office:value-type="float" office:value="1828.96822815269" calcext:value-type="float">
            <text:p>1829.0</text:p>
          </table:table-cell>
          <table:table-cell table:style-name="ce8" office:value-type="float" office:value="1792.34017788087" calcext:value-type="float">
            <text:p>1792.3</text:p>
          </table:table-cell>
          <table:table-cell table:style-name="ce8" office:value-type="float" office:value="1792.34199391612" calcext:value-type="float">
            <text:p>1792.3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6.71428571428571" calcext:value-type="float">
            <text:p>6.7</text:p>
          </table:table-cell>
          <table:table-cell office:value-type="float" office:value="28.375" calcext:value-type="float">
            <text:p>28.4</text:p>
          </table:table-cell>
          <table:table-cell office:value-type="percentage" office:value="0.145026151867532" calcext:value-type="percentage">
            <text:p>14.50%</text:p>
          </table:table-cell>
          <table:table-cell office:value-type="float" office:value="1779.27654331028" calcext:value-type="float">
            <text:p>1779.3</text:p>
          </table:table-cell>
          <table:table-cell office:value-type="float" office:value="1786.24140663617" calcext:value-type="float">
            <text:p>1786.2</text:p>
          </table:table-cell>
          <table:table-cell office:value-type="float" office:value="1785.23131930974" calcext:value-type="float">
            <text:p>1785.2</text:p>
          </table:table-cell>
        </table:table-row>
        <table:table-row table:style-name="ro1">
          <table:table-cell table:style-name="ce4" office:value-type="string" calcext:value-type="string">
            <text:p>Benderandchill </text:p>
          </table:table-cell>
          <table:table-cell table:style-name="ce8" office:value-type="float" office:value="8.11111111111111" calcext:value-type="float">
            <text:p>8.1</text:p>
          </table:table-cell>
          <table:table-cell table:style-name="ce8" office:value-type="float" office:value="417.9" calcext:value-type="float">
            <text:p>417.9</text:p>
          </table:table-cell>
          <table:table-cell table:style-name="ce10" office:value-type="percentage" office:value="0.00000216808742536934" calcext:value-type="percentage">
            <text:p>0.00%</text:p>
          </table:table-cell>
          <table:table-cell table:style-name="ce8" office:value-type="float" office:value="1807.12119532439" calcext:value-type="float">
            <text:p>1807.1</text:p>
          </table:table-cell>
          <table:table-cell table:style-name="ce8" office:value-type="float" office:value="1751.60121014306" calcext:value-type="float">
            <text:p>1751.6</text:p>
          </table:table-cell>
          <table:table-cell table:style-name="ce8" office:value-type="float" office:value="1751.60133051524" calcext:value-type="float">
            <text:p>1751.6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6.75" calcext:value-type="float">
            <text:p>6.8</text:p>
          </table:table-cell>
          <table:table-cell office:value-type="float" office:value="99.2307692307692" calcext:value-type="float">
            <text:p>99.2</text:p>
          </table:table-cell>
          <table:table-cell office:value-type="percentage" office:value="0.00239360224890406" calcext:value-type="percentage">
            <text:p>0.24%</text:p>
          </table:table-cell>
          <table:table-cell office:value-type="float" office:value="1735.34141847371" calcext:value-type="float">
            <text:p>1735.3</text:p>
          </table:table-cell>
          <table:table-cell office:value-type="float" office:value="1710.43574221721" calcext:value-type="float">
            <text:p>1710.4</text:p>
          </table:table-cell>
          <table:table-cell office:value-type="float" office:value="1710.4953564999" calcext:value-type="float">
            <text:p>1710.5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8" office:value-type="float" office:value="6.61538461538461" calcext:value-type="float">
            <text:p>6.6</text:p>
          </table:table-cell>
          <table:table-cell table:style-name="ce8" office:value-type="float" office:value="15.3571428571429" calcext:value-type="float">
            <text:p>15.4</text:p>
          </table:table-cell>
          <table:table-cell table:style-name="ce10" office:value-type="percentage" office:value="0.416534101370752" calcext:value-type="percentage">
            <text:p>41.65%</text:p>
          </table:table-cell>
          <table:table-cell table:style-name="ce8" office:value-type="float" office:value="1680.49344130524" calcext:value-type="float">
            <text:p>1680.5</text:p>
          </table:table-cell>
          <table:table-cell table:style-name="ce8" office:value-type="float" office:value="1708.62030718511" calcext:value-type="float">
            <text:p>1708.6</text:p>
          </table:table-cell>
          <table:table-cell table:style-name="ce8" office:value-type="float" office:value="1696.90450838146" calcext:value-type="float">
            <text:p>1696.9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7.2" calcext:value-type="float">
            <text:p>7.2</text:p>
          </table:table-cell>
          <table:table-cell office:value-type="float" office:value="37" calcext:value-type="float">
            <text:p>37.0</text:p>
          </table:table-cell>
          <table:table-cell office:value-type="percentage" office:value="0.0910071233240994" calcext:value-type="percentage">
            <text:p>9.10%</text:p>
          </table:table-cell>
          <table:table-cell office:value-type="float" office:value="1595.13521745726" calcext:value-type="float">
            <text:p>1595.1</text:p>
          </table:table-cell>
          <table:table-cell office:value-type="float" office:value="1683.85624121206" calcext:value-type="float">
            <text:p>1683.9</text:p>
          </table:table-cell>
          <table:table-cell office:value-type="float" office:value="1675.78199606176" calcext:value-type="float">
            <text:p>1675.8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8" office:value-type="float" office:value="7.66666666666667" calcext:value-type="float">
            <text:p>7.7</text:p>
          </table:table-cell>
          <table:table-cell table:style-name="ce8" office:value-type="float" office:value="29.6842105263158" calcext:value-type="float">
            <text:p>29.7</text:p>
          </table:table-cell>
          <table:table-cell table:style-name="ce10" office:value-type="percentage" office:value="0.175097811632159" calcext:value-type="percentage">
            <text:p>17.51%</text:p>
          </table:table-cell>
          <table:table-cell table:style-name="ce8" office:value-type="float" office:value="1682.06434322305" calcext:value-type="float">
            <text:p>1682.1</text:p>
          </table:table-cell>
          <table:table-cell table:style-name="ce8" office:value-type="float" office:value="1666.57482356881" calcext:value-type="float">
            <text:p>1666.6</text:p>
          </table:table-cell>
          <table:table-cell table:style-name="ce8" office:value-type="float" office:value="1669.2870045635" calcext:value-type="float">
            <text:p>1669.3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7.5" calcext:value-type="float">
            <text:p>7.5</text:p>
          </table:table-cell>
          <table:table-cell office:value-type="float" office:value="10.625" calcext:value-type="float">
            <text:p>10.6</text:p>
          </table:table-cell>
          <table:table-cell office:value-type="percentage" office:value="0.687111064236282" calcext:value-type="percentage">
            <text:p>68.71%</text:p>
          </table:table-cell>
          <table:table-cell office:value-type="float" office:value="1661.20030373895" calcext:value-type="float">
            <text:p>1661.2</text:p>
          </table:table-cell>
          <table:table-cell office:value-type="float" office:value="1600.80519527469" calcext:value-type="float">
            <text:p>1600.8</text:p>
          </table:table-cell>
          <table:table-cell office:value-type="float" office:value="1642.30334252623" calcext:value-type="float">
            <text:p>1642.3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8" office:value-type="float" office:value="7.46666666666667" calcext:value-type="float">
            <text:p>7.5</text:p>
          </table:table-cell>
          <table:table-cell table:style-name="ce8" office:value-type="float" office:value="4.92857142857143" calcext:value-type="float">
            <text:p>4.9</text:p>
          </table:table-cell>
          <table:table-cell table:style-name="ce10" office:value-type="percentage" office:value="0.941526957501865" calcext:value-type="percentage">
            <text:p>94.15%</text:p>
          </table:table-cell>
          <table:table-cell table:style-name="ce8" office:value-type="float" office:value="1595.98254227202" calcext:value-type="float">
            <text:p>1596.0</text:p>
          </table:table-cell>
          <table:table-cell table:style-name="ce8" office:value-type="float" office:value="1587.52781971279" calcext:value-type="float">
            <text:p>1587.5</text:p>
          </table:table-cell>
          <table:table-cell table:style-name="ce8" office:value-type="float" office:value="1595.4881689205" calcext:value-type="float">
            <text:p>1595.5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7.66666666666667" calcext:value-type="float">
            <text:p>7.7</text:p>
          </table:table-cell>
          <table:table-cell office:value-type="float" office:value="6.68421052631579" calcext:value-type="float">
            <text:p>6.7</text:p>
          </table:table-cell>
          <table:table-cell office:value-type="percentage" office:value="0.879841466073572" calcext:value-type="percentage">
            <text:p>87.98%</text:p>
          </table:table-cell>
          <table:table-cell office:value-type="float" office:value="1580.10535893283" calcext:value-type="float">
            <text:p>1580.1</text:p>
          </table:table-cell>
          <table:table-cell office:value-type="float" office:value="1597.11070708119" calcext:value-type="float">
            <text:p>1597.1</text:p>
          </table:table-cell>
          <table:table-cell office:value-type="float" office:value="1582.14869663524" calcext:value-type="float">
            <text:p>1582.1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8" office:value-type="float" office:value="7.57142857142857" calcext:value-type="float">
            <text:p>7.6</text:p>
          </table:table-cell>
          <table:table-cell table:style-name="ce8" office:value-type="float" office:value="17.4" calcext:value-type="float">
            <text:p>17.4</text:p>
          </table:table-cell>
          <table:table-cell table:style-name="ce10" office:value-type="percentage" office:value="0.422112305833535" calcext:value-type="percentage">
            <text:p>42.21%</text:p>
          </table:table-cell>
          <table:table-cell table:style-name="ce8" office:value-type="float" office:value="1480.70570528917" calcext:value-type="float">
            <text:p>1480.7</text:p>
          </table:table-cell>
          <table:table-cell table:style-name="ce8" office:value-type="float" office:value="1542.98215986575" calcext:value-type="float">
            <text:p>1543.0</text:p>
          </table:table-cell>
          <table:table-cell table:style-name="ce8" office:value-type="float" office:value="1516.6945020253" calcext:value-type="float">
            <text:p>1516.7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6.4" calcext:value-type="float">
            <text:p>6.4</text:p>
          </table:table-cell>
          <table:table-cell office:value-type="float" office:value="26.6666666666667" calcext:value-type="float">
            <text:p>26.7</text:p>
          </table:table-cell>
          <table:table-cell office:value-type="percentage" office:value="0.149637550484769" calcext:value-type="percentage">
            <text:p>14.96%</text:p>
          </table:table-cell>
          <table:table-cell office:value-type="float" office:value="1412.48600803015" calcext:value-type="float">
            <text:p>1412.5</text:p>
          </table:table-cell>
          <table:table-cell office:value-type="float" office:value="1407.45412968739" calcext:value-type="float">
            <text:p>1407.5</text:p>
          </table:table-cell>
          <table:table-cell office:value-type="float" office:value="1408.20708763694" calcext:value-type="float">
            <text:p>1408.2</text:p>
          </table:table-cell>
        </table:table-row>
        <table:table-row table:style-name="ro1">
          <table:table-cell table:style-name="ce4" office:value-type="string" calcext:value-type="string">
            <text:p>Ezioauditore0109</text:p>
          </table:table-cell>
          <table:table-cell table:style-name="ce8" office:value-type="float" office:value="6.28571428571429" calcext:value-type="float">
            <text:p>6.3</text:p>
          </table:table-cell>
          <table:table-cell table:style-name="ce8" office:value-type="float" office:value="5" calcext:value-type="float">
            <text:p>5.0</text:p>
          </table:table-cell>
          <table:table-cell table:style-name="ce10" office:value-type="percentage" office:value="0.903864284139849" calcext:value-type="percentage">
            <text:p>90.39%</text:p>
          </table:table-cell>
          <table:table-cell table:style-name="ce8" office:value-type="float" office:value="1415.31328854148" calcext:value-type="float">
            <text:p>1415.3</text:p>
          </table:table-cell>
          <table:table-cell table:style-name="ce8" office:value-type="float" office:value="1301.45723620257" calcext:value-type="float">
            <text:p>1301.5</text:p>
          </table:table-cell>
          <table:table-cell table:style-name="ce8" office:value-type="float" office:value="1404.36765544487" calcext:value-type="float">
            <text:p>1404.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7.2" calcext:value-type="float">
            <text:p>7.2</text:p>
          </table:table-cell>
          <table:table-cell office:value-type="float" office:value="61.8333333333333" calcext:value-type="float">
            <text:p>61.8</text:p>
          </table:table-cell>
          <table:table-cell office:value-type="percentage" office:value="0.019660472943944" calcext:value-type="percentage">
            <text:p>1.97%</text:p>
          </table:table-cell>
          <table:table-cell office:value-type="float" office:value="1387.07388268255" calcext:value-type="float">
            <text:p>1387.1</text:p>
          </table:table-cell>
          <table:table-cell office:value-type="float" office:value="1389.11485439291" calcext:value-type="float">
            <text:p>1389.1</text:p>
          </table:table-cell>
          <table:table-cell office:value-type="float" office:value="1389.07472792382" calcext:value-type="float">
            <text:p>1389.1</text:p>
          </table:table-cell>
        </table:table-row>
        <table:table-row table:style-name="ro1">
          <table:table-cell table:style-name="ce4" office:value-type="string" calcext:value-type="string">
            <text:p>Forteraiger</text:p>
          </table:table-cell>
          <table:table-cell table:style-name="ce8" office:value-type="float" office:value="8.42857142857143" calcext:value-type="float">
            <text:p>8.4</text:p>
          </table:table-cell>
          <table:table-cell table:style-name="ce8" office:value-type="float" office:value="35" calcext:value-type="float">
            <text:p>35.0</text:p>
          </table:table-cell>
          <table:table-cell table:style-name="ce10" office:value-type="percentage" office:value="0.150758180441542" calcext:value-type="percentage">
            <text:p>15.08%</text:p>
          </table:table-cell>
          <table:table-cell table:style-name="ce8" office:value-type="float" office:value="1297.09014099955" calcext:value-type="float">
            <text:p>1297.1</text:p>
          </table:table-cell>
          <table:table-cell table:style-name="ce8" office:value-type="float" office:value="1361.12263473981" calcext:value-type="float">
            <text:p>1361.1</text:p>
          </table:table-cell>
          <table:table-cell table:style-name="ce8" office:value-type="float" office:value="1351.46921249439" calcext:value-type="float">
            <text:p>1351.5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7.36363636363636" calcext:value-type="float">
            <text:p>7.4</text:p>
          </table:table-cell>
          <table:table-cell office:value-type="float" office:value="27.8333333333333" calcext:value-type="float">
            <text:p>27.8</text:p>
          </table:table-cell>
          <table:table-cell office:value-type="percentage" office:value="0.184008509701868" calcext:value-type="percentage">
            <text:p>18.40%</text:p>
          </table:table-cell>
          <table:table-cell office:value-type="float" office:value="1325.95288213851" calcext:value-type="float">
            <text:p>1326.0</text:p>
          </table:table-cell>
          <table:table-cell office:value-type="float" office:value="1348.11451164305" calcext:value-type="float">
            <text:p>1348.1</text:p>
          </table:table-cell>
          <table:table-cell office:value-type="float" office:value="1344.03658322536" calcext:value-type="float">
            <text:p>1344.0</text:p>
          </table:table-cell>
        </table:table-row>
        <table:table-row table:style-name="ro1">
          <table:table-cell table:style-name="ce4" office:value-type="string" calcext:value-type="string">
            <text:p>Manzanito</text:p>
          </table:table-cell>
          <table:table-cell table:style-name="ce8" office:value-type="float" office:value="7" calcext:value-type="float">
            <text:p>7.0</text:p>
          </table:table-cell>
          <table:table-cell table:style-name="ce8" office:value-type="float" office:value="23" calcext:value-type="float">
            <text:p>23.0</text:p>
          </table:table-cell>
          <table:table-cell table:style-name="ce10" office:value-type="percentage" office:value="0.241318448090413" calcext:value-type="percentage">
            <text:p>24.13%</text:p>
          </table:table-cell>
          <table:table-cell table:style-name="ce8" office:value-type="float" office:value="1146.20214891946" calcext:value-type="float">
            <text:p>1146.2</text:p>
          </table:table-cell>
          <table:table-cell table:style-name="ce8" office:value-type="float" office:value="1226.19191531748" calcext:value-type="float">
            <text:p>1226.2</text:p>
          </table:table-cell>
          <table:table-cell table:style-name="ce8" office:value-type="float" office:value="1206.88890902719" calcext:value-type="float">
            <text:p>1206.9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8.25" calcext:value-type="float">
            <text:p>8.3</text:p>
          </table:table-cell>
          <table:table-cell office:value-type="float" office:value="23.8888888888889" calcext:value-type="float">
            <text:p>23.9</text:p>
          </table:table-cell>
          <table:table-cell office:value-type="percentage" office:value="0.300370897804456" calcext:value-type="percentage">
            <text:p>30.04%</text:p>
          </table:table-cell>
          <table:table-cell office:value-type="float" office:value="1232.14485199705" calcext:value-type="float">
            <text:p>1232.1</text:p>
          </table:table-cell>
          <table:table-cell office:value-type="float" office:value="1141.98700954909" calcext:value-type="float">
            <text:p>1142.0</text:p>
          </table:table-cell>
          <table:table-cell office:value-type="float" office:value="1169.06780162929" calcext:value-type="float">
            <text:p>1169.1</text:p>
          </table:table-cell>
        </table:table-row>
        <table:table-row table:style-name="ro1">
          <table:table-cell table:style-name="ce4" office:value-type="string" calcext:value-type="string">
            <text:p>Jasuni </text:p>
          </table:table-cell>
          <table:table-cell table:style-name="ce8" office:value-type="float" office:value="8.84615384615385" calcext:value-type="float">
            <text:p>8.8</text:p>
          </table:table-cell>
          <table:table-cell table:style-name="ce8" office:value-type="float" office:value="4.14285714285714" calcext:value-type="float">
            <text:p>4.1</text:p>
          </table:table-cell>
          <table:table-cell table:style-name="ce10" office:value-type="percentage" office:value="0.979967417563167" calcext:value-type="percentage">
            <text:p>98.00%</text:p>
          </table:table-cell>
          <table:table-cell table:style-name="ce8" office:value-type="float" office:value="1098.31480019889" calcext:value-type="float">
            <text:p>1098.3</text:p>
          </table:table-cell>
          <table:table-cell table:style-name="ce8" office:value-type="float" office:value="1056.01755119517" calcext:value-type="float">
            <text:p>1056.0</text:p>
          </table:table-cell>
          <table:table-cell table:style-name="ce8" office:value-type="float" office:value="1097.46747707137" calcext:value-type="float">
            <text:p>1097.5</text:p>
          </table:table-cell>
        </table:table-row>
      </table:table>
      <table:table table:name="Player_Summary" table:style-name="ta1">
        <table:table-column table:style-name="co10" table:default-cell-style-name="ce3"/>
        <table:table-column table:style-name="co3" table:number-columns-repeated="4" table:default-cell-style-name="ce3"/>
        <table:table-column table:style-name="co3" table:number-columns-repeated="2" table:default-cell-style-name="ce7"/>
        <table:table-row table:style-name="ro3">
          <table:table-cell table:style-name="ce11" office:value-type="string" calcext:value-type="string">
            <text:p>Discord Name</text:p>
          </table:table-cell>
          <table:table-cell table:style-name="ce11" office:value-type="string" calcext:value-type="string">
            <text:p>Visible Accounts</text:p>
          </table:table-cell>
          <table:table-cell table:style-name="ce11" office:value-type="string" calcext:value-type="string">
            <text:p>Smurf Accounts</text:p>
          </table:table-cell>
          <table:table-cell table:style-name="ce11" office:value-type="string" calcext:value-type="string">
            <text:p>Visible Games</text:p>
          </table:table-cell>
          <table:table-cell table:style-name="ce11" office:value-type="string" calcext:value-type="string">
            <text:p>Full Games</text:p>
          </table:table-cell>
          <table:table-cell table:style-name="ce11" office:value-type="string" calcext:value-type="string">
            <text:p>Elo Concealment</text:p>
          </table:table-cell>
          <table:table-cell table:style-name="ce11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5" calcext:value-type="float">
            <text:p>1635</text:p>
          </table:table-cell>
          <table:table-cell office:value-type="float" office:value="0" calcext:value-type="float">
            <text:p>0.0</text:p>
          </table:table-cell>
          <table:table-cell office:value-type="float" office:value="1389.11485439291" calcext:value-type="float">
            <text:p>1389.1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33" calcext:value-type="float">
            <text:p>93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063.92799769745" calcext:value-type="float">
            <text:p>2063.9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0" calcext:value-type="float">
            <text:p>0.0</text:p>
          </table:table-cell>
          <table:table-cell office:value-type="float" office:value="1141.98700954909" calcext:value-type="float">
            <text:p>1142.0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708.62030718511" calcext:value-type="float">
            <text:p>1708.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.0</text:p>
          </table:table-cell>
          <table:table-cell office:value-type="float" office:value="1542.98215986575" calcext:value-type="float">
            <text:p>1543.0</text:p>
          </table:table-cell>
        </table:table-row>
        <table:table-row table:style-name="ro1">
          <table:table-cell table:style-name="ce4" office:value-type="string" calcext:value-type="string">
            <text:p>Manzanit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13" calcext:value-type="float">
            <text:p>51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226.19191531748" calcext:value-type="float">
            <text:p>1226.2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" calcext:value-type="float">
            <text:p>0.0</text:p>
          </table:table-cell>
          <table:table-cell office:value-type="float" office:value="1361.12263473981" calcext:value-type="float">
            <text:p>1361.1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788.83732122372" calcext:value-type="float">
            <text:p>1788.8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0" calcext:value-type="float">
            <text:p>0.0</text:p>
          </table:table-cell>
          <table:table-cell office:value-type="float" office:value="1301.45723620257" calcext:value-type="float">
            <text:p>1301.5</text:p>
          </table:table-cell>
        </table:table-row>
        <table:table-row table:style-name="ro1">
          <table:table-cell table:style-name="ce4" office:value-type="string" calcext:value-type="string">
            <text:p>Benderandchi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891" calcext:value-type="float">
            <text:p>4891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751.60121014306" calcext:value-type="float">
            <text:p>1751.6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06" calcext:value-type="float">
            <text:p>6206</text:p>
          </table:table-cell>
          <table:table-cell office:value-type="float" office:value="0" calcext:value-type="float">
            <text:p>0.0</text:p>
          </table:table-cell>
          <table:table-cell office:value-type="float" office:value="2090.97615757028" calcext:value-type="float">
            <text:p>2091.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08" calcext:value-type="float">
            <text:p>308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587.52781971279" calcext:value-type="float">
            <text:p>1587.5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0" calcext:value-type="float">
            <text:p>0.0</text:p>
          </table:table-cell>
          <table:table-cell office:value-type="float" office:value="1597.11070708119" calcext:value-type="float">
            <text:p>1597.1</text:p>
          </table:table-cell>
        </table:table-row>
        <table:table-row table:style-name="ro1">
          <table:table-cell table:style-name="ce4" office:value-type="string" calcext:value-type="string">
            <text:p>aubin2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89" calcext:value-type="float">
            <text:p>1689</text:p>
          </table:table-cell>
          <table:table-cell table:style-name="ce4" office:value-type="float" office:value="1724" calcext:value-type="float">
            <text:p>1724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128.88721020983" calcext:value-type="float">
            <text:p>2128.9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0" calcext:value-type="float">
            <text:p>0.0</text:p>
          </table:table-cell>
          <table:table-cell office:value-type="float" office:value="1683.85624121206" calcext:value-type="float">
            <text:p>1683.9</text:p>
          </table:table-cell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154" calcext:value-type="float">
            <text:p>1154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600.80519527469" calcext:value-type="float">
            <text:p>1600.8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74" calcext:value-type="float">
            <text:p>4674</text:p>
          </table:table-cell>
          <table:table-cell office:value-type="float" office:value="0" calcext:value-type="float">
            <text:p>0.0</text:p>
          </table:table-cell>
          <table:table-cell office:value-type="float" office:value="1792.34017788087" calcext:value-type="float">
            <text:p>1792.3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423" calcext:value-type="float">
            <text:p>142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666.57482356881" calcext:value-type="float">
            <text:p>1666.6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0" calcext:value-type="float">
            <text:p>0.0</text:p>
          </table:table-cell>
          <table:table-cell office:value-type="float" office:value="1348.11451164305" calcext:value-type="float">
            <text:p>1348.1</text:p>
          </table:table-cell>
        </table:table-row>
        <table:table-row table:style-name="ro1">
          <table:table-cell table:style-name="ce4" office:value-type="string" calcext:value-type="string">
            <text:p>Jskillz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86" calcext:value-type="float">
            <text:p>48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786.24140663617" calcext:value-type="float">
            <text:p>1786.2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7" calcext:value-type="float">
            <text:p>2617</text:p>
          </table:table-cell>
          <table:table-cell office:value-type="float" office:value="0" calcext:value-type="float">
            <text:p>0.0</text:p>
          </table:table-cell>
          <table:table-cell office:value-type="float" office:value="1710.43574221721" calcext:value-type="float">
            <text:p>1710.4</text:p>
          </table:table-cell>
        </table:table-row>
        <table:table-row table:style-name="ro1">
          <table:table-cell table:style-name="ce4" office:value-type="string" calcext:value-type="string">
            <text:p>ajeom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997" calcext:value-type="float">
            <text:p>299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407.45412968739" calcext:value-type="float">
            <text:p>1407.5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0" calcext:value-type="float">
            <text:p>0.0</text:p>
          </table:table-cell>
          <table:table-cell office:value-type="float" office:value="1803.29134873737" calcext:value-type="float">
            <text:p>1803.3</text:p>
          </table:table-cell>
        </table:table-row>
        <table:table-row table:style-name="ro1">
          <table:table-cell table:style-name="ce4" office:value-type="string" calcext:value-type="string">
            <text:p>RAY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209" calcext:value-type="float">
            <text:p>1209</text:p>
          </table:table-cell>
          <table:table-cell table:style-name="ce8" office:value-type="float" office:value="-0.574351230208094" calcext:value-type="float">
            <text:p>-0.6</text:p>
          </table:table-cell>
          <table:table-cell table:style-name="ce8" office:value-type="float" office:value="1658.57844546519" calcext:value-type="float">
            <text:p>1658.6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.0</text:p>
          </table:table-cell>
          <table:table-cell office:value-type="float" office:value="1056.01755119517" calcext:value-type="float">
            <text:p>1056.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656" calcext:value-type="float">
            <text:p>765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251.43881198275" calcext:value-type="float">
            <text:p>2251.4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6.2" calcext:value-type="float">
            <text:p>-6.2</text:p>
          </table:table-cell>
          <table:table-cell office:value-type="float" office:value="6.2" calcext:value-type="float">
            <text:p>6.2</text:p>
          </table:table-cell>
          <table:table-cell office:value-type="float" office:value="1325.0499009901" calcext:value-type="float">
            <text:p>1325.0499009901</text:p>
          </table:table-cell>
          <table:table-cell office:value-type="float" office:value="1337.4499009901" calcext:value-type="float">
            <text:p>1337.4499009901</text:p>
          </table:table-cell>
          <table:table-cell office:value-type="float" office:value="0.508149753368502" calcext:value-type="float">
            <text:p>0.508149753368502</text:p>
          </table:table-cell>
          <table:table-cell office:value-type="float" office:value="0.508283034617584" calcext:value-type="float">
            <text:p>0.508283034617584</text:p>
          </table:table-cell>
          <table:table-cell office:value-type="float" office:value="0.152583002656059" calcext:value-type="float">
            <text:p>0.152583002656059</text:p>
          </table:table-cell>
          <table:table-cell office:value-type="float" office:value="0.152596948472374" calcext:value-type="float">
            <text:p>0.152596948472374</text:p>
          </table:table-cell>
          <table:table-cell office:value-type="float" office:value="-109.52456392459" calcext:value-type="float">
            <text:p>-109.52456392459</text:p>
          </table:table-cell>
          <table:table-cell office:value-type="float" office:value="109.52456392459" calcext:value-type="float">
            <text:p>109.52456392459</text:p>
          </table:table-cell>
          <table:table-cell office:value-type="float" office:value="1215.53602282756" calcext:value-type="float">
            <text:p>1215.53602282756</text:p>
          </table:table-cell>
          <table:table-cell office:value-type="float" office:value="1446.97446491469" calcext:value-type="float">
            <text:p>1446.97446491469</text:p>
          </table:table-cell>
          <table:table-cell office:value-type="float" office:value="1389.11485439291" calcext:value-type="float">
            <text:p>1389.1148543929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992.51267326733" calcext:value-type="float">
            <text:p>1992.51267326733</text:p>
          </table:table-cell>
          <table:table-cell office:value-type="float" office:value="2007.95267326733" calcext:value-type="float">
            <text:p>2007.95267326733</text:p>
          </table:table-cell>
          <table:table-cell office:value-type="float" office:value="0.522890370605287" calcext:value-type="float">
            <text:p>0.522890370605287</text:p>
          </table:table-cell>
          <table:table-cell office:value-type="float" office:value="0.523661440609388" calcext:value-type="float">
            <text:p>0.523661440609388</text:p>
          </table:table-cell>
          <table:table-cell office:value-type="float" office:value="0.165297711529597" calcext:value-type="float">
            <text:p>0.165297711529597</text:p>
          </table:table-cell>
          <table:table-cell office:value-type="float" office:value="0.1655776987265" calcext:value-type="float">
            <text:p>0.1655776987265</text:p>
          </table:table-cell>
          <table:table-cell office:value-type="float" office:value="-119.561412279212" calcext:value-type="float">
            <text:p>-119.561412279212</text:p>
          </table:table-cell>
          <table:table-cell office:value-type="float" office:value="119.561412279212" calcext:value-type="float">
            <text:p>119.561412279212</text:p>
          </table:table-cell>
          <table:table-cell office:value-type="float" office:value="1873.1697341502" calcext:value-type="float">
            <text:p>1873.1697341502</text:p>
          </table:table-cell>
          <table:table-cell office:value-type="float" office:value="2127.51408554654" calcext:value-type="float">
            <text:p>2127.51408554654</text:p>
          </table:table-cell>
          <table:table-cell office:value-type="float" office:value="2063.92799769745" calcext:value-type="float">
            <text:p>2063.92799769745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086.83306930693" calcext:value-type="float">
            <text:p>1086.83306930693</text:p>
          </table:table-cell>
          <table:table-cell office:value-type="float" office:value="1103.95306930693" calcext:value-type="float">
            <text:p>1103.95306930693</text:p>
          </table:table-cell>
          <table:table-cell office:value-type="float" office:value="0.504728643572945" calcext:value-type="float">
            <text:p>0.504728643572945</text:p>
          </table:table-cell>
          <table:table-cell office:value-type="float" office:value="0.50506003152998" calcext:value-type="float">
            <text:p>0.50506003152998</text:p>
          </table:table-cell>
          <table:table-cell office:value-type="float" office:value="0.119375723792418" calcext:value-type="float">
            <text:p>0.119375723792418</text:p>
          </table:table-cell>
          <table:table-cell office:value-type="float" office:value="0.119416256672017" calcext:value-type="float">
            <text:p>0.119416256672017</text:p>
          </table:table-cell>
          <table:table-cell office:value-type="float" office:value="-84.6129463512328" calcext:value-type="float">
            <text:p>-84.6129463512328</text:p>
          </table:table-cell>
          <table:table-cell office:value-type="float" office:value="84.6129463512328" calcext:value-type="float">
            <text:p>84.6129463512328</text:p>
          </table:table-cell>
          <table:table-cell office:value-type="float" office:value="1002.24999122185" calcext:value-type="float">
            <text:p>1002.24999122185</text:p>
          </table:table-cell>
          <table:table-cell office:value-type="float" office:value="1188.56601565816" calcext:value-type="float">
            <text:p>1188.56601565816</text:p>
          </table:table-cell>
          <table:table-cell office:value-type="float" office:value="1141.98700954909" calcext:value-type="float">
            <text:p>1141.98700954909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8" calcext:value-type="float">
            <text:p>-7.8</text:p>
          </table:table-cell>
          <table:table-cell office:value-type="float" office:value="7.8" calcext:value-type="float">
            <text:p>7.8</text:p>
          </table:table-cell>
          <table:table-cell office:value-type="float" office:value="1648.37267326733" calcext:value-type="float">
            <text:p>1648.37267326733</text:p>
          </table:table-cell>
          <table:table-cell office:value-type="float" office:value="1663.97267326733" calcext:value-type="float">
            <text:p>1663.97267326733</text:p>
          </table:table-cell>
          <table:table-cell office:value-type="float" office:value="0.512152952754689" calcext:value-type="float">
            <text:p>0.512152952754689</text:p>
          </table:table-cell>
          <table:table-cell office:value-type="float" office:value="0.512434337283959" calcext:value-type="float">
            <text:p>0.512434337283959</text:p>
          </table:table-cell>
          <table:table-cell office:value-type="float" office:value="0.136056023519508" calcext:value-type="float">
            <text:p>0.136056023519508</text:p>
          </table:table-cell>
          <table:table-cell office:value-type="float" office:value="0.136154568603098" calcext:value-type="float">
            <text:p>0.136154568603098</text:p>
          </table:table-cell>
          <table:table-cell office:value-type="float" office:value="-97.0582897413429" calcext:value-type="float">
            <text:p>-97.0582897413429</text:p>
          </table:table-cell>
          <table:table-cell office:value-type="float" office:value="97.0582897413429" calcext:value-type="float">
            <text:p>97.0582897413429</text:p>
          </table:table-cell>
          <table:table-cell office:value-type="float" office:value="1551.38833971444" calcext:value-type="float">
            <text:p>1551.38833971444</text:p>
          </table:table-cell>
          <table:table-cell office:value-type="float" office:value="1761.03096300867" calcext:value-type="float">
            <text:p>1761.03096300867</text:p>
          </table:table-cell>
          <table:table-cell office:value-type="float" office:value="1708.62030718511" calcext:value-type="float">
            <text:p>1708.62030718511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484.23722772277" calcext:value-type="float">
            <text:p>1484.23722772277</text:p>
          </table:table-cell>
          <table:table-cell office:value-type="float" office:value="1504.55722772277" calcext:value-type="float">
            <text:p>1504.55722772277</text:p>
          </table:table-cell>
          <table:table-cell office:value-type="float" office:value="0.509849166645718" calcext:value-type="float">
            <text:p>0.509849166645718</text:p>
          </table:table-cell>
          <table:table-cell office:value-type="float" office:value="0.510085630517877" calcext:value-type="float">
            <text:p>0.510085630517877</text:p>
          </table:table-cell>
          <table:table-cell office:value-type="float" office:value="0.122687150713582" calcext:value-type="float">
            <text:p>0.122687150713582</text:p>
          </table:table-cell>
          <table:table-cell office:value-type="float" office:value="0.122734375700951" calcext:value-type="float">
            <text:p>0.122734375700951</text:p>
          </table:table-cell>
          <table:table-cell office:value-type="float" office:value="-87.062242010138" calcext:value-type="float">
            <text:p>-87.062242010138</text:p>
          </table:table-cell>
          <table:table-cell office:value-type="float" office:value="87.062242010138" calcext:value-type="float">
            <text:p>87.062242010138</text:p>
          </table:table-cell>
          <table:table-cell office:value-type="float" office:value="1397.17498571263" calcext:value-type="float">
            <text:p>1397.17498571263</text:p>
          </table:table-cell>
          <table:table-cell office:value-type="float" office:value="1591.58455125013" calcext:value-type="float">
            <text:p>1591.58455125013</text:p>
          </table:table-cell>
          <table:table-cell office:value-type="float" office:value="1542.98215986575" calcext:value-type="float">
            <text:p>1542.98215986575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-7.68" calcext:value-type="float">
            <text:p>-7.68</text:p>
          </table:table-cell>
          <table:table-cell office:value-type="float" office:value="7.68" calcext:value-type="float">
            <text:p>7.68</text:p>
          </table:table-cell>
          <table:table-cell office:value-type="float" office:value="1155.57881188119" calcext:value-type="float">
            <text:p>1155.57881188119</text:p>
          </table:table-cell>
          <table:table-cell office:value-type="float" office:value="1170.93881188119" calcext:value-type="float">
            <text:p>1170.93881188119</text:p>
          </table:table-cell>
          <table:table-cell office:value-type="float" office:value="0.505958086366865" calcext:value-type="float">
            <text:p>0.505958086366865</text:p>
          </table:table-cell>
          <table:table-cell office:value-type="float" office:value="0.506198957800164" calcext:value-type="float">
            <text:p>0.506198957800164</text:p>
          </table:table-cell>
          <table:table-cell office:value-type="float" office:value="0.163727383050638" calcext:value-type="float">
            <text:p>0.163727383050638</text:p>
          </table:table-cell>
          <table:table-cell office:value-type="float" office:value="0.163784695030467" calcext:value-type="float">
            <text:p>0.163784695030467</text:p>
          </table:table-cell>
          <table:table-cell office:value-type="float" office:value="-118.163902154387" calcext:value-type="float">
            <text:p>-118.163902154387</text:p>
          </table:table-cell>
          <table:table-cell office:value-type="float" office:value="118.163902154387" calcext:value-type="float">
            <text:p>118.163902154387</text:p>
          </table:table-cell>
          <table:table-cell office:value-type="float" office:value="1037.45951916319" calcext:value-type="float">
            <text:p>1037.45951916319</text:p>
          </table:table-cell>
          <table:table-cell office:value-type="float" office:value="1289.10271403557" calcext:value-type="float">
            <text:p>1289.10271403557</text:p>
          </table:table-cell>
          <table:table-cell office:value-type="float" office:value="1226.19191531748" calcext:value-type="float">
            <text:p>1226.1919153174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291.81089108911" calcext:value-type="float">
            <text:p>1291.81089108911</text:p>
          </table:table-cell>
          <table:table-cell office:value-type="float" office:value="1306.21089108911" calcext:value-type="float">
            <text:p>1306.21089108911</text:p>
          </table:table-cell>
          <table:table-cell office:value-type="float" office:value="0.507781506515966" calcext:value-type="float">
            <text:p>0.507781506515966</text:p>
          </table:table-cell>
          <table:table-cell office:value-type="float" office:value="0.507943300543277" calcext:value-type="float">
            <text:p>0.507943300543277</text:p>
          </table:table-cell>
          <table:table-cell office:value-type="float" office:value="0.162331371864582" calcext:value-type="float">
            <text:p>0.162331371864582</text:p>
          </table:table-cell>
          <table:table-cell office:value-type="float" office:value="0.162358041209743" calcext:value-type="float">
            <text:p>0.162358041209743</text:p>
          </table:table-cell>
          <table:table-cell office:value-type="float" office:value="-117.054560809148" calcext:value-type="float">
            <text:p>-117.054560809148</text:p>
          </table:table-cell>
          <table:table-cell office:value-type="float" office:value="117.054560809148" calcext:value-type="float">
            <text:p>117.054560809148</text:p>
          </table:table-cell>
          <table:table-cell office:value-type="float" office:value="1174.75633027996" calcext:value-type="float">
            <text:p>1174.75633027996</text:p>
          </table:table-cell>
          <table:table-cell office:value-type="float" office:value="1423.24473622642" calcext:value-type="float">
            <text:p>1423.24473622642</text:p>
          </table:table-cell>
          <table:table-cell office:value-type="float" office:value="1361.12263473981" calcext:value-type="float">
            <text:p>1361.12263473981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1713.87188118812" calcext:value-type="float">
            <text:p>1713.87188118812</text:p>
          </table:table-cell>
          <table:table-cell office:value-type="float" office:value="1735.95188118812" calcext:value-type="float">
            <text:p>1735.95188118812</text:p>
          </table:table-cell>
          <table:table-cell office:value-type="float" office:value="0.513433445655282" calcext:value-type="float">
            <text:p>0.513433445655282</text:p>
          </table:table-cell>
          <table:table-cell office:value-type="float" office:value="0.513928584524498" calcext:value-type="float">
            <text:p>0.513928584524498</text:p>
          </table:table-cell>
          <table:table-cell office:value-type="float" office:value="0.16218482636641" calcext:value-type="float">
            <text:p>0.16218482636641</text:p>
          </table:table-cell>
          <table:table-cell office:value-type="float" office:value="0.162465870311288" calcext:value-type="float">
            <text:p>0.162465870311288</text:p>
          </table:table-cell>
          <table:table-cell office:value-type="float" office:value="-117.138326287331" calcext:value-type="float">
            <text:p>-117.138326287331</text:p>
          </table:table-cell>
          <table:table-cell office:value-type="float" office:value="117.138326287331" calcext:value-type="float">
            <text:p>117.138326287331</text:p>
          </table:table-cell>
          <table:table-cell office:value-type="float" office:value="1596.73355490079" calcext:value-type="float">
            <text:p>1596.73355490079</text:p>
          </table:table-cell>
          <table:table-cell office:value-type="float" office:value="1852.87190999804" calcext:value-type="float">
            <text:p>1852.87190999804</text:p>
          </table:table-cell>
          <table:table-cell office:value-type="float" office:value="1788.83732122372" calcext:value-type="float">
            <text:p>1788.83732122372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18.68" calcext:value-type="float">
            <text:p>-18.68</text:p>
          </table:table-cell>
          <table:table-cell office:value-type="float" office:value="18.68" calcext:value-type="float">
            <text:p>18.68</text:p>
          </table:table-cell>
          <table:table-cell office:value-type="float" office:value="1213.15881188119" calcext:value-type="float">
            <text:p>1213.15881188119</text:p>
          </table:table-cell>
          <table:table-cell office:value-type="float" office:value="1250.51881188119" calcext:value-type="float">
            <text:p>1250.51881188119</text:p>
          </table:table-cell>
          <table:table-cell office:value-type="float" office:value="0.506808144051303" calcext:value-type="float">
            <text:p>0.506808144051303</text:p>
          </table:table-cell>
          <table:table-cell office:value-type="float" office:value="0.507292400703672" calcext:value-type="float">
            <text:p>0.507292400703672</text:p>
          </table:table-cell>
          <table:table-cell office:value-type="float" office:value="0.166618034511914" calcext:value-type="float">
            <text:p>0.166618034511914</text:p>
          </table:table-cell>
          <table:table-cell office:value-type="float" office:value="0.166773977647937" calcext:value-type="float">
            <text:p>0.166773977647937</text:p>
          </table:table-cell>
          <table:table-cell office:value-type="float" office:value="-120.495893239986" calcext:value-type="float">
            <text:p>-120.495893239986</text:p>
          </table:table-cell>
          <table:table-cell office:value-type="float" office:value="120.495893239986" calcext:value-type="float">
            <text:p>120.495893239986</text:p>
          </table:table-cell>
          <table:table-cell office:value-type="float" office:value="1092.78482944677" calcext:value-type="float">
            <text:p>1092.78482944677</text:p>
          </table:table-cell>
          <table:table-cell office:value-type="float" office:value="1371.01470512117" calcext:value-type="float">
            <text:p>1371.01470512117</text:p>
          </table:table-cell>
          <table:table-cell office:value-type="float" office:value="1301.45723620257" calcext:value-type="float">
            <text:p>1301.45723620257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-7.28" calcext:value-type="float">
            <text:p>-7.28</text:p>
          </table:table-cell>
          <table:table-cell office:value-type="float" office:value="7.28" calcext:value-type="float">
            <text:p>7.28</text:p>
          </table:table-cell>
          <table:table-cell office:value-type="float" office:value="1687.19485148515" calcext:value-type="float">
            <text:p>1687.19485148515</text:p>
          </table:table-cell>
          <table:table-cell office:value-type="float" office:value="1701.75485148515" calcext:value-type="float">
            <text:p>1701.75485148515</text:p>
          </table:table-cell>
          <table:table-cell office:value-type="float" office:value="0.512879686768569" calcext:value-type="float">
            <text:p>0.512879686768569</text:p>
          </table:table-cell>
          <table:table-cell office:value-type="float" office:value="0.51317610150121" calcext:value-type="float">
            <text:p>0.51317610150121</text:p>
          </table:table-cell>
          <table:table-cell office:value-type="float" office:value="0.149224345123904" calcext:value-type="float">
            <text:p>0.149224345123904</text:p>
          </table:table-cell>
          <table:table-cell office:value-type="float" office:value="0.149247571123022" calcext:value-type="float">
            <text:p>0.149247571123022</text:p>
          </table:table-cell>
          <table:table-cell office:value-type="float" office:value="-106.963858593662" calcext:value-type="float">
            <text:p>-106.963858593662</text:p>
          </table:table-cell>
          <table:table-cell office:value-type="float" office:value="106.963858593662" calcext:value-type="float">
            <text:p>106.963858593662</text:p>
          </table:table-cell>
          <table:table-cell office:value-type="float" office:value="1580.24871033581" calcext:value-type="float">
            <text:p>1580.24871033581</text:p>
          </table:table-cell>
          <table:table-cell office:value-type="float" office:value="1808.71871007881" calcext:value-type="float">
            <text:p>1808.71871007881</text:p>
          </table:table-cell>
          <table:table-cell office:value-type="float" office:value="1751.60121014306" calcext:value-type="float">
            <text:p>1751.60121014306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12.32" calcext:value-type="float">
            <text:p>-12.32</text:p>
          </table:table-cell>
          <table:table-cell office:value-type="float" office:value="12.32" calcext:value-type="float">
            <text:p>12.32</text:p>
          </table:table-cell>
          <table:table-cell office:value-type="float" office:value="2002.69247524752" calcext:value-type="float">
            <text:p>2002.69247524752</text:p>
          </table:table-cell>
          <table:table-cell office:value-type="float" office:value="2027.33247524752" calcext:value-type="float">
            <text:p>2027.33247524752</text:p>
          </table:table-cell>
          <table:table-cell office:value-type="float" office:value="0.523395292449449" calcext:value-type="float">
            <text:p>0.523395292449449</text:p>
          </table:table-cell>
          <table:table-cell office:value-type="float" office:value="0.524673386355306" calcext:value-type="float">
            <text:p>0.524673386355306</text:p>
          </table:table-cell>
          <table:table-cell office:value-type="float" office:value="0.190780730346095" calcext:value-type="float">
            <text:p>0.190780730346095</text:p>
          </table:table-cell>
          <table:table-cell office:value-type="float" office:value="0.190835078343048" calcext:value-type="float">
            <text:p>0.190835078343048</text:p>
          </table:table-cell>
          <table:table-cell office:value-type="float" office:value="-139.673667682843" calcext:value-type="float">
            <text:p>-139.673667682843</text:p>
          </table:table-cell>
          <table:table-cell office:value-type="float" office:value="139.673667682843" calcext:value-type="float">
            <text:p>139.673667682843</text:p>
          </table:table-cell>
          <table:table-cell office:value-type="float" office:value="1863.01880756468" calcext:value-type="float">
            <text:p>1863.01880756468</text:p>
          </table:table-cell>
          <table:table-cell office:value-type="float" office:value="2166.96194090548" calcext:value-type="float">
            <text:p>2166.96194090548</text:p>
          </table:table-cell>
          <table:table-cell office:value-type="float" office:value="2090.97615757028" calcext:value-type="float">
            <text:p>2090.97615757028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.8" calcext:value-type="float">
            <text:p>-10.8</text:p>
          </table:table-cell>
          <table:table-cell office:value-type="float" office:value="10.8" calcext:value-type="float">
            <text:p>10.8</text:p>
          </table:table-cell>
          <table:table-cell office:value-type="float" office:value="1508.23168316832" calcext:value-type="float">
            <text:p>1508.23168316832</text:p>
          </table:table-cell>
          <table:table-cell office:value-type="float" office:value="1529.83168316832" calcext:value-type="float">
            <text:p>1529.83168316832</text:p>
          </table:table-cell>
          <table:table-cell office:value-type="float" office:value="0.510129428049408" calcext:value-type="float">
            <text:p>0.510129428049408</text:p>
          </table:table-cell>
          <table:table-cell office:value-type="float" office:value="0.510394186845693" calcext:value-type="float">
            <text:p>0.510394186845693</text:p>
          </table:table-cell>
          <table:table-cell office:value-type="float" office:value="0.173948456940369" calcext:value-type="float">
            <text:p>0.173948456940369</text:p>
          </table:table-cell>
          <table:table-cell office:value-type="float" office:value="0.173995766921167" calcext:value-type="float">
            <text:p>0.173995766921167</text:p>
          </table:table-cell>
          <table:table-cell office:value-type="float" office:value="-126.173571849016" calcext:value-type="float">
            <text:p>-126.173571849016</text:p>
          </table:table-cell>
          <table:table-cell office:value-type="float" office:value="126.173571849016" calcext:value-type="float">
            <text:p>126.173571849016</text:p>
          </table:table-cell>
          <table:table-cell office:value-type="float" office:value="1382.09551379917" calcext:value-type="float">
            <text:p>1382.09551379917</text:p>
          </table:table-cell>
          <table:table-cell office:value-type="float" office:value="1656.00525501733" calcext:value-type="float">
            <text:p>1656.00525501733</text:p>
          </table:table-cell>
          <table:table-cell office:value-type="float" office:value="1587.52781971279" calcext:value-type="float">
            <text:p>1587.5278197127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522.0398019802" calcext:value-type="float">
            <text:p>1522.0398019802</text:p>
          </table:table-cell>
          <table:table-cell office:value-type="float" office:value="1538.9998019802" calcext:value-type="float">
            <text:p>1538.9998019802</text:p>
          </table:table-cell>
          <table:table-cell office:value-type="float" office:value="0.510297174768956" calcext:value-type="float">
            <text:p>0.510297174768956</text:p>
          </table:table-cell>
          <table:table-cell office:value-type="float" office:value="0.510510675149026" calcext:value-type="float">
            <text:p>0.510510675149026</text:p>
          </table:table-cell>
          <table:table-cell office:value-type="float" office:value="0.17211419461076" calcext:value-type="float">
            <text:p>0.17211419461076</text:p>
          </table:table-cell>
          <table:table-cell office:value-type="float" office:value="0.172125721387133" calcext:value-type="float">
            <text:p>0.172125721387133</text:p>
          </table:table-cell>
          <table:table-cell office:value-type="float" office:value="-124.697267017201" calcext:value-type="float">
            <text:p>-124.697267017201</text:p>
          </table:table-cell>
          <table:table-cell office:value-type="float" office:value="124.697267017201" calcext:value-type="float">
            <text:p>124.697267017201</text:p>
          </table:table-cell>
          <table:table-cell office:value-type="float" office:value="1397.35162133256" calcext:value-type="float">
            <text:p>1397.35162133256</text:p>
          </table:table-cell>
          <table:table-cell office:value-type="float" office:value="1663.6970689974" calcext:value-type="float">
            <text:p>1663.6970689974</text:p>
          </table:table-cell>
          <table:table-cell office:value-type="float" office:value="1597.11070708119" calcext:value-type="float">
            <text:p>1597.11070708119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-10.28" calcext:value-type="float">
            <text:p>-10.28</text:p>
          </table:table-cell>
          <table:table-cell office:value-type="float" office:value="10.28" calcext:value-type="float">
            <text:p>10.28</text:p>
          </table:table-cell>
          <table:table-cell office:value-type="float" office:value="2063.8095049505" calcext:value-type="float">
            <text:p>2063.8095049505</text:p>
          </table:table-cell>
          <table:table-cell office:value-type="float" office:value="2084.3695049505" calcext:value-type="float">
            <text:p>2084.3695049505</text:p>
          </table:table-cell>
          <table:table-cell office:value-type="float" office:value="0.526716402355586" calcext:value-type="float">
            <text:p>0.526716402355586</text:p>
          </table:table-cell>
          <table:table-cell office:value-type="float" office:value="0.527950677439728" calcext:value-type="float">
            <text:p>0.527950677439728</text:p>
          </table:table-cell>
          <table:table-cell office:value-type="float" office:value="0.138609116879855" calcext:value-type="float">
            <text:p>0.138609116879855</text:p>
          </table:table-cell>
          <table:table-cell office:value-type="float" office:value="0.13897415093484" calcext:value-type="float">
            <text:p>0.13897415093484</text:p>
          </table:table-cell>
          <table:table-cell office:value-type="float" office:value="-99.1779966086321" calcext:value-type="float">
            <text:p>-99.1779966086321</text:p>
          </table:table-cell>
          <table:table-cell office:value-type="float" office:value="99.1779966086321" calcext:value-type="float">
            <text:p>99.1779966086321</text:p>
          </table:table-cell>
          <table:table-cell office:value-type="float" office:value="1964.90633616192" calcext:value-type="float">
            <text:p>1964.90633616192</text:p>
          </table:table-cell>
          <table:table-cell office:value-type="float" office:value="2183.54750155913" calcext:value-type="float">
            <text:p>2183.54750155913</text:p>
          </table:table-cell>
          <table:table-cell office:value-type="float" office:value="2128.88721020983" calcext:value-type="float">
            <text:p>2128.88721020983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628.38475247525" calcext:value-type="float">
            <text:p>1628.38475247525</text:p>
          </table:table-cell>
          <table:table-cell office:value-type="float" office:value="1641.50475247525" calcext:value-type="float">
            <text:p>1641.50475247525</text:p>
          </table:table-cell>
          <table:table-cell office:value-type="float" office:value="0.511811849374612" calcext:value-type="float">
            <text:p>0.511811849374612</text:p>
          </table:table-cell>
          <table:table-cell office:value-type="float" office:value="0.512033358278307" calcext:value-type="float">
            <text:p>0.512033358278307</text:p>
          </table:table-cell>
          <table:table-cell office:value-type="float" office:value="0.128401070991376" calcext:value-type="float">
            <text:p>0.128401070991376</text:p>
          </table:table-cell>
          <table:table-cell office:value-type="float" office:value="0.128406468484968" calcext:value-type="float">
            <text:p>0.128406468484968</text:p>
          </table:table-cell>
          <table:table-cell office:value-type="float" office:value="-91.2690005395305" calcext:value-type="float">
            <text:p>-91.2690005395305</text:p>
          </table:table-cell>
          <table:table-cell office:value-type="float" office:value="91.2690005395305" calcext:value-type="float">
            <text:p>91.2690005395305</text:p>
          </table:table-cell>
          <table:table-cell office:value-type="float" office:value="1537.11575193572" calcext:value-type="float">
            <text:p>1537.11575193572</text:p>
          </table:table-cell>
          <table:table-cell office:value-type="float" office:value="1732.7697376375" calcext:value-type="float">
            <text:p>1732.7697376375</text:p>
          </table:table-cell>
          <table:table-cell office:value-type="float" office:value="1683.85624121206" calcext:value-type="float">
            <text:p>1683.8562412120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0.8" calcext:value-type="float">
            <text:p>-10.8</text:p>
          </table:table-cell>
          <table:table-cell office:value-type="float" office:value="10.8" calcext:value-type="float">
            <text:p>10.8</text:p>
          </table:table-cell>
          <table:table-cell office:value-type="float" office:value="1542.05267326733" calcext:value-type="float">
            <text:p>1542.05267326733</text:p>
          </table:table-cell>
          <table:table-cell office:value-type="float" office:value="1563.65267326733" calcext:value-type="float">
            <text:p>1563.65267326733</text:p>
          </table:table-cell>
          <table:table-cell office:value-type="float" office:value="0.510550052309093" calcext:value-type="float">
            <text:p>0.510550052309093</text:p>
          </table:table-cell>
          <table:table-cell office:value-type="float" office:value="0.510837680659645" calcext:value-type="float">
            <text:p>0.510837680659645</text:p>
          </table:table-cell>
          <table:table-cell office:value-type="float" office:value="0.11994076541653" calcext:value-type="float">
            <text:p>0.11994076541653</text:p>
          </table:table-cell>
          <table:table-cell office:value-type="float" office:value="0.120036137645523" calcext:value-type="float">
            <text:p>0.120036137645523</text:p>
          </table:table-cell>
          <table:table-cell office:value-type="float" office:value="-85.0698834496074" calcext:value-type="float">
            <text:p>-85.0698834496074</text:p>
          </table:table-cell>
          <table:table-cell office:value-type="float" office:value="85.0698834496074" calcext:value-type="float">
            <text:p>85.0698834496074</text:p>
          </table:table-cell>
          <table:table-cell office:value-type="float" office:value="1457.05311094795" calcext:value-type="float">
            <text:p>1457.05311094795</text:p>
          </table:table-cell>
          <table:table-cell office:value-type="float" office:value="1648.72255671693" calcext:value-type="float">
            <text:p>1648.72255671693</text:p>
          </table:table-cell>
          <table:table-cell office:value-type="float" office:value="1600.80519527469" calcext:value-type="float">
            <text:p>1600.8051952746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13.56" calcext:value-type="float">
            <text:p>-13.56</text:p>
          </table:table-cell>
          <table:table-cell office:value-type="float" office:value="13.56" calcext:value-type="float">
            <text:p>13.56</text:p>
          </table:table-cell>
          <table:table-cell office:value-type="float" office:value="1725.07643564356" calcext:value-type="float">
            <text:p>1725.07643564356</text:p>
          </table:table-cell>
          <table:table-cell office:value-type="float" office:value="1752.19643564356" calcext:value-type="float">
            <text:p>1752.19643564356</text:p>
          </table:table-cell>
          <table:table-cell office:value-type="float" office:value="0.51368037762057" calcext:value-type="float">
            <text:p>0.51368037762057</text:p>
          </table:table-cell>
          <table:table-cell office:value-type="float" office:value="0.514315566141653" calcext:value-type="float">
            <text:p>0.514315566141653</text:p>
          </table:table-cell>
          <table:table-cell office:value-type="float" office:value="0.131572666870079" calcext:value-type="float">
            <text:p>0.131572666870079</text:p>
          </table:table-cell>
          <table:table-cell office:value-type="float" office:value="0.131768109491951" calcext:value-type="float">
            <text:p>0.131768109491951</text:p>
          </table:table-cell>
          <table:table-cell office:value-type="float" office:value="-93.7745208431355" calcext:value-type="float">
            <text:p>-93.7745208431355</text:p>
          </table:table-cell>
          <table:table-cell office:value-type="float" office:value="93.7745208431355" calcext:value-type="float">
            <text:p>93.7745208431355</text:p>
          </table:table-cell>
          <table:table-cell office:value-type="float" office:value="1631.4478420634" calcext:value-type="float">
            <text:p>1631.4478420634</text:p>
          </table:table-cell>
          <table:table-cell office:value-type="float" office:value="1845.9709564867" calcext:value-type="float">
            <text:p>1845.9709564867</text:p>
          </table:table-cell>
          <table:table-cell office:value-type="float" office:value="1792.34017788087" calcext:value-type="float">
            <text:p>1792.3401778808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12" calcext:value-type="float">
            <text:p>-8.12</text:p>
          </table:table-cell>
          <table:table-cell office:value-type="float" office:value="8.12" calcext:value-type="float">
            <text:p>8.12</text:p>
          </table:table-cell>
          <table:table-cell office:value-type="float" office:value="1603.46871287129" calcext:value-type="float">
            <text:p>1603.46871287129</text:p>
          </table:table-cell>
          <table:table-cell office:value-type="float" office:value="1619.70871287129" calcext:value-type="float">
            <text:p>1619.70871287129</text:p>
          </table:table-cell>
          <table:table-cell office:value-type="float" office:value="0.511414832336228" calcext:value-type="float">
            <text:p>0.511414832336228</text:p>
          </table:table-cell>
          <table:table-cell office:value-type="float" office:value="0.511670195407503" calcext:value-type="float">
            <text:p>0.511670195407503</text:p>
          </table:table-cell>
          <table:table-cell office:value-type="float" office:value="0.142422352981382" calcext:value-type="float">
            <text:p>0.142422352981382</text:p>
          </table:table-cell>
          <table:table-cell office:value-type="float" office:value="0.142485919230849" calcext:value-type="float">
            <text:p>0.142485919230849</text:p>
          </table:table-cell>
          <table:table-cell office:value-type="float" office:value="-101.828185128696" calcext:value-type="float">
            <text:p>-101.828185128696</text:p>
          </table:table-cell>
          <table:table-cell office:value-type="float" office:value="101.828185128696" calcext:value-type="float">
            <text:p>101.828185128696</text:p>
          </table:table-cell>
          <table:table-cell office:value-type="float" office:value="1501.68860027529" calcext:value-type="float">
            <text:p>1501.68860027529</text:p>
          </table:table-cell>
          <table:table-cell office:value-type="float" office:value="1721.53689799998" calcext:value-type="float">
            <text:p>1721.53689799998</text:p>
          </table:table-cell>
          <table:table-cell office:value-type="float" office:value="1666.57482356881" calcext:value-type="float">
            <text:p>1666.57482356881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263.51702970297" calcext:value-type="float">
            <text:p>1263.51702970297</text:p>
          </table:table-cell>
          <table:table-cell office:value-type="float" office:value="1277.91702970297" calcext:value-type="float">
            <text:p>1277.91702970297</text:p>
          </table:table-cell>
          <table:table-cell office:value-type="float" office:value="0.507450938686585" calcext:value-type="float">
            <text:p>0.507450938686585</text:p>
          </table:table-cell>
          <table:table-cell office:value-type="float" office:value="0.507621475486545" calcext:value-type="float">
            <text:p>0.507621475486545</text:p>
          </table:table-cell>
          <table:table-cell office:value-type="float" office:value="0.2003551169715" calcext:value-type="float">
            <text:p>0.2003551169715</text:p>
          </table:table-cell>
          <table:table-cell office:value-type="float" office:value="0.20044401121362" calcext:value-type="float">
            <text:p>0.20044401121362</text:p>
          </table:table-cell>
          <table:table-cell office:value-type="float" office:value="-147.558167962961" calcext:value-type="float">
            <text:p>-147.558167962961</text:p>
          </table:table-cell>
          <table:table-cell office:value-type="float" office:value="147.558167962961" calcext:value-type="float">
            <text:p>147.558167962961</text:p>
          </table:table-cell>
          <table:table-cell office:value-type="float" office:value="1116.03245357442" calcext:value-type="float">
            <text:p>1116.03245357442</text:p>
          </table:table-cell>
          <table:table-cell office:value-type="float" office:value="1425.47519766593" calcext:value-type="float">
            <text:p>1425.47519766593</text:p>
          </table:table-cell>
          <table:table-cell office:value-type="float" office:value="1348.11451164305" calcext:value-type="float">
            <text:p>1348.11451164305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56" calcext:value-type="float">
            <text:p>-4.56</text:p>
          </table:table-cell>
          <table:table-cell office:value-type="float" office:value="4.56" calcext:value-type="float">
            <text:p>4.56</text:p>
          </table:table-cell>
          <table:table-cell office:value-type="float" office:value="1727.74752475248" calcext:value-type="float">
            <text:p>1727.74752475248</text:p>
          </table:table-cell>
          <table:table-cell office:value-type="float" office:value="1736.86752475248" calcext:value-type="float">
            <text:p>1736.86752475248</text:p>
          </table:table-cell>
          <table:table-cell office:value-type="float" office:value="0.513740550126393" calcext:value-type="float">
            <text:p>0.513740550126393</text:p>
          </table:table-cell>
          <table:table-cell office:value-type="float" office:value="0.513949874094422" calcext:value-type="float">
            <text:p>0.513949874094422</text:p>
          </table:table-cell>
          <table:table-cell office:value-type="float" office:value="0.144458106668993" calcext:value-type="float">
            <text:p>0.144458106668993</text:p>
          </table:table-cell>
          <table:table-cell office:value-type="float" office:value="0.144494510837346" calcext:value-type="float">
            <text:p>0.144494510837346</text:p>
          </table:table-cell>
          <table:table-cell office:value-type="float" office:value="-103.349164799944" calcext:value-type="float">
            <text:p>-103.349164799944</text:p>
          </table:table-cell>
          <table:table-cell office:value-type="float" office:value="103.349164799944" calcext:value-type="float">
            <text:p>103.349164799944</text:p>
          </table:table-cell>
          <table:table-cell office:value-type="float" office:value="1624.39835995253" calcext:value-type="float">
            <text:p>1624.39835995253</text:p>
          </table:table-cell>
          <table:table-cell office:value-type="float" office:value="1840.18908886406" calcext:value-type="float">
            <text:p>1840.18908886406</text:p>
          </table:table-cell>
          <table:table-cell office:value-type="float" office:value="1786.24140663617" calcext:value-type="float">
            <text:p>1786.2414066361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644.49287128713" calcext:value-type="float">
            <text:p>1644.49287128713</text:p>
          </table:table-cell>
          <table:table-cell office:value-type="float" office:value="1662.49287128713" calcext:value-type="float">
            <text:p>1662.49287128713</text:p>
          </table:table-cell>
          <table:table-cell office:value-type="float" office:value="0.512085077798636" calcext:value-type="float">
            <text:p>0.512085077798636</text:p>
          </table:table-cell>
          <table:table-cell office:value-type="float" office:value="0.512407049741931" calcext:value-type="float">
            <text:p>0.512407049741931</text:p>
          </table:table-cell>
          <table:table-cell office:value-type="float" office:value="0.146279502026873" calcext:value-type="float">
            <text:p>0.146279502026873</text:p>
          </table:table-cell>
          <table:table-cell office:value-type="float" office:value="0.146438872754657" calcext:value-type="float">
            <text:p>0.146438872754657</text:p>
          </table:table-cell>
          <table:table-cell office:value-type="float" office:value="-104.82518176313" calcext:value-type="float">
            <text:p>-104.82518176313</text:p>
          </table:table-cell>
          <table:table-cell office:value-type="float" office:value="104.82518176313" calcext:value-type="float">
            <text:p>104.82518176313</text:p>
          </table:table-cell>
          <table:table-cell office:value-type="float" office:value="1539.78880971805" calcext:value-type="float">
            <text:p>1539.78880971805</text:p>
          </table:table-cell>
          <table:table-cell office:value-type="float" office:value="1767.31805305026" calcext:value-type="float">
            <text:p>1767.31805305026</text:p>
          </table:table-cell>
          <table:table-cell office:value-type="float" office:value="1710.43574221721" calcext:value-type="float">
            <text:p>1710.43574221721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6.4" calcext:value-type="float">
            <text:p>-6.4</text:p>
          </table:table-cell>
          <table:table-cell office:value-type="float" office:value="6.4" calcext:value-type="float">
            <text:p>6.4</text:p>
          </table:table-cell>
          <table:table-cell office:value-type="float" office:value="1323.02356435644" calcext:value-type="float">
            <text:p>1323.02356435644</text:p>
          </table:table-cell>
          <table:table-cell office:value-type="float" office:value="1335.82356435644" calcext:value-type="float">
            <text:p>1335.82356435644</text:p>
          </table:table-cell>
          <table:table-cell office:value-type="float" office:value="0.508127793729096" calcext:value-type="float">
            <text:p>0.508127793729096</text:p>
          </table:table-cell>
          <table:table-cell office:value-type="float" office:value="0.508265653743358" calcext:value-type="float">
            <text:p>0.508265653743358</text:p>
          </table:table-cell>
          <table:table-cell office:value-type="float" office:value="0.202936661654169" calcext:value-type="float">
            <text:p>0.202936661654169</text:p>
          </table:table-cell>
          <table:table-cell office:value-type="float" office:value="0.202964128269528" calcext:value-type="float">
            <text:p>0.202964128269528</text:p>
          </table:table-cell>
          <table:table-cell office:value-type="float" office:value="-149.649705409732" calcext:value-type="float">
            <text:p>-149.649705409732</text:p>
          </table:table-cell>
          <table:table-cell office:value-type="float" office:value="149.649705409732" calcext:value-type="float">
            <text:p>149.649705409732</text:p>
          </table:table-cell>
          <table:table-cell office:value-type="float" office:value="1173.39670945105" calcext:value-type="float">
            <text:p>1173.39670945105</text:p>
          </table:table-cell>
          <table:table-cell office:value-type="float" office:value="1485.47326976617" calcext:value-type="float">
            <text:p>1485.47326976617</text:p>
          </table:table-cell>
          <table:table-cell office:value-type="float" office:value="1407.45412968739" calcext:value-type="float">
            <text:p>1407.45412968739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743.98514851485" calcext:value-type="float">
            <text:p>1743.98514851485</text:p>
          </table:table-cell>
          <table:table-cell office:value-type="float" office:value="1760.30514851485" calcext:value-type="float">
            <text:p>1760.30514851485</text:p>
          </table:table-cell>
          <table:table-cell office:value-type="float" office:value="0.514117480050422" calcext:value-type="float">
            <text:p>0.514117480050422</text:p>
          </table:table-cell>
          <table:table-cell office:value-type="float" office:value="0.514516255660885" calcext:value-type="float">
            <text:p>0.514516255660885</text:p>
          </table:table-cell>
          <table:table-cell office:value-type="float" office:value="0.132274010314316" calcext:value-type="float">
            <text:p>0.132274010314316</text:p>
          </table:table-cell>
          <table:table-cell office:value-type="float" office:value="0.132327548750312" calcext:value-type="float">
            <text:p>0.132327548750312</text:p>
          </table:table-cell>
          <table:table-cell office:value-type="float" office:value="-94.1924050824695" calcext:value-type="float">
            <text:p>-94.1924050824695</text:p>
          </table:table-cell>
          <table:table-cell office:value-type="float" office:value="94.1924050824695" calcext:value-type="float">
            <text:p>94.1924050824695</text:p>
          </table:table-cell>
          <table:table-cell office:value-type="float" office:value="1649.79274343238" calcext:value-type="float">
            <text:p>1649.79274343238</text:p>
          </table:table-cell>
          <table:table-cell office:value-type="float" office:value="1854.4575505057" calcext:value-type="float">
            <text:p>1854.4575505057</text:p>
          </table:table-cell>
          <table:table-cell office:value-type="float" office:value="1803.29134873737" calcext:value-type="float">
            <text:p>1803.29134873737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16.56" calcext:value-type="float">
            <text:p>-16.56</text:p>
          </table:table-cell>
          <table:table-cell office:value-type="float" office:value="16.56" calcext:value-type="float">
            <text:p>16.56</text:p>
          </table:table-cell>
          <table:table-cell office:value-type="float" office:value="1588.12574257426" calcext:value-type="float">
            <text:p>1588.12574257426</text:p>
          </table:table-cell>
          <table:table-cell office:value-type="float" office:value="1621.24574257426" calcext:value-type="float">
            <text:p>1621.24574257426</text:p>
          </table:table-cell>
          <table:table-cell office:value-type="float" office:value="0.511184612786351" calcext:value-type="float">
            <text:p>0.511184612786351</text:p>
          </table:table-cell>
          <table:table-cell office:value-type="float" office:value="0.511695018279865" calcext:value-type="float">
            <text:p>0.511695018279865</text:p>
          </table:table-cell>
          <table:table-cell office:value-type="float" office:value="0.129665418765596" calcext:value-type="float">
            <text:p>0.129665418765596</text:p>
          </table:table-cell>
          <table:table-cell office:value-type="float" office:value="0.129815638442617" calcext:value-type="float">
            <text:p>0.129815638442617</text:p>
          </table:table-cell>
          <table:table-cell office:value-type="float" office:value="-92.3181488081364" calcext:value-type="float">
            <text:p>-92.3181488081364</text:p>
          </table:table-cell>
          <table:table-cell office:value-type="float" office:value="92.3181488081365" calcext:value-type="float">
            <text:p>92.3181488081365</text:p>
          </table:table-cell>
          <table:table-cell office:value-type="float" office:value="1495.91951263439" calcext:value-type="float">
            <text:p>1495.91951263439</text:p>
          </table:table-cell>
          <table:table-cell office:value-type="float" office:value="1713.56389138239" calcext:value-type="float">
            <text:p>1713.56389138239</text:p>
          </table:table-cell>
          <table:table-cell office:value-type="float" office:value="1659.15279669539" calcext:value-type="float">
            <text:p>1659.15279669539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9.14285714285714" calcext:value-type="float">
            <text:p>-9.14285714285714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1002.05128205128" calcext:value-type="float">
            <text:p>1002.05128205128</text:p>
          </table:table-cell>
          <table:table-cell office:value-type="float" office:value="1020.336996337" calcext:value-type="float">
            <text:p>1020.336996337</text:p>
          </table:table-cell>
          <table:table-cell office:value-type="float" office:value="0.502794606468688" calcext:value-type="float">
            <text:p>0.502794606468688</text:p>
          </table:table-cell>
          <table:table-cell office:value-type="float" office:value="0.503256528375389" calcext:value-type="float">
            <text:p>0.503256528375389</text:p>
          </table:table-cell>
          <table:table-cell office:value-type="float" office:value="0.113688870590012" calcext:value-type="float">
            <text:p>0.113688870590012</text:p>
          </table:table-cell>
          <table:table-cell office:value-type="float" office:value="0.113779443512894" calcext:value-type="float">
            <text:p>0.113779443512894</text:p>
          </table:table-cell>
          <table:table-cell office:value-type="float" office:value="-80.4707815329515" calcext:value-type="float">
            <text:p>-80.4707815329515</text:p>
          </table:table-cell>
          <table:table-cell office:value-type="float" office:value="80.4707815329515" calcext:value-type="float">
            <text:p>80.4707815329515</text:p>
          </table:table-cell>
          <table:table-cell office:value-type="float" office:value="921.646871170818" calcext:value-type="float">
            <text:p>921.646871170818</text:p>
          </table:table-cell>
          <table:table-cell office:value-type="float" office:value="1100.80777786995" calcext:value-type="float">
            <text:p>1100.80777786995</text:p>
          </table:table-cell>
          <table:table-cell office:value-type="float" office:value="1056.01755119517" calcext:value-type="float">
            <text:p>1056.0175511951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7.04" calcext:value-type="float">
            <text:p>-7.04</text:p>
          </table:table-cell>
          <table:table-cell office:value-type="float" office:value="7.04" calcext:value-type="float">
            <text:p>7.04</text:p>
          </table:table-cell>
          <table:table-cell office:value-type="float" office:value="2182.22455445545" calcext:value-type="float">
            <text:p>2182.22455445545</text:p>
          </table:table-cell>
          <table:table-cell office:value-type="float" office:value="2196.30455445545" calcext:value-type="float">
            <text:p>2196.30455445545</text:p>
          </table:table-cell>
          <table:table-cell office:value-type="float" office:value="0.53470567366503" calcext:value-type="float">
            <text:p>0.53470567366503</text:p>
          </table:table-cell>
          <table:table-cell office:value-type="float" office:value="0.535804695045491" calcext:value-type="float">
            <text:p>0.535804695045491</text:p>
          </table:table-cell>
          <table:table-cell office:value-type="float" office:value="0.162113937195415" calcext:value-type="float">
            <text:p>0.162113937195415</text:p>
          </table:table-cell>
          <table:table-cell office:value-type="float" office:value="0.162494630220181" calcext:value-type="float">
            <text:p>0.162494630220181</text:p>
          </table:table-cell>
          <table:table-cell office:value-type="float" office:value="-117.160670223536" calcext:value-type="float">
            <text:p>-117.160670223536</text:p>
          </table:table-cell>
          <table:table-cell office:value-type="float" office:value="117.160670223536" calcext:value-type="float">
            <text:p>117.160670223536</text:p>
          </table:table-cell>
          <table:table-cell office:value-type="float" office:value="2065.35957389405" calcext:value-type="float">
            <text:p>2065.35957389405</text:p>
          </table:table-cell>
          <table:table-cell office:value-type="float" office:value="2313.46522467898" calcext:value-type="float">
            <text:p>2313.46522467898</text:p>
          </table:table-cell>
          <table:table-cell office:value-type="float" office:value="2251.43881198275" calcext:value-type="float">
            <text:p>2251.43881198275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6.2" calcext:value-type="float">
            <text:p>-6.2</text:p>
          </table:table-cell>
          <table:table-cell office:value-type="float" office:value="6.2" calcext:value-type="float">
            <text:p>6.2</text:p>
          </table:table-cell>
          <table:table-cell office:value-type="float" office:value="1325.0499009901" calcext:value-type="float">
            <text:p>1325.0499009901</text:p>
          </table:table-cell>
          <table:table-cell office:value-type="float" office:value="1337.4499009901" calcext:value-type="float">
            <text:p>1337.4499009901</text:p>
          </table:table-cell>
          <table:table-cell office:value-type="float" office:value="0.508149753368502" calcext:value-type="float">
            <text:p>0.508149753368502</text:p>
          </table:table-cell>
          <table:table-cell office:value-type="float" office:value="0.508283034617584" calcext:value-type="float">
            <text:p>0.508283034617584</text:p>
          </table:table-cell>
          <table:table-cell office:value-type="float" office:value="0.152583002656059" calcext:value-type="float">
            <text:p>0.152583002656059</text:p>
          </table:table-cell>
          <table:table-cell office:value-type="float" office:value="0.152596948472374" calcext:value-type="float">
            <text:p>0.152596948472374</text:p>
          </table:table-cell>
          <table:table-cell office:value-type="float" office:value="-109.52456392459" calcext:value-type="float">
            <text:p>-109.52456392459</text:p>
          </table:table-cell>
          <table:table-cell office:value-type="float" office:value="109.52456392459" calcext:value-type="float">
            <text:p>109.52456392459</text:p>
          </table:table-cell>
          <table:table-cell office:value-type="float" office:value="1215.53602282756" calcext:value-type="float">
            <text:p>1215.53602282756</text:p>
          </table:table-cell>
          <table:table-cell office:value-type="float" office:value="1446.97446491469" calcext:value-type="float">
            <text:p>1446.97446491469</text:p>
          </table:table-cell>
          <table:table-cell office:value-type="float" office:value="1389.11485439291" calcext:value-type="float">
            <text:p>1389.1148543929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992.51267326733" calcext:value-type="float">
            <text:p>1992.51267326733</text:p>
          </table:table-cell>
          <table:table-cell office:value-type="float" office:value="2007.95267326733" calcext:value-type="float">
            <text:p>2007.95267326733</text:p>
          </table:table-cell>
          <table:table-cell office:value-type="float" office:value="0.522890370605287" calcext:value-type="float">
            <text:p>0.522890370605287</text:p>
          </table:table-cell>
          <table:table-cell office:value-type="float" office:value="0.523661440609388" calcext:value-type="float">
            <text:p>0.523661440609388</text:p>
          </table:table-cell>
          <table:table-cell office:value-type="float" office:value="0.165297711529597" calcext:value-type="float">
            <text:p>0.165297711529597</text:p>
          </table:table-cell>
          <table:table-cell office:value-type="float" office:value="0.1655776987265" calcext:value-type="float">
            <text:p>0.1655776987265</text:p>
          </table:table-cell>
          <table:table-cell office:value-type="float" office:value="-119.561412279212" calcext:value-type="float">
            <text:p>-119.561412279212</text:p>
          </table:table-cell>
          <table:table-cell office:value-type="float" office:value="119.561412279212" calcext:value-type="float">
            <text:p>119.561412279212</text:p>
          </table:table-cell>
          <table:table-cell office:value-type="float" office:value="1873.1697341502" calcext:value-type="float">
            <text:p>1873.1697341502</text:p>
          </table:table-cell>
          <table:table-cell office:value-type="float" office:value="2127.51408554654" calcext:value-type="float">
            <text:p>2127.51408554654</text:p>
          </table:table-cell>
          <table:table-cell office:value-type="float" office:value="2063.92799769745" calcext:value-type="float">
            <text:p>2063.92799769745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086.83306930693" calcext:value-type="float">
            <text:p>1086.83306930693</text:p>
          </table:table-cell>
          <table:table-cell office:value-type="float" office:value="1103.95306930693" calcext:value-type="float">
            <text:p>1103.95306930693</text:p>
          </table:table-cell>
          <table:table-cell office:value-type="float" office:value="0.504728643572945" calcext:value-type="float">
            <text:p>0.504728643572945</text:p>
          </table:table-cell>
          <table:table-cell office:value-type="float" office:value="0.50506003152998" calcext:value-type="float">
            <text:p>0.50506003152998</text:p>
          </table:table-cell>
          <table:table-cell office:value-type="float" office:value="0.119375723792418" calcext:value-type="float">
            <text:p>0.119375723792418</text:p>
          </table:table-cell>
          <table:table-cell office:value-type="float" office:value="0.119416256672017" calcext:value-type="float">
            <text:p>0.119416256672017</text:p>
          </table:table-cell>
          <table:table-cell office:value-type="float" office:value="-84.6129463512328" calcext:value-type="float">
            <text:p>-84.6129463512328</text:p>
          </table:table-cell>
          <table:table-cell office:value-type="float" office:value="84.6129463512328" calcext:value-type="float">
            <text:p>84.6129463512328</text:p>
          </table:table-cell>
          <table:table-cell office:value-type="float" office:value="1002.24999122185" calcext:value-type="float">
            <text:p>1002.24999122185</text:p>
          </table:table-cell>
          <table:table-cell office:value-type="float" office:value="1188.56601565816" calcext:value-type="float">
            <text:p>1188.56601565816</text:p>
          </table:table-cell>
          <table:table-cell office:value-type="float" office:value="1141.98700954909" calcext:value-type="float">
            <text:p>1141.98700954909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8" calcext:value-type="float">
            <text:p>-7.8</text:p>
          </table:table-cell>
          <table:table-cell office:value-type="float" office:value="7.8" calcext:value-type="float">
            <text:p>7.8</text:p>
          </table:table-cell>
          <table:table-cell office:value-type="float" office:value="1648.37267326733" calcext:value-type="float">
            <text:p>1648.37267326733</text:p>
          </table:table-cell>
          <table:table-cell office:value-type="float" office:value="1663.97267326733" calcext:value-type="float">
            <text:p>1663.97267326733</text:p>
          </table:table-cell>
          <table:table-cell office:value-type="float" office:value="0.512152952754689" calcext:value-type="float">
            <text:p>0.512152952754689</text:p>
          </table:table-cell>
          <table:table-cell office:value-type="float" office:value="0.512434337283959" calcext:value-type="float">
            <text:p>0.512434337283959</text:p>
          </table:table-cell>
          <table:table-cell office:value-type="float" office:value="0.136056023519508" calcext:value-type="float">
            <text:p>0.136056023519508</text:p>
          </table:table-cell>
          <table:table-cell office:value-type="float" office:value="0.136154568603098" calcext:value-type="float">
            <text:p>0.136154568603098</text:p>
          </table:table-cell>
          <table:table-cell office:value-type="float" office:value="-97.0582897413429" calcext:value-type="float">
            <text:p>-97.0582897413429</text:p>
          </table:table-cell>
          <table:table-cell office:value-type="float" office:value="97.0582897413429" calcext:value-type="float">
            <text:p>97.0582897413429</text:p>
          </table:table-cell>
          <table:table-cell office:value-type="float" office:value="1551.38833971444" calcext:value-type="float">
            <text:p>1551.38833971444</text:p>
          </table:table-cell>
          <table:table-cell office:value-type="float" office:value="1761.03096300867" calcext:value-type="float">
            <text:p>1761.03096300867</text:p>
          </table:table-cell>
          <table:table-cell office:value-type="float" office:value="1708.62030718511" calcext:value-type="float">
            <text:p>1708.62030718511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484.23722772277" calcext:value-type="float">
            <text:p>1484.23722772277</text:p>
          </table:table-cell>
          <table:table-cell office:value-type="float" office:value="1504.55722772277" calcext:value-type="float">
            <text:p>1504.55722772277</text:p>
          </table:table-cell>
          <table:table-cell office:value-type="float" office:value="0.509849166645718" calcext:value-type="float">
            <text:p>0.509849166645718</text:p>
          </table:table-cell>
          <table:table-cell office:value-type="float" office:value="0.510085630517877" calcext:value-type="float">
            <text:p>0.510085630517877</text:p>
          </table:table-cell>
          <table:table-cell office:value-type="float" office:value="0.122687150713582" calcext:value-type="float">
            <text:p>0.122687150713582</text:p>
          </table:table-cell>
          <table:table-cell office:value-type="float" office:value="0.122734375700951" calcext:value-type="float">
            <text:p>0.122734375700951</text:p>
          </table:table-cell>
          <table:table-cell office:value-type="float" office:value="-87.062242010138" calcext:value-type="float">
            <text:p>-87.062242010138</text:p>
          </table:table-cell>
          <table:table-cell office:value-type="float" office:value="87.062242010138" calcext:value-type="float">
            <text:p>87.062242010138</text:p>
          </table:table-cell>
          <table:table-cell office:value-type="float" office:value="1397.17498571263" calcext:value-type="float">
            <text:p>1397.17498571263</text:p>
          </table:table-cell>
          <table:table-cell office:value-type="float" office:value="1591.58455125013" calcext:value-type="float">
            <text:p>1591.58455125013</text:p>
          </table:table-cell>
          <table:table-cell office:value-type="float" office:value="1542.98215986575" calcext:value-type="float">
            <text:p>1542.98215986575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-7.68" calcext:value-type="float">
            <text:p>-7.68</text:p>
          </table:table-cell>
          <table:table-cell office:value-type="float" office:value="7.68" calcext:value-type="float">
            <text:p>7.68</text:p>
          </table:table-cell>
          <table:table-cell office:value-type="float" office:value="1155.57881188119" calcext:value-type="float">
            <text:p>1155.57881188119</text:p>
          </table:table-cell>
          <table:table-cell office:value-type="float" office:value="1170.93881188119" calcext:value-type="float">
            <text:p>1170.93881188119</text:p>
          </table:table-cell>
          <table:table-cell office:value-type="float" office:value="0.505958086366865" calcext:value-type="float">
            <text:p>0.505958086366865</text:p>
          </table:table-cell>
          <table:table-cell office:value-type="float" office:value="0.506198957800164" calcext:value-type="float">
            <text:p>0.506198957800164</text:p>
          </table:table-cell>
          <table:table-cell office:value-type="float" office:value="0.163727383050638" calcext:value-type="float">
            <text:p>0.163727383050638</text:p>
          </table:table-cell>
          <table:table-cell office:value-type="float" office:value="0.163784695030467" calcext:value-type="float">
            <text:p>0.163784695030467</text:p>
          </table:table-cell>
          <table:table-cell office:value-type="float" office:value="-118.163902154387" calcext:value-type="float">
            <text:p>-118.163902154387</text:p>
          </table:table-cell>
          <table:table-cell office:value-type="float" office:value="118.163902154387" calcext:value-type="float">
            <text:p>118.163902154387</text:p>
          </table:table-cell>
          <table:table-cell office:value-type="float" office:value="1037.45951916319" calcext:value-type="float">
            <text:p>1037.45951916319</text:p>
          </table:table-cell>
          <table:table-cell office:value-type="float" office:value="1289.10271403557" calcext:value-type="float">
            <text:p>1289.10271403557</text:p>
          </table:table-cell>
          <table:table-cell office:value-type="float" office:value="1226.19191531748" calcext:value-type="float">
            <text:p>1226.1919153174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291.81089108911" calcext:value-type="float">
            <text:p>1291.81089108911</text:p>
          </table:table-cell>
          <table:table-cell office:value-type="float" office:value="1306.21089108911" calcext:value-type="float">
            <text:p>1306.21089108911</text:p>
          </table:table-cell>
          <table:table-cell office:value-type="float" office:value="0.507781506515966" calcext:value-type="float">
            <text:p>0.507781506515966</text:p>
          </table:table-cell>
          <table:table-cell office:value-type="float" office:value="0.507943300543277" calcext:value-type="float">
            <text:p>0.507943300543277</text:p>
          </table:table-cell>
          <table:table-cell office:value-type="float" office:value="0.162331371864582" calcext:value-type="float">
            <text:p>0.162331371864582</text:p>
          </table:table-cell>
          <table:table-cell office:value-type="float" office:value="0.162358041209743" calcext:value-type="float">
            <text:p>0.162358041209743</text:p>
          </table:table-cell>
          <table:table-cell office:value-type="float" office:value="-117.054560809148" calcext:value-type="float">
            <text:p>-117.054560809148</text:p>
          </table:table-cell>
          <table:table-cell office:value-type="float" office:value="117.054560809148" calcext:value-type="float">
            <text:p>117.054560809148</text:p>
          </table:table-cell>
          <table:table-cell office:value-type="float" office:value="1174.75633027996" calcext:value-type="float">
            <text:p>1174.75633027996</text:p>
          </table:table-cell>
          <table:table-cell office:value-type="float" office:value="1423.24473622642" calcext:value-type="float">
            <text:p>1423.24473622642</text:p>
          </table:table-cell>
          <table:table-cell office:value-type="float" office:value="1361.12263473981" calcext:value-type="float">
            <text:p>1361.12263473981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1713.87188118812" calcext:value-type="float">
            <text:p>1713.87188118812</text:p>
          </table:table-cell>
          <table:table-cell office:value-type="float" office:value="1735.95188118812" calcext:value-type="float">
            <text:p>1735.95188118812</text:p>
          </table:table-cell>
          <table:table-cell office:value-type="float" office:value="0.513433445655282" calcext:value-type="float">
            <text:p>0.513433445655282</text:p>
          </table:table-cell>
          <table:table-cell office:value-type="float" office:value="0.513928584524498" calcext:value-type="float">
            <text:p>0.513928584524498</text:p>
          </table:table-cell>
          <table:table-cell office:value-type="float" office:value="0.16218482636641" calcext:value-type="float">
            <text:p>0.16218482636641</text:p>
          </table:table-cell>
          <table:table-cell office:value-type="float" office:value="0.162465870311288" calcext:value-type="float">
            <text:p>0.162465870311288</text:p>
          </table:table-cell>
          <table:table-cell office:value-type="float" office:value="-117.138326287331" calcext:value-type="float">
            <text:p>-117.138326287331</text:p>
          </table:table-cell>
          <table:table-cell office:value-type="float" office:value="117.138326287331" calcext:value-type="float">
            <text:p>117.138326287331</text:p>
          </table:table-cell>
          <table:table-cell office:value-type="float" office:value="1596.73355490079" calcext:value-type="float">
            <text:p>1596.73355490079</text:p>
          </table:table-cell>
          <table:table-cell office:value-type="float" office:value="1852.87190999804" calcext:value-type="float">
            <text:p>1852.87190999804</text:p>
          </table:table-cell>
          <table:table-cell office:value-type="float" office:value="1788.83732122372" calcext:value-type="float">
            <text:p>1788.83732122372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18.68" calcext:value-type="float">
            <text:p>-18.68</text:p>
          </table:table-cell>
          <table:table-cell office:value-type="float" office:value="18.68" calcext:value-type="float">
            <text:p>18.68</text:p>
          </table:table-cell>
          <table:table-cell office:value-type="float" office:value="1213.15881188119" calcext:value-type="float">
            <text:p>1213.15881188119</text:p>
          </table:table-cell>
          <table:table-cell office:value-type="float" office:value="1250.51881188119" calcext:value-type="float">
            <text:p>1250.51881188119</text:p>
          </table:table-cell>
          <table:table-cell office:value-type="float" office:value="0.506808144051303" calcext:value-type="float">
            <text:p>0.506808144051303</text:p>
          </table:table-cell>
          <table:table-cell office:value-type="float" office:value="0.507292400703672" calcext:value-type="float">
            <text:p>0.507292400703672</text:p>
          </table:table-cell>
          <table:table-cell office:value-type="float" office:value="0.166618034511914" calcext:value-type="float">
            <text:p>0.166618034511914</text:p>
          </table:table-cell>
          <table:table-cell office:value-type="float" office:value="0.166773977647937" calcext:value-type="float">
            <text:p>0.166773977647937</text:p>
          </table:table-cell>
          <table:table-cell office:value-type="float" office:value="-120.495893239986" calcext:value-type="float">
            <text:p>-120.495893239986</text:p>
          </table:table-cell>
          <table:table-cell office:value-type="float" office:value="120.495893239986" calcext:value-type="float">
            <text:p>120.495893239986</text:p>
          </table:table-cell>
          <table:table-cell office:value-type="float" office:value="1092.78482944677" calcext:value-type="float">
            <text:p>1092.78482944677</text:p>
          </table:table-cell>
          <table:table-cell office:value-type="float" office:value="1371.01470512117" calcext:value-type="float">
            <text:p>1371.01470512117</text:p>
          </table:table-cell>
          <table:table-cell office:value-type="float" office:value="1301.45723620257" calcext:value-type="float">
            <text:p>1301.45723620257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-7.28" calcext:value-type="float">
            <text:p>-7.28</text:p>
          </table:table-cell>
          <table:table-cell office:value-type="float" office:value="7.28" calcext:value-type="float">
            <text:p>7.28</text:p>
          </table:table-cell>
          <table:table-cell office:value-type="float" office:value="1687.19485148515" calcext:value-type="float">
            <text:p>1687.19485148515</text:p>
          </table:table-cell>
          <table:table-cell office:value-type="float" office:value="1701.75485148515" calcext:value-type="float">
            <text:p>1701.75485148515</text:p>
          </table:table-cell>
          <table:table-cell office:value-type="float" office:value="0.512879686768569" calcext:value-type="float">
            <text:p>0.512879686768569</text:p>
          </table:table-cell>
          <table:table-cell office:value-type="float" office:value="0.51317610150121" calcext:value-type="float">
            <text:p>0.51317610150121</text:p>
          </table:table-cell>
          <table:table-cell office:value-type="float" office:value="0.149224345123904" calcext:value-type="float">
            <text:p>0.149224345123904</text:p>
          </table:table-cell>
          <table:table-cell office:value-type="float" office:value="0.149247571123022" calcext:value-type="float">
            <text:p>0.149247571123022</text:p>
          </table:table-cell>
          <table:table-cell office:value-type="float" office:value="-106.963858593662" calcext:value-type="float">
            <text:p>-106.963858593662</text:p>
          </table:table-cell>
          <table:table-cell office:value-type="float" office:value="106.963858593662" calcext:value-type="float">
            <text:p>106.963858593662</text:p>
          </table:table-cell>
          <table:table-cell office:value-type="float" office:value="1580.24871033581" calcext:value-type="float">
            <text:p>1580.24871033581</text:p>
          </table:table-cell>
          <table:table-cell office:value-type="float" office:value="1808.71871007881" calcext:value-type="float">
            <text:p>1808.71871007881</text:p>
          </table:table-cell>
          <table:table-cell office:value-type="float" office:value="1751.60121014306" calcext:value-type="float">
            <text:p>1751.60121014306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12.32" calcext:value-type="float">
            <text:p>-12.32</text:p>
          </table:table-cell>
          <table:table-cell office:value-type="float" office:value="12.32" calcext:value-type="float">
            <text:p>12.32</text:p>
          </table:table-cell>
          <table:table-cell office:value-type="float" office:value="2002.69247524752" calcext:value-type="float">
            <text:p>2002.69247524752</text:p>
          </table:table-cell>
          <table:table-cell office:value-type="float" office:value="2027.33247524752" calcext:value-type="float">
            <text:p>2027.33247524752</text:p>
          </table:table-cell>
          <table:table-cell office:value-type="float" office:value="0.523395292449449" calcext:value-type="float">
            <text:p>0.523395292449449</text:p>
          </table:table-cell>
          <table:table-cell office:value-type="float" office:value="0.524673386355306" calcext:value-type="float">
            <text:p>0.524673386355306</text:p>
          </table:table-cell>
          <table:table-cell office:value-type="float" office:value="0.190780730346095" calcext:value-type="float">
            <text:p>0.190780730346095</text:p>
          </table:table-cell>
          <table:table-cell office:value-type="float" office:value="0.190835078343048" calcext:value-type="float">
            <text:p>0.190835078343048</text:p>
          </table:table-cell>
          <table:table-cell office:value-type="float" office:value="-139.673667682843" calcext:value-type="float">
            <text:p>-139.673667682843</text:p>
          </table:table-cell>
          <table:table-cell office:value-type="float" office:value="139.673667682843" calcext:value-type="float">
            <text:p>139.673667682843</text:p>
          </table:table-cell>
          <table:table-cell office:value-type="float" office:value="1863.01880756468" calcext:value-type="float">
            <text:p>1863.01880756468</text:p>
          </table:table-cell>
          <table:table-cell office:value-type="float" office:value="2166.96194090548" calcext:value-type="float">
            <text:p>2166.96194090548</text:p>
          </table:table-cell>
          <table:table-cell office:value-type="float" office:value="2090.97615757028" calcext:value-type="float">
            <text:p>2090.97615757028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.8" calcext:value-type="float">
            <text:p>-10.8</text:p>
          </table:table-cell>
          <table:table-cell office:value-type="float" office:value="10.8" calcext:value-type="float">
            <text:p>10.8</text:p>
          </table:table-cell>
          <table:table-cell office:value-type="float" office:value="1508.23168316832" calcext:value-type="float">
            <text:p>1508.23168316832</text:p>
          </table:table-cell>
          <table:table-cell office:value-type="float" office:value="1529.83168316832" calcext:value-type="float">
            <text:p>1529.83168316832</text:p>
          </table:table-cell>
          <table:table-cell office:value-type="float" office:value="0.510129428049408" calcext:value-type="float">
            <text:p>0.510129428049408</text:p>
          </table:table-cell>
          <table:table-cell office:value-type="float" office:value="0.510394186845693" calcext:value-type="float">
            <text:p>0.510394186845693</text:p>
          </table:table-cell>
          <table:table-cell office:value-type="float" office:value="0.173948456940369" calcext:value-type="float">
            <text:p>0.173948456940369</text:p>
          </table:table-cell>
          <table:table-cell office:value-type="float" office:value="0.173995766921167" calcext:value-type="float">
            <text:p>0.173995766921167</text:p>
          </table:table-cell>
          <table:table-cell office:value-type="float" office:value="-126.173571849016" calcext:value-type="float">
            <text:p>-126.173571849016</text:p>
          </table:table-cell>
          <table:table-cell office:value-type="float" office:value="126.173571849016" calcext:value-type="float">
            <text:p>126.173571849016</text:p>
          </table:table-cell>
          <table:table-cell office:value-type="float" office:value="1382.09551379917" calcext:value-type="float">
            <text:p>1382.09551379917</text:p>
          </table:table-cell>
          <table:table-cell office:value-type="float" office:value="1656.00525501733" calcext:value-type="float">
            <text:p>1656.00525501733</text:p>
          </table:table-cell>
          <table:table-cell office:value-type="float" office:value="1587.52781971279" calcext:value-type="float">
            <text:p>1587.5278197127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522.0398019802" calcext:value-type="float">
            <text:p>1522.0398019802</text:p>
          </table:table-cell>
          <table:table-cell office:value-type="float" office:value="1538.9998019802" calcext:value-type="float">
            <text:p>1538.9998019802</text:p>
          </table:table-cell>
          <table:table-cell office:value-type="float" office:value="0.510297174768956" calcext:value-type="float">
            <text:p>0.510297174768956</text:p>
          </table:table-cell>
          <table:table-cell office:value-type="float" office:value="0.510510675149026" calcext:value-type="float">
            <text:p>0.510510675149026</text:p>
          </table:table-cell>
          <table:table-cell office:value-type="float" office:value="0.17211419461076" calcext:value-type="float">
            <text:p>0.17211419461076</text:p>
          </table:table-cell>
          <table:table-cell office:value-type="float" office:value="0.172125721387133" calcext:value-type="float">
            <text:p>0.172125721387133</text:p>
          </table:table-cell>
          <table:table-cell office:value-type="float" office:value="-124.697267017201" calcext:value-type="float">
            <text:p>-124.697267017201</text:p>
          </table:table-cell>
          <table:table-cell office:value-type="float" office:value="124.697267017201" calcext:value-type="float">
            <text:p>124.697267017201</text:p>
          </table:table-cell>
          <table:table-cell office:value-type="float" office:value="1397.35162133256" calcext:value-type="float">
            <text:p>1397.35162133256</text:p>
          </table:table-cell>
          <table:table-cell office:value-type="float" office:value="1663.6970689974" calcext:value-type="float">
            <text:p>1663.6970689974</text:p>
          </table:table-cell>
          <table:table-cell office:value-type="float" office:value="1597.11070708119" calcext:value-type="float">
            <text:p>1597.11070708119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-10.28" calcext:value-type="float">
            <text:p>-10.28</text:p>
          </table:table-cell>
          <table:table-cell office:value-type="float" office:value="10.28" calcext:value-type="float">
            <text:p>10.28</text:p>
          </table:table-cell>
          <table:table-cell office:value-type="float" office:value="2063.8095049505" calcext:value-type="float">
            <text:p>2063.8095049505</text:p>
          </table:table-cell>
          <table:table-cell office:value-type="float" office:value="2084.3695049505" calcext:value-type="float">
            <text:p>2084.3695049505</text:p>
          </table:table-cell>
          <table:table-cell office:value-type="float" office:value="0.526716402355586" calcext:value-type="float">
            <text:p>0.526716402355586</text:p>
          </table:table-cell>
          <table:table-cell office:value-type="float" office:value="0.527950677439728" calcext:value-type="float">
            <text:p>0.527950677439728</text:p>
          </table:table-cell>
          <table:table-cell office:value-type="float" office:value="0.138609116879855" calcext:value-type="float">
            <text:p>0.138609116879855</text:p>
          </table:table-cell>
          <table:table-cell office:value-type="float" office:value="0.13897415093484" calcext:value-type="float">
            <text:p>0.13897415093484</text:p>
          </table:table-cell>
          <table:table-cell office:value-type="float" office:value="-99.1779966086321" calcext:value-type="float">
            <text:p>-99.1779966086321</text:p>
          </table:table-cell>
          <table:table-cell office:value-type="float" office:value="99.1779966086321" calcext:value-type="float">
            <text:p>99.1779966086321</text:p>
          </table:table-cell>
          <table:table-cell office:value-type="float" office:value="1964.90633616192" calcext:value-type="float">
            <text:p>1964.90633616192</text:p>
          </table:table-cell>
          <table:table-cell office:value-type="float" office:value="2183.54750155913" calcext:value-type="float">
            <text:p>2183.54750155913</text:p>
          </table:table-cell>
          <table:table-cell office:value-type="float" office:value="2128.88721020983" calcext:value-type="float">
            <text:p>2128.88721020983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628.38475247525" calcext:value-type="float">
            <text:p>1628.38475247525</text:p>
          </table:table-cell>
          <table:table-cell office:value-type="float" office:value="1641.50475247525" calcext:value-type="float">
            <text:p>1641.50475247525</text:p>
          </table:table-cell>
          <table:table-cell office:value-type="float" office:value="0.511811849374612" calcext:value-type="float">
            <text:p>0.511811849374612</text:p>
          </table:table-cell>
          <table:table-cell office:value-type="float" office:value="0.512033358278307" calcext:value-type="float">
            <text:p>0.512033358278307</text:p>
          </table:table-cell>
          <table:table-cell office:value-type="float" office:value="0.128401070991376" calcext:value-type="float">
            <text:p>0.128401070991376</text:p>
          </table:table-cell>
          <table:table-cell office:value-type="float" office:value="0.128406468484968" calcext:value-type="float">
            <text:p>0.128406468484968</text:p>
          </table:table-cell>
          <table:table-cell office:value-type="float" office:value="-91.2690005395305" calcext:value-type="float">
            <text:p>-91.2690005395305</text:p>
          </table:table-cell>
          <table:table-cell office:value-type="float" office:value="91.2690005395305" calcext:value-type="float">
            <text:p>91.2690005395305</text:p>
          </table:table-cell>
          <table:table-cell office:value-type="float" office:value="1537.11575193572" calcext:value-type="float">
            <text:p>1537.11575193572</text:p>
          </table:table-cell>
          <table:table-cell office:value-type="float" office:value="1732.7697376375" calcext:value-type="float">
            <text:p>1732.7697376375</text:p>
          </table:table-cell>
          <table:table-cell office:value-type="float" office:value="1683.85624121206" calcext:value-type="float">
            <text:p>1683.8562412120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0.8" calcext:value-type="float">
            <text:p>-10.8</text:p>
          </table:table-cell>
          <table:table-cell office:value-type="float" office:value="10.8" calcext:value-type="float">
            <text:p>10.8</text:p>
          </table:table-cell>
          <table:table-cell office:value-type="float" office:value="1542.05267326733" calcext:value-type="float">
            <text:p>1542.05267326733</text:p>
          </table:table-cell>
          <table:table-cell office:value-type="float" office:value="1563.65267326733" calcext:value-type="float">
            <text:p>1563.65267326733</text:p>
          </table:table-cell>
          <table:table-cell office:value-type="float" office:value="0.510550052309093" calcext:value-type="float">
            <text:p>0.510550052309093</text:p>
          </table:table-cell>
          <table:table-cell office:value-type="float" office:value="0.510837680659645" calcext:value-type="float">
            <text:p>0.510837680659645</text:p>
          </table:table-cell>
          <table:table-cell office:value-type="float" office:value="0.11994076541653" calcext:value-type="float">
            <text:p>0.11994076541653</text:p>
          </table:table-cell>
          <table:table-cell office:value-type="float" office:value="0.120036137645523" calcext:value-type="float">
            <text:p>0.120036137645523</text:p>
          </table:table-cell>
          <table:table-cell office:value-type="float" office:value="-85.0698834496074" calcext:value-type="float">
            <text:p>-85.0698834496074</text:p>
          </table:table-cell>
          <table:table-cell office:value-type="float" office:value="85.0698834496074" calcext:value-type="float">
            <text:p>85.0698834496074</text:p>
          </table:table-cell>
          <table:table-cell office:value-type="float" office:value="1457.05311094795" calcext:value-type="float">
            <text:p>1457.05311094795</text:p>
          </table:table-cell>
          <table:table-cell office:value-type="float" office:value="1648.72255671693" calcext:value-type="float">
            <text:p>1648.72255671693</text:p>
          </table:table-cell>
          <table:table-cell office:value-type="float" office:value="1600.80519527469" calcext:value-type="float">
            <text:p>1600.8051952746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13.56" calcext:value-type="float">
            <text:p>-13.56</text:p>
          </table:table-cell>
          <table:table-cell office:value-type="float" office:value="13.56" calcext:value-type="float">
            <text:p>13.56</text:p>
          </table:table-cell>
          <table:table-cell office:value-type="float" office:value="1725.07643564356" calcext:value-type="float">
            <text:p>1725.07643564356</text:p>
          </table:table-cell>
          <table:table-cell office:value-type="float" office:value="1752.19643564356" calcext:value-type="float">
            <text:p>1752.19643564356</text:p>
          </table:table-cell>
          <table:table-cell office:value-type="float" office:value="0.51368037762057" calcext:value-type="float">
            <text:p>0.51368037762057</text:p>
          </table:table-cell>
          <table:table-cell office:value-type="float" office:value="0.514315566141653" calcext:value-type="float">
            <text:p>0.514315566141653</text:p>
          </table:table-cell>
          <table:table-cell office:value-type="float" office:value="0.131572666870079" calcext:value-type="float">
            <text:p>0.131572666870079</text:p>
          </table:table-cell>
          <table:table-cell office:value-type="float" office:value="0.131768109491951" calcext:value-type="float">
            <text:p>0.131768109491951</text:p>
          </table:table-cell>
          <table:table-cell office:value-type="float" office:value="-93.7745208431355" calcext:value-type="float">
            <text:p>-93.7745208431355</text:p>
          </table:table-cell>
          <table:table-cell office:value-type="float" office:value="93.7745208431355" calcext:value-type="float">
            <text:p>93.7745208431355</text:p>
          </table:table-cell>
          <table:table-cell office:value-type="float" office:value="1631.4478420634" calcext:value-type="float">
            <text:p>1631.4478420634</text:p>
          </table:table-cell>
          <table:table-cell office:value-type="float" office:value="1845.9709564867" calcext:value-type="float">
            <text:p>1845.9709564867</text:p>
          </table:table-cell>
          <table:table-cell office:value-type="float" office:value="1792.34017788087" calcext:value-type="float">
            <text:p>1792.3401778808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12" calcext:value-type="float">
            <text:p>-8.12</text:p>
          </table:table-cell>
          <table:table-cell office:value-type="float" office:value="8.12" calcext:value-type="float">
            <text:p>8.12</text:p>
          </table:table-cell>
          <table:table-cell office:value-type="float" office:value="1603.46871287129" calcext:value-type="float">
            <text:p>1603.46871287129</text:p>
          </table:table-cell>
          <table:table-cell office:value-type="float" office:value="1619.70871287129" calcext:value-type="float">
            <text:p>1619.70871287129</text:p>
          </table:table-cell>
          <table:table-cell office:value-type="float" office:value="0.511414832336228" calcext:value-type="float">
            <text:p>0.511414832336228</text:p>
          </table:table-cell>
          <table:table-cell office:value-type="float" office:value="0.511670195407503" calcext:value-type="float">
            <text:p>0.511670195407503</text:p>
          </table:table-cell>
          <table:table-cell office:value-type="float" office:value="0.142422352981382" calcext:value-type="float">
            <text:p>0.142422352981382</text:p>
          </table:table-cell>
          <table:table-cell office:value-type="float" office:value="0.142485919230849" calcext:value-type="float">
            <text:p>0.142485919230849</text:p>
          </table:table-cell>
          <table:table-cell office:value-type="float" office:value="-101.828185128696" calcext:value-type="float">
            <text:p>-101.828185128696</text:p>
          </table:table-cell>
          <table:table-cell office:value-type="float" office:value="101.828185128696" calcext:value-type="float">
            <text:p>101.828185128696</text:p>
          </table:table-cell>
          <table:table-cell office:value-type="float" office:value="1501.68860027529" calcext:value-type="float">
            <text:p>1501.68860027529</text:p>
          </table:table-cell>
          <table:table-cell office:value-type="float" office:value="1721.53689799998" calcext:value-type="float">
            <text:p>1721.53689799998</text:p>
          </table:table-cell>
          <table:table-cell office:value-type="float" office:value="1666.57482356881" calcext:value-type="float">
            <text:p>1666.57482356881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263.51702970297" calcext:value-type="float">
            <text:p>1263.51702970297</text:p>
          </table:table-cell>
          <table:table-cell office:value-type="float" office:value="1277.91702970297" calcext:value-type="float">
            <text:p>1277.91702970297</text:p>
          </table:table-cell>
          <table:table-cell office:value-type="float" office:value="0.507450938686585" calcext:value-type="float">
            <text:p>0.507450938686585</text:p>
          </table:table-cell>
          <table:table-cell office:value-type="float" office:value="0.507621475486545" calcext:value-type="float">
            <text:p>0.507621475486545</text:p>
          </table:table-cell>
          <table:table-cell office:value-type="float" office:value="0.2003551169715" calcext:value-type="float">
            <text:p>0.2003551169715</text:p>
          </table:table-cell>
          <table:table-cell office:value-type="float" office:value="0.20044401121362" calcext:value-type="float">
            <text:p>0.20044401121362</text:p>
          </table:table-cell>
          <table:table-cell office:value-type="float" office:value="-147.558167962961" calcext:value-type="float">
            <text:p>-147.558167962961</text:p>
          </table:table-cell>
          <table:table-cell office:value-type="float" office:value="147.558167962961" calcext:value-type="float">
            <text:p>147.558167962961</text:p>
          </table:table-cell>
          <table:table-cell office:value-type="float" office:value="1116.03245357442" calcext:value-type="float">
            <text:p>1116.03245357442</text:p>
          </table:table-cell>
          <table:table-cell office:value-type="float" office:value="1425.47519766593" calcext:value-type="float">
            <text:p>1425.47519766593</text:p>
          </table:table-cell>
          <table:table-cell office:value-type="float" office:value="1348.11451164305" calcext:value-type="float">
            <text:p>1348.11451164305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56" calcext:value-type="float">
            <text:p>-4.56</text:p>
          </table:table-cell>
          <table:table-cell office:value-type="float" office:value="4.56" calcext:value-type="float">
            <text:p>4.56</text:p>
          </table:table-cell>
          <table:table-cell office:value-type="float" office:value="1727.74752475248" calcext:value-type="float">
            <text:p>1727.74752475248</text:p>
          </table:table-cell>
          <table:table-cell office:value-type="float" office:value="1736.86752475248" calcext:value-type="float">
            <text:p>1736.86752475248</text:p>
          </table:table-cell>
          <table:table-cell office:value-type="float" office:value="0.513740550126393" calcext:value-type="float">
            <text:p>0.513740550126393</text:p>
          </table:table-cell>
          <table:table-cell office:value-type="float" office:value="0.513949874094422" calcext:value-type="float">
            <text:p>0.513949874094422</text:p>
          </table:table-cell>
          <table:table-cell office:value-type="float" office:value="0.144458106668993" calcext:value-type="float">
            <text:p>0.144458106668993</text:p>
          </table:table-cell>
          <table:table-cell office:value-type="float" office:value="0.144494510837346" calcext:value-type="float">
            <text:p>0.144494510837346</text:p>
          </table:table-cell>
          <table:table-cell office:value-type="float" office:value="-103.349164799944" calcext:value-type="float">
            <text:p>-103.349164799944</text:p>
          </table:table-cell>
          <table:table-cell office:value-type="float" office:value="103.349164799944" calcext:value-type="float">
            <text:p>103.349164799944</text:p>
          </table:table-cell>
          <table:table-cell office:value-type="float" office:value="1624.39835995253" calcext:value-type="float">
            <text:p>1624.39835995253</text:p>
          </table:table-cell>
          <table:table-cell office:value-type="float" office:value="1840.18908886406" calcext:value-type="float">
            <text:p>1840.18908886406</text:p>
          </table:table-cell>
          <table:table-cell office:value-type="float" office:value="1786.24140663617" calcext:value-type="float">
            <text:p>1786.2414066361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644.49287128713" calcext:value-type="float">
            <text:p>1644.49287128713</text:p>
          </table:table-cell>
          <table:table-cell office:value-type="float" office:value="1662.49287128713" calcext:value-type="float">
            <text:p>1662.49287128713</text:p>
          </table:table-cell>
          <table:table-cell office:value-type="float" office:value="0.512085077798636" calcext:value-type="float">
            <text:p>0.512085077798636</text:p>
          </table:table-cell>
          <table:table-cell office:value-type="float" office:value="0.512407049741931" calcext:value-type="float">
            <text:p>0.512407049741931</text:p>
          </table:table-cell>
          <table:table-cell office:value-type="float" office:value="0.146279502026873" calcext:value-type="float">
            <text:p>0.146279502026873</text:p>
          </table:table-cell>
          <table:table-cell office:value-type="float" office:value="0.146438872754657" calcext:value-type="float">
            <text:p>0.146438872754657</text:p>
          </table:table-cell>
          <table:table-cell office:value-type="float" office:value="-104.82518176313" calcext:value-type="float">
            <text:p>-104.82518176313</text:p>
          </table:table-cell>
          <table:table-cell office:value-type="float" office:value="104.82518176313" calcext:value-type="float">
            <text:p>104.82518176313</text:p>
          </table:table-cell>
          <table:table-cell office:value-type="float" office:value="1539.78880971805" calcext:value-type="float">
            <text:p>1539.78880971805</text:p>
          </table:table-cell>
          <table:table-cell office:value-type="float" office:value="1767.31805305026" calcext:value-type="float">
            <text:p>1767.31805305026</text:p>
          </table:table-cell>
          <table:table-cell office:value-type="float" office:value="1710.43574221721" calcext:value-type="float">
            <text:p>1710.43574221721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6.4" calcext:value-type="float">
            <text:p>-6.4</text:p>
          </table:table-cell>
          <table:table-cell office:value-type="float" office:value="6.4" calcext:value-type="float">
            <text:p>6.4</text:p>
          </table:table-cell>
          <table:table-cell office:value-type="float" office:value="1323.02356435644" calcext:value-type="float">
            <text:p>1323.02356435644</text:p>
          </table:table-cell>
          <table:table-cell office:value-type="float" office:value="1335.82356435644" calcext:value-type="float">
            <text:p>1335.82356435644</text:p>
          </table:table-cell>
          <table:table-cell office:value-type="float" office:value="0.508127793729096" calcext:value-type="float">
            <text:p>0.508127793729096</text:p>
          </table:table-cell>
          <table:table-cell office:value-type="float" office:value="0.508265653743358" calcext:value-type="float">
            <text:p>0.508265653743358</text:p>
          </table:table-cell>
          <table:table-cell office:value-type="float" office:value="0.202936661654169" calcext:value-type="float">
            <text:p>0.202936661654169</text:p>
          </table:table-cell>
          <table:table-cell office:value-type="float" office:value="0.202964128269528" calcext:value-type="float">
            <text:p>0.202964128269528</text:p>
          </table:table-cell>
          <table:table-cell office:value-type="float" office:value="-149.649705409732" calcext:value-type="float">
            <text:p>-149.649705409732</text:p>
          </table:table-cell>
          <table:table-cell office:value-type="float" office:value="149.649705409732" calcext:value-type="float">
            <text:p>149.649705409732</text:p>
          </table:table-cell>
          <table:table-cell office:value-type="float" office:value="1173.39670945105" calcext:value-type="float">
            <text:p>1173.39670945105</text:p>
          </table:table-cell>
          <table:table-cell office:value-type="float" office:value="1485.47326976617" calcext:value-type="float">
            <text:p>1485.47326976617</text:p>
          </table:table-cell>
          <table:table-cell office:value-type="float" office:value="1407.45412968739" calcext:value-type="float">
            <text:p>1407.45412968739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743.98514851485" calcext:value-type="float">
            <text:p>1743.98514851485</text:p>
          </table:table-cell>
          <table:table-cell office:value-type="float" office:value="1760.30514851485" calcext:value-type="float">
            <text:p>1760.30514851485</text:p>
          </table:table-cell>
          <table:table-cell office:value-type="float" office:value="0.514117480050422" calcext:value-type="float">
            <text:p>0.514117480050422</text:p>
          </table:table-cell>
          <table:table-cell office:value-type="float" office:value="0.514516255660885" calcext:value-type="float">
            <text:p>0.514516255660885</text:p>
          </table:table-cell>
          <table:table-cell office:value-type="float" office:value="0.132274010314316" calcext:value-type="float">
            <text:p>0.132274010314316</text:p>
          </table:table-cell>
          <table:table-cell office:value-type="float" office:value="0.132327548750312" calcext:value-type="float">
            <text:p>0.132327548750312</text:p>
          </table:table-cell>
          <table:table-cell office:value-type="float" office:value="-94.1924050824695" calcext:value-type="float">
            <text:p>-94.1924050824695</text:p>
          </table:table-cell>
          <table:table-cell office:value-type="float" office:value="94.1924050824695" calcext:value-type="float">
            <text:p>94.1924050824695</text:p>
          </table:table-cell>
          <table:table-cell office:value-type="float" office:value="1649.79274343238" calcext:value-type="float">
            <text:p>1649.79274343238</text:p>
          </table:table-cell>
          <table:table-cell office:value-type="float" office:value="1854.4575505057" calcext:value-type="float">
            <text:p>1854.4575505057</text:p>
          </table:table-cell>
          <table:table-cell office:value-type="float" office:value="1803.29134873737" calcext:value-type="float">
            <text:p>1803.29134873737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16.56" calcext:value-type="float">
            <text:p>-16.56</text:p>
          </table:table-cell>
          <table:table-cell office:value-type="float" office:value="16.56" calcext:value-type="float">
            <text:p>16.56</text:p>
          </table:table-cell>
          <table:table-cell office:value-type="float" office:value="1588.12574257426" calcext:value-type="float">
            <text:p>1588.12574257426</text:p>
          </table:table-cell>
          <table:table-cell office:value-type="float" office:value="1621.24574257426" calcext:value-type="float">
            <text:p>1621.24574257426</text:p>
          </table:table-cell>
          <table:table-cell office:value-type="float" office:value="0.511184612786351" calcext:value-type="float">
            <text:p>0.511184612786351</text:p>
          </table:table-cell>
          <table:table-cell office:value-type="float" office:value="0.511695018279865" calcext:value-type="float">
            <text:p>0.511695018279865</text:p>
          </table:table-cell>
          <table:table-cell office:value-type="float" office:value="0.128147052551904" calcext:value-type="float">
            <text:p>0.128147052551904</text:p>
          </table:table-cell>
          <table:table-cell office:value-type="float" office:value="0.128280933400418" calcext:value-type="float">
            <text:p>0.128280933400418</text:p>
          </table:table-cell>
          <table:table-cell office:value-type="float" office:value="-91.1756169289227" calcext:value-type="float">
            <text:p>-91.1756169289227</text:p>
          </table:table-cell>
          <table:table-cell office:value-type="float" office:value="91.1756169289227" calcext:value-type="float">
            <text:p>91.1756169289227</text:p>
          </table:table-cell>
          <table:table-cell office:value-type="float" office:value="1497.0497033512" calcext:value-type="float">
            <text:p>1497.0497033512</text:p>
          </table:table-cell>
          <table:table-cell office:value-type="float" office:value="1712.42135950318" calcext:value-type="float">
            <text:p>1712.42135950318</text:p>
          </table:table-cell>
          <table:table-cell office:value-type="float" office:value="1658.57844546519" calcext:value-type="float">
            <text:p>1658.57844546519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9.14285714285714" calcext:value-type="float">
            <text:p>-9.14285714285714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1002.05128205128" calcext:value-type="float">
            <text:p>1002.05128205128</text:p>
          </table:table-cell>
          <table:table-cell office:value-type="float" office:value="1020.336996337" calcext:value-type="float">
            <text:p>1020.336996337</text:p>
          </table:table-cell>
          <table:table-cell office:value-type="float" office:value="0.502794606468688" calcext:value-type="float">
            <text:p>0.502794606468688</text:p>
          </table:table-cell>
          <table:table-cell office:value-type="float" office:value="0.503256528375389" calcext:value-type="float">
            <text:p>0.503256528375389</text:p>
          </table:table-cell>
          <table:table-cell office:value-type="float" office:value="0.113688870590012" calcext:value-type="float">
            <text:p>0.113688870590012</text:p>
          </table:table-cell>
          <table:table-cell office:value-type="float" office:value="0.113779443512894" calcext:value-type="float">
            <text:p>0.113779443512894</text:p>
          </table:table-cell>
          <table:table-cell office:value-type="float" office:value="-80.4707815329515" calcext:value-type="float">
            <text:p>-80.4707815329515</text:p>
          </table:table-cell>
          <table:table-cell office:value-type="float" office:value="80.4707815329515" calcext:value-type="float">
            <text:p>80.4707815329515</text:p>
          </table:table-cell>
          <table:table-cell office:value-type="float" office:value="921.646871170818" calcext:value-type="float">
            <text:p>921.646871170818</text:p>
          </table:table-cell>
          <table:table-cell office:value-type="float" office:value="1100.80777786995" calcext:value-type="float">
            <text:p>1100.80777786995</text:p>
          </table:table-cell>
          <table:table-cell office:value-type="float" office:value="1056.01755119517" calcext:value-type="float">
            <text:p>1056.0175511951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7.04" calcext:value-type="float">
            <text:p>-7.04</text:p>
          </table:table-cell>
          <table:table-cell office:value-type="float" office:value="7.04" calcext:value-type="float">
            <text:p>7.04</text:p>
          </table:table-cell>
          <table:table-cell office:value-type="float" office:value="2182.22455445545" calcext:value-type="float">
            <text:p>2182.22455445545</text:p>
          </table:table-cell>
          <table:table-cell office:value-type="float" office:value="2196.30455445545" calcext:value-type="float">
            <text:p>2196.30455445545</text:p>
          </table:table-cell>
          <table:table-cell office:value-type="float" office:value="0.53470567366503" calcext:value-type="float">
            <text:p>0.53470567366503</text:p>
          </table:table-cell>
          <table:table-cell office:value-type="float" office:value="0.535804695045491" calcext:value-type="float">
            <text:p>0.535804695045491</text:p>
          </table:table-cell>
          <table:table-cell office:value-type="float" office:value="0.162113937195415" calcext:value-type="float">
            <text:p>0.162113937195415</text:p>
          </table:table-cell>
          <table:table-cell office:value-type="float" office:value="0.162494630220181" calcext:value-type="float">
            <text:p>0.162494630220181</text:p>
          </table:table-cell>
          <table:table-cell office:value-type="float" office:value="-117.160670223536" calcext:value-type="float">
            <text:p>-117.160670223536</text:p>
          </table:table-cell>
          <table:table-cell office:value-type="float" office:value="117.160670223536" calcext:value-type="float">
            <text:p>117.160670223536</text:p>
          </table:table-cell>
          <table:table-cell office:value-type="float" office:value="2065.35957389405" calcext:value-type="float">
            <text:p>2065.35957389405</text:p>
          </table:table-cell>
          <table:table-cell office:value-type="float" office:value="2313.46522467898" calcext:value-type="float">
            <text:p>2313.46522467898</text:p>
          </table:table-cell>
          <table:table-cell office:value-type="float" office:value="2251.43881198275" calcext:value-type="float">
            <text:p>2251.43881198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08:59:17.310818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7-07T10:44:02.047034219</dc:date>
    <meta:editing-duration>PT27M27S</meta:editing-duration>
    <meta:editing-cycles>4</meta:editing-cycles>
    <meta:document-statistic meta:table-count="5" meta:cell-count="1317" meta:object-count="0"/>
  </office:meta>
</office:document-meta>
</file>