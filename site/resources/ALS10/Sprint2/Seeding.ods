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0.8827in"/>
    </style:style>
    <style:style style:name="co9" style:family="table-column">
      <style:table-column-properties fo:break-before="auto" style:column-width="0.9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bottom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39">
      <style:table-cell-properties fo:border="0.74pt solid #000000"/>
    </style:style>
    <style:style style:name="ce10" style:family="table-cell" style:parent-style-name="Default" style:data-style-name="N139">
      <style:table-cell-properties fo:background-color="#eeeeee" fo:border="0.74pt solid #000000"/>
    </style:style>
    <style:style style:name="ce11" style:family="table-cell" style:parent-style-name="Default" style:data-style-name="N11">
      <style:table-cell-properties fo:border="0.74pt solid #000000"/>
    </style:style>
    <style:style style:name="ce12" style:family="table-cell" style:parent-style-name="Default" style:data-style-name="N11">
      <style:table-cell-properties fo:background-color="#eeeeee" fo:border="0.74pt solid #000000"/>
    </style:style>
    <style:style style:name="ce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eeeeee" fo:border="0.74pt solid #000000"/>
    </style:style>
    <style:style style:name="ce27" style:family="table-cell" style:parent-style-name="Default" style:data-style-name="N139">
      <style:table-cell-properties fo:border="0.74pt solid #000000"/>
    </style:style>
    <style:style style:name="ce28" style:family="table-cell" style:parent-style-name="Default" style:data-style-name="N139">
      <style:table-cell-properties fo:background-color="#eeeeee" fo:border="0.74pt solid #000000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style-name="ce2"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ubin2000</text:p>
          </table:table-cell>
          <table:table-cell table:style-name="ce5" office:value-type="string" calcext:value-type="string">
            <text:p>RAY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Jskillz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string" calcext:value-type="string">
            <text:p>xRav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onzoWall#3510</text:p>
          </table:table-cell>
          <table:table-cell table:style-name="ce5" office:value-type="string" calcext:value-type="string">
            <text:p>Empir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agWarrior</text:p>
          </table:table-cell>
          <table:table-cell table:style-name="ce5" office:value-type="string" calcext:value-type="string">
            <text:p>Metalmani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Superhero55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jeomar</text:p>
          </table:table-cell>
          <table:table-cell table:style-name="ce5" office:value-type="string" calcext:value-type="string">
            <text:p>daniferdoser_9643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string" calcext:value-type="string">
            <text:p>PlushWerewolf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anana Philosopher</text:p>
          </table:table-cell>
          <table:table-cell table:style-name="ce5" office:value-type="string" calcext:value-type="string">
            <text:p>Manzanit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qab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5" office:value-type="string" calcext:value-type="string">
            <text:p>Jasuni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kiritastrich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RAY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string" calcext:value-type="string">
            <text:p>LonzoWall#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5" office:value-type="string" calcext:value-type="string">
            <text:p>Benderandchill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mpire</text:p>
          </table:table-cell>
          <table:table-cell table:style-name="ce5" office:value-type="string" calcext:value-type="string">
            <text:p>Chipmun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5" office:value-type="string" calcext:value-type="string">
            <text:p>Flying Mous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string" calcext:value-type="string">
            <text:p>daniferdoser_96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Banana Philosophe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string" calcext:value-type="string">
            <text:p>PlushWerewolf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zioauditore0109</text:p>
          </table:table-cell>
          <table:table-cell table:style-name="ce5" office:value-type="string" calcext:value-type="string">
            <text:p>Forteraige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string" calcext:value-type="string">
            <text:p>jasou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qablo</text:p>
          </table:table-cell>
          <table:table-cell table:style-name="ce5" office:value-type="string" calcext:value-type="string">
            <text:p>Jasuni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maxymczech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string" calcext:value-type="string">
            <text:p>Hyd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kiritastrich </text:p>
          </table:table-cell>
          <table:table-cell table:style-name="ce5" office:value-type="string" calcext:value-type="string">
            <text:p>Qeets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string" calcext:value-type="string">
            <text:p>JagWarr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Empir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enderandchill </text:p>
          </table:table-cell>
          <table:table-cell table:style-name="ce5" office:value-type="string" calcext:value-type="string">
            <text:p>Metalmani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Superhero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NOPE1585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aje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Ezioauditore010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ferdoser_96434</text:p>
          </table:table-cell>
          <table:table-cell office:value-type="string" calcext:value-type="string">
            <text:p>Manzan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anana Philosopher</text:p>
          </table:table-cell>
          <table:table-cell table:style-name="ce5" office:value-type="string" calcext:value-type="string">
            <text:p>qabl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string" calcext:value-type="string">
            <text:p>jasou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5" office:value-type="string" calcext:value-type="string">
            <text:p>Jasuni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aubin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kiritastrich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Jskil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LonzoWall#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Qeetsa</text:p>
          </table:table-cell>
          <table:table-cell table:style-name="ce5" office:value-type="string" calcext:value-type="string">
            <text:p>Benderandchill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mpire</text:p>
          </table:table-cell>
          <table:table-cell table:style-name="ce5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Flying Mous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string" calcext:value-type="string">
            <text:p>Ezioauditore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daniferdoser_9643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string" calcext:value-type="string">
            <text:p>Banana Philosop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lushWerewolf </text:p>
          </table:table-cell>
          <table:table-cell table:style-name="ce5" office:value-type="string" calcext:value-type="string">
            <text:p>qabl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jasou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anzanito</text:p>
          </table:table-cell>
          <table:table-cell table:style-name="ce5" office:value-type="string" calcext:value-type="string">
            <text:p>Jasuni </text:p>
          </table:table-cell>
          <table:table-cell table:style-name="ce7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1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19" office:value-type="string" calcext:value-type="string" table:number-columns-spanned="2" table:number-rows-spanned="1">
            <text:p>Game Rate</text:p>
          </table:table-cell>
          <table:covered-table-cell table:style-name="ce19"/>
          <table:table-cell table:style-name="ce19" office:value-type="string" calcext:value-type="string">
            <text:p>Behavior Factor</text:p>
          </table:table-cell>
          <table:table-cell table:style-name="ce19" office:value-type="string" calcext:value-type="string">
            <text:p>Tournament Elo</text:p>
          </table:table-cell>
          <table:table-cell table:style-name="ce19" office:value-type="string" calcext:value-type="string">
            <text:p>Ranked Elo</text:p>
          </table:table-cell>
          <table:table-cell table:style-name="ce19" office:value-type="string" calcext:value-type="string">
            <text:p>Final Elo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League</text:p>
          </table:table-cell>
          <table:table-cell table:style-name="ce19" office:value-type="string" calcext:value-type="string">
            <text:p>Ranked</text:p>
          </table:table-cell>
          <table:table-cell table:style-name="ce19" office:value-type="string" calcext:value-type="string">
            <text:p>Tournament Fraction</text:p>
          </table:table-cell>
          <table:table-cell table:style-name="ce19" office:value-type="string" calcext:value-type="string">
            <text:p>Historical</text:p>
          </table:table-cell>
          <table:table-cell table:style-name="ce19" office:value-type="string" calcext:value-type="string">
            <text:p>Point 3/4</text:p>
          </table:table-cell>
          <table:table-cell table:style-name="ce19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7.42105263157895" calcext:value-type="float">
            <text:p>7.4</text:p>
          </table:table-cell>
          <table:table-cell office:value-type="float" office:value="219.384615384615" calcext:value-type="float">
            <text:p>219.4</text:p>
          </table:table-cell>
          <table:table-cell office:value-type="percentage" office:value="0.000069769526320651" calcext:value-type="percentage">
            <text:p>0.01%</text:p>
          </table:table-cell>
          <table:table-cell office:value-type="float" office:value="2379.62940437608" calcext:value-type="float">
            <text:p>2379.6</text:p>
          </table:table-cell>
          <table:table-cell office:value-type="float" office:value="2233.24523165075" calcext:value-type="float">
            <text:p>2233.2</text:p>
          </table:table-cell>
          <table:table-cell office:value-type="float" office:value="2233.25544480514" calcext:value-type="float">
            <text:p>2233.3</text:p>
          </table:table-cell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10" office:value-type="float" office:value="7.88235294117647" calcext:value-type="float">
            <text:p>7.9</text:p>
          </table:table-cell>
          <table:table-cell table:style-name="ce10" office:value-type="float" office:value="13.1538461538462" calcext:value-type="float">
            <text:p>13.2</text:p>
          </table:table-cell>
          <table:table-cell table:style-name="ce12" office:value-type="percentage" office:value="0.601046476637838" calcext:value-type="percentage">
            <text:p>60.10%</text:p>
          </table:table-cell>
          <table:table-cell table:style-name="ce10" office:value-type="float" office:value="2111.41903708838" calcext:value-type="float">
            <text:p>2111.4</text:p>
          </table:table-cell>
          <table:table-cell table:style-name="ce10" office:value-type="float" office:value="2076.51560509792" calcext:value-type="float">
            <text:p>2076.5</text:p>
          </table:table-cell>
          <table:table-cell table:style-name="ce10" office:value-type="float" office:value="2097.49418991835" calcext:value-type="float">
            <text:p>2097.5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5" calcext:value-type="float">
            <text:p>5.0</text:p>
          </table:table-cell>
          <table:table-cell office:value-type="float" office:value="64" calcext:value-type="float">
            <text:p>64.0</text:p>
          </table:table-cell>
          <table:table-cell office:value-type="percentage" office:value="0.00432988138225154" calcext:value-type="percentage">
            <text:p>0.43%</text:p>
          </table:table-cell>
          <table:table-cell office:value-type="float" office:value="2135.08083500966" calcext:value-type="float">
            <text:p>2135.1</text:p>
          </table:table-cell>
          <table:table-cell office:value-type="float" office:value="2082.66963621995" calcext:value-type="float">
            <text:p>2082.7</text:p>
          </table:table-cell>
          <table:table-cell office:value-type="float" office:value="2082.89657049381" calcext:value-type="float">
            <text:p>2082.9</text:p>
          </table:table-cell>
        </table:table-row>
        <table:table-row table:style-name="ro1">
          <table:table-cell table:style-name="ce5" office:value-type="string" calcext:value-type="string">
            <text:p>kiritastrich 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300.5" calcext:value-type="float">
            <text:p>300.5</text:p>
          </table:table-cell>
          <table:table-cell table:style-name="ce12" office:value-type="percentage" office:value="0.00000208747898289285" calcext:value-type="percentage">
            <text:p>0.00%</text:p>
          </table:table-cell>
          <table:table-cell table:style-name="ce10" office:value-type="float" office:value="1968.15391395971" calcext:value-type="float">
            <text:p>1968.2</text:p>
          </table:table-cell>
          <table:table-cell table:style-name="ce10" office:value-type="float" office:value="1971.35452963133" calcext:value-type="float">
            <text:p>1971.4</text:p>
          </table:table-cell>
          <table:table-cell table:style-name="ce10" office:value-type="float" office:value="1971.35452295012" calcext:value-type="float">
            <text:p>1971.4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5" calcext:value-type="float">
            <text:p>5.0</text:p>
          </table:table-cell>
          <table:table-cell office:value-type="float" office:value="66.5" calcext:value-type="float">
            <text:p>66.5</text:p>
          </table:table-cell>
          <table:table-cell office:value-type="percentage" office:value="0.00368779021878562" calcext:value-type="percentage">
            <text:p>0.37%</text:p>
          </table:table-cell>
          <table:table-cell office:value-type="float" office:value="1703.5732097631" calcext:value-type="float">
            <text:p>1703.6</text:p>
          </table:table-cell>
          <table:table-cell office:value-type="float" office:value="1850.12835039391" calcext:value-type="float">
            <text:p>1850.1</text:p>
          </table:table-cell>
          <table:table-cell office:value-type="float" office:value="1849.58788577978" calcext:value-type="float">
            <text:p>1849.6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10" office:value-type="float" office:value="6.41666666666667" calcext:value-type="float">
            <text:p>6.4</text:p>
          </table:table-cell>
          <table:table-cell table:style-name="ce10" office:value-type="float" office:value="211.153846153846" calcext:value-type="float">
            <text:p>211.2</text:p>
          </table:table-cell>
          <table:table-cell table:style-name="ce12" office:value-type="percentage" office:value="0.0000373866112163279" calcext:value-type="percentage">
            <text:p>0.00%</text:p>
          </table:table-cell>
          <table:table-cell table:style-name="ce10" office:value-type="float" office:value="1934.88574752342" calcext:value-type="float">
            <text:p>1934.9</text:p>
          </table:table-cell>
          <table:table-cell table:style-name="ce10" office:value-type="float" office:value="1830.37950882485" calcext:value-type="float">
            <text:p>1830.4</text:p>
          </table:table-cell>
          <table:table-cell table:style-name="ce10" office:value-type="float" office:value="1830.38341595896" calcext:value-type="float">
            <text:p>1830.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7.78947368421053" calcext:value-type="float">
            <text:p>7.8</text:p>
          </table:table-cell>
          <table:table-cell office:value-type="float" office:value="12.2307692307692" calcext:value-type="float">
            <text:p>12.2</text:p>
          </table:table-cell>
          <table:table-cell office:value-type="percentage" office:value="0.633896449736576" calcext:value-type="percentage">
            <text:p>63.39%</text:p>
          </table:table-cell>
          <table:table-cell office:value-type="float" office:value="1832.62746015431" calcext:value-type="float">
            <text:p>1832.6</text:p>
          </table:table-cell>
          <table:table-cell office:value-type="float" office:value="1775.30122248101" calcext:value-type="float">
            <text:p>1775.3</text:p>
          </table:table-cell>
          <table:table-cell office:value-type="float" office:value="1811.64012101887" calcext:value-type="float">
            <text:p>1811.6</text:p>
          </table:table-cell>
        </table:table-row>
        <table:table-row table:style-name="ro1">
          <table:table-cell table:style-name="ce5" office:value-type="string" calcext:value-type="string">
            <text:p>Qeetsa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30.9" calcext:value-type="float">
            <text:p>30.9</text:p>
          </table:table-cell>
          <table:table-cell table:style-name="ce12" office:value-type="percentage" office:value="0.090508011773094" calcext:value-type="percentage">
            <text:p>9.05%</text:p>
          </table:table-cell>
          <table:table-cell table:style-name="ce10" office:value-type="float" office:value="1867.45021402369" calcext:value-type="float">
            <text:p>1867.5</text:p>
          </table:table-cell>
          <table:table-cell table:style-name="ce10" office:value-type="float" office:value="1801.3950875753" calcext:value-type="float">
            <text:p>1801.4</text:p>
          </table:table-cell>
          <table:table-cell table:style-name="ce10" office:value-type="float" office:value="1807.37360573756" calcext:value-type="float">
            <text:p>1807.4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6.83333333333333" calcext:value-type="float">
            <text:p>6.8</text:p>
          </table:table-cell>
          <table:table-cell office:value-type="float" office:value="32.1428571428571" calcext:value-type="float">
            <text:p>32.1</text:p>
          </table:table-cell>
          <table:table-cell office:value-type="percentage" office:value="0.113239526008565" calcext:value-type="percentage">
            <text:p>11.32%</text:p>
          </table:table-cell>
          <table:table-cell office:value-type="float" office:value="1870.26488627365" calcext:value-type="float">
            <text:p>1870.3</text:p>
          </table:table-cell>
          <table:table-cell office:value-type="float" office:value="1784.26438016488" calcext:value-type="float">
            <text:p>1784.3</text:p>
          </table:table-cell>
          <table:table-cell office:value-type="float" office:value="1794.00303671313" calcext:value-type="float">
            <text:p>1794.0</text:p>
          </table:table-cell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10" office:value-type="float" office:value="6.72727272727273" calcext:value-type="float">
            <text:p>6.7</text:p>
          </table:table-cell>
          <table:table-cell table:style-name="ce10" office:value-type="float" office:value="98.0833333333333" calcext:value-type="float">
            <text:p>98.1</text:p>
          </table:table-cell>
          <table:table-cell table:style-name="ce12" office:value-type="percentage" office:value="0.00248219111988046" calcext:value-type="percentage">
            <text:p>0.25%</text:p>
          </table:table-cell>
          <table:table-cell table:style-name="ce10" office:value-type="float" office:value="1720.46165269119" calcext:value-type="float">
            <text:p>1720.5</text:p>
          </table:table-cell>
          <table:table-cell table:style-name="ce10" office:value-type="float" office:value="1787.11244489223" calcext:value-type="float">
            <text:p>1787.1</text:p>
          </table:table-cell>
          <table:table-cell table:style-name="ce10" office:value-type="float" office:value="1786.9470048877" calcext:value-type="float">
            <text:p>1786.9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float" office:value="4" calcext:value-type="float">
            <text:p>4.0</text:p>
          </table:table-cell>
          <table:table-cell office:value-type="float" office:value="16" calcext:value-type="float">
            <text:p>16.0</text:p>
          </table:table-cell>
          <table:table-cell office:value-type="percentage" office:value="0.163479355128738" calcext:value-type="percentage">
            <text:p>16.35%</text:p>
          </table:table-cell>
          <table:table-cell office:value-type="float" office:value="1714.19191216483" calcext:value-type="float">
            <text:p>1714.2</text:p>
          </table:table-cell>
          <table:table-cell office:value-type="float" office:value="1695.36647972819" calcext:value-type="float">
            <text:p>1695.4</text:p>
          </table:table-cell>
          <table:table-cell office:value-type="float" office:value="1698.44404928295" calcext:value-type="float">
            <text:p>1698.4</text:p>
          </table:table-cell>
        </table:table-row>
        <table:table-row table:style-name="ro1">
          <table:table-cell table:style-name="ce5" office:value-type="string" calcext:value-type="string">
            <text:p>Benderandchill </text:p>
          </table:table-cell>
          <table:table-cell table:style-name="ce10" office:value-type="float" office:value="8.125" calcext:value-type="float">
            <text:p>8.1</text:p>
          </table:table-cell>
          <table:table-cell table:style-name="ce10" office:value-type="float" office:value="426.222222222222" calcext:value-type="float">
            <text:p>426.2</text:p>
          </table:table-cell>
          <table:table-cell table:style-name="ce12" office:value-type="percentage" office:value="0.00000191824749379288" calcext:value-type="percentage">
            <text:p>0.00%</text:p>
          </table:table-cell>
          <table:table-cell table:style-name="ce10" office:value-type="float" office:value="1741.63977736646" calcext:value-type="float">
            <text:p>1741.6</text:p>
          </table:table-cell>
          <table:table-cell table:style-name="ce10" office:value-type="float" office:value="1698.35866319516" calcext:value-type="float">
            <text:p>1698.4</text:p>
          </table:table-cell>
          <table:table-cell table:style-name="ce10" office:value-type="float" office:value="1698.35874621904" calcext:value-type="float">
            <text:p>1698.4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7.5" calcext:value-type="float">
            <text:p>7.5</text:p>
          </table:table-cell>
          <table:table-cell office:value-type="float" office:value="34.8" calcext:value-type="float">
            <text:p>34.8</text:p>
          </table:table-cell>
          <table:table-cell office:value-type="percentage" office:value="0.116992595186353" calcext:value-type="percentage">
            <text:p>11.70%</text:p>
          </table:table-cell>
          <table:table-cell office:value-type="float" office:value="1684.0927712676" calcext:value-type="float">
            <text:p>1684.1</text:p>
          </table:table-cell>
          <table:table-cell office:value-type="float" office:value="1693.16530970664" calcext:value-type="float">
            <text:p>1693.2</text:p>
          </table:table-cell>
          <table:table-cell office:value-type="float" office:value="1692.10388988973" calcext:value-type="float">
            <text:p>1692.1</text:p>
          </table:table-cell>
        </table:table-row>
        <table:table-row table:style-name="ro1">
          <table:table-cell table:style-name="ce5" office:value-type="string" calcext:value-type="string">
            <text:p>Empire</text:p>
          </table:table-cell>
          <table:table-cell table:style-name="ce10" office:value-type="float" office:value="7.16666666666667" calcext:value-type="float">
            <text:p>7.2</text:p>
          </table:table-cell>
          <table:table-cell table:style-name="ce10" office:value-type="float" office:value="34.8" calcext:value-type="float">
            <text:p>34.8</text:p>
          </table:table-cell>
          <table:table-cell table:style-name="ce12" office:value-type="percentage" office:value="0.104839383489183" calcext:value-type="percentage">
            <text:p>10.48%</text:p>
          </table:table-cell>
          <table:table-cell table:style-name="ce10" office:value-type="float" office:value="1725.27922584985" calcext:value-type="float">
            <text:p>1725.3</text:p>
          </table:table-cell>
          <table:table-cell table:style-name="ce10" office:value-type="float" office:value="1686.2256922764" calcext:value-type="float">
            <text:p>1686.2</text:p>
          </table:table-cell>
          <table:table-cell table:style-name="ce10" office:value-type="float" office:value="1690.32004065931" calcext:value-type="float">
            <text:p>1690.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6.83333333333333" calcext:value-type="float">
            <text:p>6.8</text:p>
          </table:table-cell>
          <table:table-cell office:value-type="float" office:value="16.0769230769231" calcext:value-type="float">
            <text:p>16.1</text:p>
          </table:table-cell>
          <table:table-cell office:value-type="percentage" office:value="0.40916096994181" calcext:value-type="percentage">
            <text:p>40.92%</text:p>
          </table:table-cell>
          <table:table-cell office:value-type="float" office:value="1676.19244045034" calcext:value-type="float">
            <text:p>1676.2</text:p>
          </table:table-cell>
          <table:table-cell office:value-type="float" office:value="1697.55937201942" calcext:value-type="float">
            <text:p>1697.6</text:p>
          </table:table-cell>
          <table:table-cell office:value-type="float" office:value="1688.81685757394" calcext:value-type="float">
            <text:p>1688.8</text:p>
          </table:table-cell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10" office:value-type="float" office:value="6.91666666666667" calcext:value-type="float">
            <text:p>6.9</text:p>
          </table:table-cell>
          <table:table-cell table:style-name="ce10" office:value-type="float" office:value="80.1" calcext:value-type="float">
            <text:p>80.1</text:p>
          </table:table-cell>
          <table:table-cell table:style-name="ce12" office:value-type="percentage" office:value="0.00650246272926874" calcext:value-type="percentage">
            <text:p>0.65%</text:p>
          </table:table-cell>
          <table:table-cell table:style-name="ce10" office:value-type="float" office:value="1637.60478008912" calcext:value-type="float">
            <text:p>1637.6</text:p>
          </table:table-cell>
          <table:table-cell table:style-name="ce10" office:value-type="float" office:value="1642.30048999431" calcext:value-type="float">
            <text:p>1642.3</text:p>
          </table:table-cell>
          <table:table-cell table:style-name="ce10" office:value-type="float" office:value="1642.26995631566" calcext:value-type="float">
            <text:p>1642.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7.76470588235294" calcext:value-type="float">
            <text:p>7.8</text:p>
          </table:table-cell>
          <table:table-cell office:value-type="float" office:value="29.8333333333333" calcext:value-type="float">
            <text:p>29.8</text:p>
          </table:table-cell>
          <table:table-cell office:value-type="percentage" office:value="0.177918486404182" calcext:value-type="percentage">
            <text:p>17.79%</text:p>
          </table:table-cell>
          <table:table-cell office:value-type="float" office:value="1654.35003436181" calcext:value-type="float">
            <text:p>1654.4</text:p>
          </table:table-cell>
          <table:table-cell office:value-type="float" office:value="1624.14750386543" calcext:value-type="float">
            <text:p>1624.1</text:p>
          </table:table-cell>
          <table:table-cell office:value-type="float" office:value="1629.52109237692" calcext:value-type="float">
            <text:p>1629.5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10" office:value-type="float" office:value="7.66666666666667" calcext:value-type="float">
            <text:p>7.7</text:p>
          </table:table-cell>
          <table:table-cell table:style-name="ce10" office:value-type="float" office:value="9.14285714285714" calcext:value-type="float">
            <text:p>9.1</text:p>
          </table:table-cell>
          <table:table-cell table:style-name="ce12" office:value-type="percentage" office:value="0.767680005035315" calcext:value-type="percentage">
            <text:p>76.77%</text:p>
          </table:table-cell>
          <table:table-cell table:style-name="ce10" office:value-type="float" office:value="1613.13751584408" calcext:value-type="float">
            <text:p>1613.1</text:p>
          </table:table-cell>
          <table:table-cell table:style-name="ce10" office:value-type="float" office:value="1562.47405472861" calcext:value-type="float">
            <text:p>1562.5</text:p>
          </table:table-cell>
          <table:table-cell table:style-name="ce10" office:value-type="float" office:value="1601.36738081284" calcext:value-type="float">
            <text:p>1601.4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7.64705882352941" calcext:value-type="float">
            <text:p>7.6</text:p>
          </table:table-cell>
          <table:table-cell office:value-type="float" office:value="7.05555555555556" calcext:value-type="float">
            <text:p>7.1</text:p>
          </table:table-cell>
          <table:table-cell office:value-type="percentage" office:value="0.863046742453388" calcext:value-type="percentage">
            <text:p>86.30%</text:p>
          </table:table-cell>
          <table:table-cell office:value-type="float" office:value="1587.00636228293" calcext:value-type="float">
            <text:p>1587.0</text:p>
          </table:table-cell>
          <table:table-cell office:value-type="float" office:value="1597.10852722131" calcext:value-type="float">
            <text:p>1597.1</text:p>
          </table:table-cell>
          <table:table-cell office:value-type="float" office:value="1588.38988667952" calcext:value-type="float">
            <text:p>1588.4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10" office:value-type="float" office:value="7.42857142857143" calcext:value-type="float">
            <text:p>7.4</text:p>
          </table:table-cell>
          <table:table-cell table:style-name="ce10" office:value-type="float" office:value="5" calcext:value-type="float">
            <text:p>5.0</text:p>
          </table:table-cell>
          <table:table-cell table:style-name="ce12" office:value-type="percentage" office:value="0.93823678085383" calcext:value-type="percentage">
            <text:p>93.82%</text:p>
          </table:table-cell>
          <table:table-cell table:style-name="ce10" office:value-type="float" office:value="1557.74275956666" calcext:value-type="float">
            <text:p>1557.7</text:p>
          </table:table-cell>
          <table:table-cell table:style-name="ce10" office:value-type="float" office:value="1578.47301438757" calcext:value-type="float">
            <text:p>1578.5</text:p>
          </table:table-cell>
          <table:table-cell table:style-name="ce10" office:value-type="float" office:value="1559.02312683812" calcext:value-type="float">
            <text:p>1559.0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6.8" calcext:value-type="float">
            <text:p>6.8</text:p>
          </table:table-cell>
          <table:table-cell office:value-type="float" office:value="195.333333333333" calcext:value-type="float">
            <text:p>195.3</text:p>
          </table:table-cell>
          <table:table-cell office:value-type="percentage" office:value="0.0000821595687985344" calcext:value-type="percentage">
            <text:p>0.01%</text:p>
          </table:table-cell>
          <table:table-cell office:value-type="float" office:value="1525.32425320251" calcext:value-type="float">
            <text:p>1525.3</text:p>
          </table:table-cell>
          <table:table-cell office:value-type="float" office:value="1512.44949704498" calcext:value-type="float">
            <text:p>1512.4</text:p>
          </table:table-cell>
          <table:table-cell office:value-type="float" office:value="1512.45055482939" calcext:value-type="float">
            <text:p>1512.5</text:p>
          </table:table-cell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10" office:value-type="float" office:value="7.53846153846154" calcext:value-type="float">
            <text:p>7.5</text:p>
          </table:table-cell>
          <table:table-cell table:style-name="ce10" office:value-type="float" office:value="17" calcext:value-type="float">
            <text:p>17.0</text:p>
          </table:table-cell>
          <table:table-cell table:style-name="ce12" office:value-type="percentage" office:value="0.432594106800654" calcext:value-type="percentage">
            <text:p>43.26%</text:p>
          </table:table-cell>
          <table:table-cell table:style-name="ce10" office:value-type="float" office:value="1484.95889042749" calcext:value-type="float">
            <text:p>1485.0</text:p>
          </table:table-cell>
          <table:table-cell table:style-name="ce10" office:value-type="float" office:value="1528.18750802876" calcext:value-type="float">
            <text:p>1528.2</text:p>
          </table:table-cell>
          <table:table-cell table:style-name="ce10" office:value-type="float" office:value="1509.48706280931" calcext:value-type="float">
            <text:p>1509.5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6.5" calcext:value-type="float">
            <text:p>6.5</text:p>
          </table:table-cell>
          <table:table-cell office:value-type="float" office:value="27" calcext:value-type="float">
            <text:p>27.0</text:p>
          </table:table-cell>
          <table:table-cell office:value-type="percentage" office:value="0.150654344315063" calcext:value-type="percentage">
            <text:p>15.07%</text:p>
          </table:table-cell>
          <table:table-cell office:value-type="float" office:value="1431.91742302963" calcext:value-type="float">
            <text:p>1431.9</text:p>
          </table:table-cell>
          <table:table-cell office:value-type="float" office:value="1421.31421833488" calcext:value-type="float">
            <text:p>1421.3</text:p>
          </table:table-cell>
          <table:table-cell office:value-type="float" office:value="1422.9116371858" calcext:value-type="float">
            <text:p>1422.9</text:p>
          </table:table-cell>
        </table:table-row>
        <table:table-row table:style-name="ro1">
          <table:table-cell table:style-name="ce5" office:value-type="string" calcext:value-type="string">
            <text:p>Ezioauditore0109</text:p>
          </table:table-cell>
          <table:table-cell table:style-name="ce10" office:value-type="float" office:value="6.33333333333333" calcext:value-type="float">
            <text:p>6.3</text:p>
          </table:table-cell>
          <table:table-cell table:style-name="ce10" office:value-type="float" office:value="4.28571428571429" calcext:value-type="float">
            <text:p>4.3</text:p>
          </table:table-cell>
          <table:table-cell table:style-name="ce12" office:value-type="percentage" office:value="0.937308383463525" calcext:value-type="percentage">
            <text:p>93.73%</text:p>
          </table:table-cell>
          <table:table-cell table:style-name="ce10" office:value-type="float" office:value="1427.45789003302" calcext:value-type="float">
            <text:p>1427.5</text:p>
          </table:table-cell>
          <table:table-cell table:style-name="ce10" office:value-type="float" office:value="1257.56796229946" calcext:value-type="float">
            <text:p>1257.6</text:p>
          </table:table-cell>
          <table:table-cell table:style-name="ce10" office:value-type="float" office:value="1416.80721583013" calcext:value-type="float">
            <text:p>1416.8</text:p>
          </table:table-cell>
        </table:table-row>
        <table:table-row table:style-name="ro1">
          <table:table-cell office:value-type="string" calcext:value-type="string">
            <text:p>daniferdoser_96434</text:p>
          </table:table-cell>
          <table:table-cell office:value-type="float" office:value="4" calcext:value-type="float">
            <text:p>4.0</text:p>
          </table:table-cell>
          <table:table-cell office:value-type="float" office:value="28.5" calcext:value-type="float">
            <text:p>28.5</text:p>
          </table:table-cell>
          <table:table-cell office:value-type="percentage" office:value="0.0361912035996717" calcext:value-type="percentage">
            <text:p>3.62%</text:p>
          </table:table-cell>
          <table:table-cell office:value-type="float" office:value="1364.88659564" calcext:value-type="float">
            <text:p>1364.9</text:p>
          </table:table-cell>
          <table:table-cell office:value-type="float" office:value="1417.40742364048" calcext:value-type="float">
            <text:p>1417.4</text:p>
          </table:table-cell>
          <table:table-cell office:value-type="float" office:value="1415.50663166109" calcext:value-type="float">
            <text:p>1415.5</text:p>
          </table:table-cell>
        </table:table-row>
        <table:table-row table:style-name="ro1">
          <table:table-cell table:style-name="ce5" office:value-type="string" calcext:value-type="string">
            <text:p>Banana Philosopher</text:p>
          </table:table-cell>
          <table:table-cell table:style-name="ce10" office:value-type="float" office:value="7" calcext:value-type="float">
            <text:p>7.0</text:p>
          </table:table-cell>
          <table:table-cell table:style-name="ce10" office:value-type="float" office:value="56.2" calcext:value-type="float">
            <text:p>56.2</text:p>
          </table:table-cell>
          <table:table-cell table:style-name="ce12" office:value-type="percentage" office:value="0.0246748418477171" calcext:value-type="percentage">
            <text:p>2.47%</text:p>
          </table:table-cell>
          <table:table-cell table:style-name="ce10" office:value-type="float" office:value="1415.62785480209" calcext:value-type="float">
            <text:p>1415.6</text:p>
          </table:table-cell>
          <table:table-cell table:style-name="ce10" office:value-type="float" office:value="1369.55697215854" calcext:value-type="float">
            <text:p>1369.6</text:p>
          </table:table-cell>
          <table:table-cell table:style-name="ce10" office:value-type="float" office:value="1370.69376390155" calcext:value-type="float">
            <text:p>1370.7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7.4" calcext:value-type="float">
            <text:p>7.4</text:p>
          </table:table-cell>
          <table:table-cell office:value-type="float" office:value="30.1818181818182" calcext:value-type="float">
            <text:p>30.2</text:p>
          </table:table-cell>
          <table:table-cell office:value-type="percentage" office:value="0.156778535980401" calcext:value-type="percentage">
            <text:p>15.68%</text:p>
          </table:table-cell>
          <table:table-cell office:value-type="float" office:value="1318.33972400361" calcext:value-type="float">
            <text:p>1318.3</text:p>
          </table:table-cell>
          <table:table-cell office:value-type="float" office:value="1346.45522279342" calcext:value-type="float">
            <text:p>1346.5</text:p>
          </table:table-cell>
          <table:table-cell office:value-type="float" office:value="1342.0473160548" calcext:value-type="float">
            <text:p>1342.0</text:p>
          </table:table-cell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10" office:value-type="float" office:value="8.33333333333333" calcext:value-type="float">
            <text:p>8.3</text:p>
          </table:table-cell>
          <table:table-cell table:style-name="ce10" office:value-type="float" office:value="36.7142857142857" calcext:value-type="float">
            <text:p>36.7</text:p>
          </table:table-cell>
          <table:table-cell table:style-name="ce12" office:value-type="percentage" office:value="0.132022275082798" calcext:value-type="percentage">
            <text:p>13.20%</text:p>
          </table:table-cell>
          <table:table-cell table:style-name="ce10" office:value-type="float" office:value="1292.97060881258" calcext:value-type="float">
            <text:p>1293.0</text:p>
          </table:table-cell>
          <table:table-cell table:style-name="ce10" office:value-type="float" office:value="1339.23812889582" calcext:value-type="float">
            <text:p>1339.2</text:p>
          </table:table-cell>
          <table:table-cell table:style-name="ce10" office:value-type="float" office:value="1333.12978563199" calcext:value-type="float">
            <text:p>1333.1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float" office:value="4" calcext:value-type="float">
            <text:p>4.0</text:p>
          </table:table-cell>
          <table:table-cell office:value-type="float" office:value="20.5" calcext:value-type="float">
            <text:p>20.5</text:p>
          </table:table-cell>
          <table:table-cell office:value-type="percentage" office:value="0.0916354108037155" calcext:value-type="percentage">
            <text:p>9.16%</text:p>
          </table:table-cell>
          <table:table-cell office:value-type="float" office:value="1205.05534790388" calcext:value-type="float">
            <text:p>1205.1</text:p>
          </table:table-cell>
          <table:table-cell office:value-type="float" office:value="1195.09557979519" calcext:value-type="float">
            <text:p>1195.1</text:p>
          </table:table-cell>
          <table:table-cell office:value-type="float" office:value="1196.00824723734" calcext:value-type="float">
            <text:p>1196.0</text:p>
          </table:table-cell>
        </table:table-row>
        <table:table-row table:style-name="ro1">
          <table:table-cell table:style-name="ce5" office:value-type="string" calcext:value-type="string">
            <text:p>qablo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0" calcext:value-type="float">
            <text:p>0.0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0" office:value-type="float" office:value="1183.92798610558" calcext:value-type="float">
            <text:p>1183.9</text:p>
          </table:table-cell>
          <table:table-cell table:style-name="ce10" office:value-type="float" office:value="1215.76351338497" calcext:value-type="float">
            <text:p>1215.8</text:p>
          </table:table-cell>
          <table:table-cell table:style-name="ce10" office:value-type="float" office:value="1183.92798610558" calcext:value-type="float">
            <text:p>1183.9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7.71428571428571" calcext:value-type="float">
            <text:p>7.7</text:p>
          </table:table-cell>
          <table:table-cell office:value-type="float" office:value="25.75" calcext:value-type="float">
            <text:p>25.8</text:p>
          </table:table-cell>
          <table:table-cell office:value-type="percentage" office:value="0.234416437585826" calcext:value-type="percentage">
            <text:p>23.44%</text:p>
          </table:table-cell>
          <table:table-cell office:value-type="float" office:value="1226.42260658059" calcext:value-type="float">
            <text:p>1226.4</text:p>
          </table:table-cell>
          <table:table-cell office:value-type="float" office:value="1137.86118991603" calcext:value-type="float">
            <text:p>1137.9</text:p>
          </table:table-cell>
          <table:table-cell office:value-type="float" office:value="1158.62144171809" calcext:value-type="float">
            <text:p>1158.6</text:p>
          </table:table-cell>
        </table:table-row>
        <table:table-row table:style-name="ro1">
          <table:table-cell table:style-name="ce5" office:value-type="string" calcext:value-type="string">
            <text:p>Jasuni </text:p>
          </table:table-cell>
          <table:table-cell table:style-name="ce10" office:value-type="float" office:value="8.75" calcext:value-type="float">
            <text:p>8.8</text:p>
          </table:table-cell>
          <table:table-cell table:style-name="ce10" office:value-type="float" office:value="4.46153846153846" calcext:value-type="float">
            <text:p>4.5</text:p>
          </table:table-cell>
          <table:table-cell table:style-name="ce12" office:value-type="percentage" office:value="0.973370559378375" calcext:value-type="percentage">
            <text:p>97.34%</text:p>
          </table:table-cell>
          <table:table-cell table:style-name="ce10" office:value-type="float" office:value="1069.02542667348" calcext:value-type="float">
            <text:p>1069.0</text:p>
          </table:table-cell>
          <table:table-cell table:style-name="ce10" office:value-type="float" office:value="1056.00847564318" calcext:value-type="float">
            <text:p>1056.0</text:p>
          </table:table-cell>
          <table:table-cell table:style-name="ce10" office:value-type="float" office:value="1068.67879254894" calcext:value-type="float">
            <text:p>1068.7</text:p>
          </table:table-cell>
        </table:table-row>
      </table:table>
      <table:table table:name="Player_Summary" table:style-name="ta1">
        <table:table-column table:style-name="co1" table:default-cell-style-name="ce25"/>
        <table:table-column table:style-name="co3" table:number-columns-repeated="4" table:default-cell-style-name="ce25"/>
        <table:table-column table:style-name="co3" table:number-columns-repeated="2" table:default-cell-style-name="ce27"/>
        <table:table-row table:style-name="ro3">
          <table:table-cell table:style-name="ce24" office:value-type="string" calcext:value-type="string">
            <text:p>Discord Name</text:p>
          </table:table-cell>
          <table:table-cell table:style-name="ce24" office:value-type="string" calcext:value-type="string">
            <text:p>Visible Accounts</text:p>
          </table:table-cell>
          <table:table-cell table:style-name="ce24" office:value-type="string" calcext:value-type="string">
            <text:p>Smurf Accounts</text:p>
          </table:table-cell>
          <table:table-cell table:style-name="ce24" office:value-type="string" calcext:value-type="string">
            <text:p>Visible Games</text:p>
          </table:table-cell>
          <table:table-cell table:style-name="ce24" office:value-type="string" calcext:value-type="string">
            <text:p>Full Games</text:p>
          </table:table-cell>
          <table:table-cell table:style-name="ce24" office:value-type="string" calcext:value-type="string">
            <text:p>Elo Concealment</text:p>
          </table:table-cell>
          <table:table-cell table:style-name="ce24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0" calcext:value-type="float">
            <text:p>0.0</text:p>
          </table:table-cell>
          <table:table-cell office:value-type="float" office:value="1369.55697215854" calcext:value-type="float">
            <text:p>1369.6</text:p>
          </table:table-cell>
        </table:table-row>
        <table:table-row table:style-name="ro1">
          <table:table-cell table:style-name="ce26" office:value-type="string" calcext:value-type="string">
            <text:p>__oladushek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906" calcext:value-type="float">
            <text:p>906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2076.51560509792" calcext:value-type="float">
            <text:p>2076.5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0" calcext:value-type="float">
            <text:p>0.0</text:p>
          </table:table-cell>
          <table:table-cell office:value-type="float" office:value="1137.86118991603" calcext:value-type="float">
            <text:p>1137.9</text:p>
          </table:table-cell>
        </table:table-row>
        <table:table-row table:style-name="ro1">
          <table:table-cell table:style-name="ce26" office:value-type="string" calcext:value-type="string">
            <text:p>LoreDek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438" calcext:value-type="float">
            <text:p>438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697.55937201942" calcext:value-type="float">
            <text:p>1697.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0" calcext:value-type="float">
            <text:p>0.0</text:p>
          </table:table-cell>
          <table:table-cell office:value-type="float" office:value="1528.18750802876" calcext:value-type="float">
            <text:p>1528.2</text:p>
          </table:table-cell>
        </table:table-row>
        <table:table-row table:style-name="ro1">
          <table:table-cell table:style-name="ce26" office:value-type="string" calcext:value-type="string">
            <text:p>Manzanito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485" calcext:value-type="float">
            <text:p>485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195.09557979519" calcext:value-type="float">
            <text:p>1195.1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office:value-type="float" office:value="0" calcext:value-type="float">
            <text:p>0.0</text:p>
          </table:table-cell>
          <table:table-cell office:value-type="float" office:value="1512.44949704498" calcext:value-type="float">
            <text:p>1512.4</text:p>
          </table:table-cell>
        </table:table-row>
        <table:table-row table:style-name="ro1">
          <table:table-cell table:style-name="ce26" office:value-type="string" calcext:value-type="string">
            <text:p>daniferdoser_964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738" calcext:value-type="float">
            <text:p>738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417.40742364048" calcext:value-type="float">
            <text:p>1417.4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0" calcext:value-type="float">
            <text:p>0.0</text:p>
          </table:table-cell>
          <table:table-cell office:value-type="float" office:value="1339.23812889582" calcext:value-type="float">
            <text:p>1339.2</text:p>
          </table:table-cell>
        </table:table-row>
        <table:table-row table:style-name="ro1">
          <table:table-cell table:style-name="ce26" office:value-type="string" calcext:value-type="string">
            <text:p>Hydu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309" calcext:value-type="float">
            <text:p>309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775.30122248101" calcext:value-type="float">
            <text:p>1775.3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" calcext:value-type="float">
            <text:p>0.0</text:p>
          </table:table-cell>
          <table:table-cell office:value-type="float" office:value="1257.56796229946" calcext:value-type="float">
            <text:p>1257.6</text:p>
          </table:table-cell>
        </table:table-row>
        <table:table-row table:style-name="ro1">
          <table:table-cell table:style-name="ce26" office:value-type="string" calcext:value-type="string">
            <text:p>Benderandchill 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4548" calcext:value-type="float">
            <text:p>4548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698.35866319516" calcext:value-type="float">
            <text:p>1698.4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27" calcext:value-type="float">
            <text:p>5927</text:p>
          </table:table-cell>
          <table:table-cell office:value-type="float" office:value="0" calcext:value-type="float">
            <text:p>0.0</text:p>
          </table:table-cell>
          <table:table-cell office:value-type="float" office:value="1971.35452963133" calcext:value-type="float">
            <text:p>1971.4</text:p>
          </table:table-cell>
        </table:table-row>
        <table:table-row table:style-name="ro1">
          <table:table-cell table:style-name="ce26" office:value-type="string" calcext:value-type="string">
            <text:p>Flying Mous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304" calcext:value-type="float">
            <text:p>304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578.47301438757" calcext:value-type="float">
            <text:p>1578.5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0" calcext:value-type="float">
            <text:p>0.0</text:p>
          </table:table-cell>
          <table:table-cell office:value-type="float" office:value="1597.10852722131" calcext:value-type="float">
            <text:p>1597.1</text:p>
          </table:table-cell>
        </table:table-row>
        <table:table-row table:style-name="ro1">
          <table:table-cell table:style-name="ce26" office:value-type="string" calcext:value-type="string">
            <text:p>aubin20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27" calcext:value-type="float">
            <text:p>1527</text:p>
          </table:table-cell>
          <table:table-cell table:style-name="ce26" office:value-type="float" office:value="1562" calcext:value-type="float">
            <text:p>1562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2082.66963621995" calcext:value-type="float">
            <text:p>2082.7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8" calcext:value-type="float">
            <text:p>1208</text:p>
          </table:table-cell>
          <table:table-cell office:value-type="float" office:value="0" calcext:value-type="float">
            <text:p>0.0</text:p>
          </table:table-cell>
          <table:table-cell office:value-type="float" office:value="1693.16530970664" calcext:value-type="float">
            <text:p>1693.2</text:p>
          </table:table-cell>
        </table:table-row>
        <table:table-row table:style-name="ro1">
          <table:table-cell table:style-name="ce26" office:value-type="string" calcext:value-type="string">
            <text:p>Chipmunk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133" calcext:value-type="float">
            <text:p>1133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562.47405472861" calcext:value-type="float">
            <text:p>1562.5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48" calcext:value-type="float">
            <text:p>4548</text:p>
          </table:table-cell>
          <table:table-cell office:value-type="float" office:value="0" calcext:value-type="float">
            <text:p>0.0</text:p>
          </table:table-cell>
          <table:table-cell office:value-type="float" office:value="1830.37950882485" calcext:value-type="float">
            <text:p>1830.4</text:p>
          </table:table-cell>
        </table:table-row>
        <table:table-row table:style-name="ro1">
          <table:table-cell table:style-name="ce26" office:value-type="string" calcext:value-type="string">
            <text:p>Empir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3316" calcext:value-type="float">
            <text:p>3316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686.2256922764" calcext:value-type="float">
            <text:p>1686.2</text:p>
          </table:table-cell>
        </table:table-row>
        <table:table-row table:style-name="ro1">
          <table:table-cell office:value-type="string" calcext:value-type="string">
            <text:p>qab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4" calcext:value-type="float">
            <text:p>1394</text:p>
          </table:table-cell>
          <table:table-cell office:value-type="float" office:value="0" calcext:value-type="float">
            <text:p>0.0</text:p>
          </table:table-cell>
          <table:table-cell office:value-type="float" office:value="1215.76351338497" calcext:value-type="float">
            <text:p>1215.8</text:p>
          </table:table-cell>
        </table:table-row>
        <table:table-row table:style-name="ro1">
          <table:table-cell table:style-name="ce26" office:value-type="string" calcext:value-type="string">
            <text:p>The Otter On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396" calcext:value-type="float">
            <text:p>1396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624.14750386543" calcext:value-type="float">
            <text:p>1624.1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0" calcext:value-type="float">
            <text:p>0.0</text:p>
          </table:table-cell>
          <table:table-cell office:value-type="float" office:value="1346.45522279342" calcext:value-type="float">
            <text:p>1346.5</text:p>
          </table:table-cell>
        </table:table-row>
        <table:table-row table:style-name="ro1">
          <table:table-cell table:style-name="ce26" office:value-type="string" calcext:value-type="string">
            <text:p>Jskillz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484" calcext:value-type="float">
            <text:p>484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784.26438016488" calcext:value-type="float">
            <text:p>1784.3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4" calcext:value-type="float">
            <text:p>2504</text:p>
          </table:table-cell>
          <table:table-cell office:value-type="float" office:value="0" calcext:value-type="float">
            <text:p>0.0</text:p>
          </table:table-cell>
          <table:table-cell office:value-type="float" office:value="1787.11244489223" calcext:value-type="float">
            <text:p>1787.1</text:p>
          </table:table-cell>
        </table:table-row>
        <table:table-row table:style-name="ro1">
          <table:table-cell table:style-name="ce26" office:value-type="string" calcext:value-type="string">
            <text:p>ajeoma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2972" calcext:value-type="float">
            <text:p>2972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421.31421833488" calcext:value-type="float">
            <text:p>1421.3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21" calcext:value-type="float">
            <text:p>721</text:p>
          </table:table-cell>
          <table:table-cell office:value-type="float" office:value="0" calcext:value-type="float">
            <text:p>0.0</text:p>
          </table:table-cell>
          <table:table-cell office:value-type="float" office:value="1801.3950875753" calcext:value-type="float">
            <text:p>1801.4</text:p>
          </table:table-cell>
        </table:table-row>
        <table:table-row table:style-name="ro1">
          <table:table-cell table:style-name="ce26" office:value-type="string" calcext:value-type="string">
            <text:p>Metalmania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180" calcext:value-type="float">
            <text:p>1180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642.30048999431" calcext:value-type="float">
            <text:p>1642.3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1067" calcext:value-type="float">
            <text:p>1067</text:p>
          </table:table-cell>
          <table:table-cell office:value-type="float" office:value="-0.62094805971924" calcext:value-type="float">
            <text:p>-0.6</text:p>
          </table:table-cell>
          <table:table-cell office:value-type="float" office:value="1850.12835039391" calcext:value-type="float">
            <text:p>1850.1</text:p>
          </table:table-cell>
        </table:table-row>
        <table:table-row table:style-name="ro1">
          <table:table-cell table:style-name="ce26" office:value-type="string" calcext:value-type="string">
            <text:p>Jasuni 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77" calcext:value-type="float">
            <text:p>77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1056.00847564318" calcext:value-type="float">
            <text:p>1056.0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16" calcext:value-type="float">
            <text:p>2116</text:p>
          </table:table-cell>
          <table:table-cell office:value-type="float" office:value="0" calcext:value-type="float">
            <text:p>0.0</text:p>
          </table:table-cell>
          <table:table-cell office:value-type="float" office:value="1695.36647972819" calcext:value-type="float">
            <text:p>1695.4</text:p>
          </table:table-cell>
        </table:table-row>
        <table:table-row table:style-name="ro1">
          <table:table-cell table:style-name="ce26" office:value-type="string" calcext:value-type="string">
            <text:p>wisenati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7479" calcext:value-type="float">
            <text:p>7479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2233.24523165075" calcext:value-type="float">
            <text:p>2233.2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6.48" calcext:value-type="float">
            <text:p>-6.48</text:p>
          </table:table-cell>
          <table:table-cell office:value-type="float" office:value="6.48" calcext:value-type="float">
            <text:p>6.48</text:p>
          </table:table-cell>
          <table:table-cell office:value-type="float" office:value="1305.08316831683" calcext:value-type="float">
            <text:p>1305.08316831683</text:p>
          </table:table-cell>
          <table:table-cell office:value-type="float" office:value="1318.04316831683" calcext:value-type="float">
            <text:p>1318.04316831683</text:p>
          </table:table-cell>
          <table:table-cell office:value-type="float" office:value="0.507856267467784" calcext:value-type="float">
            <text:p>0.507856267467784</text:p>
          </table:table-cell>
          <table:table-cell office:value-type="float" office:value="0.507999784443923" calcext:value-type="float">
            <text:p>0.507999784443923</text:p>
          </table:table-cell>
          <table:table-cell office:value-type="float" office:value="0.152552293906772" calcext:value-type="float">
            <text:p>0.152552293906772</text:p>
          </table:table-cell>
          <table:table-cell office:value-type="float" office:value="0.152567310733229" calcext:value-type="float">
            <text:p>0.152567310733229</text:p>
          </table:table-cell>
          <table:table-cell office:value-type="float" office:value="-109.501854713698" calcext:value-type="float">
            <text:p>-109.501854713698</text:p>
          </table:table-cell>
          <table:table-cell office:value-type="float" office:value="109.501854713698" calcext:value-type="float">
            <text:p>109.501854713698</text:p>
          </table:table-cell>
          <table:table-cell office:value-type="float" office:value="1195.59281954256" calcext:value-type="float">
            <text:p>1195.59281954256</text:p>
          </table:table-cell>
          <table:table-cell office:value-type="float" office:value="1427.54502303053" calcext:value-type="float">
            <text:p>1427.54502303053</text:p>
          </table:table-cell>
          <table:table-cell office:value-type="float" office:value="1369.55697215854" calcext:value-type="float">
            <text:p>1369.55697215854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8.84" calcext:value-type="float">
            <text:p>-8.84</text:p>
          </table:table-cell>
          <table:table-cell office:value-type="float" office:value="8.84" calcext:value-type="float">
            <text:p>8.84</text:p>
          </table:table-cell>
          <table:table-cell office:value-type="float" office:value="2003.39207920792" calcext:value-type="float">
            <text:p>2003.39207920792</text:p>
          </table:table-cell>
          <table:table-cell office:value-type="float" office:value="2021.07207920792" calcext:value-type="float">
            <text:p>2021.07207920792</text:p>
          </table:table-cell>
          <table:table-cell office:value-type="float" office:value="0.522922436967391" calcext:value-type="float">
            <text:p>0.522922436967391</text:p>
          </table:table-cell>
          <table:table-cell office:value-type="float" office:value="0.52380480260306" calcext:value-type="float">
            <text:p>0.52380480260306</text:p>
          </table:table-cell>
          <table:table-cell office:value-type="float" office:value="0.165309355311345" calcext:value-type="float">
            <text:p>0.165309355311345</text:p>
          </table:table-cell>
          <table:table-cell office:value-type="float" office:value="0.165629755637723" calcext:value-type="float">
            <text:p>0.165629755637723</text:p>
          </table:table-cell>
          <table:table-cell office:value-type="float" office:value="-119.602042157914" calcext:value-type="float">
            <text:p>-119.602042157914</text:p>
          </table:table-cell>
          <table:table-cell office:value-type="float" office:value="119.602042157914" calcext:value-type="float">
            <text:p>119.602042157914</text:p>
          </table:table-cell>
          <table:table-cell office:value-type="float" office:value="1884.04005629419" calcext:value-type="float">
            <text:p>1884.04005629419</text:p>
          </table:table-cell>
          <table:table-cell office:value-type="float" office:value="2140.67412136583" calcext:value-type="float">
            <text:p>2140.67412136583</text:p>
          </table:table-cell>
          <table:table-cell office:value-type="float" office:value="2076.51560509792" calcext:value-type="float">
            <text:p>2076.51560509792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082.71544554455" calcext:value-type="float">
            <text:p>1082.71544554455</text:p>
          </table:table-cell>
          <table:table-cell office:value-type="float" office:value="1099.83544554455" calcext:value-type="float">
            <text:p>1099.83544554455</text:p>
          </table:table-cell>
          <table:table-cell office:value-type="float" office:value="0.504533903342789" calcext:value-type="float">
            <text:p>0.504533903342789</text:p>
          </table:table-cell>
          <table:table-cell office:value-type="float" office:value="0.50487387783" calcext:value-type="float">
            <text:p>0.50487387783</text:p>
          </table:table-cell>
          <table:table-cell office:value-type="float" office:value="0.119351904633832" calcext:value-type="float">
            <text:p>0.119351904633832</text:p>
          </table:table-cell>
          <table:table-cell office:value-type="float" office:value="0.119393487753147" calcext:value-type="float">
            <text:p>0.119393487753147</text:p>
          </table:table-cell>
          <table:table-cell office:value-type="float" office:value="-84.5961680158669" calcext:value-type="float">
            <text:p>-84.5961680158669</text:p>
          </table:table-cell>
          <table:table-cell office:value-type="float" office:value="84.596168015867" calcext:value-type="float">
            <text:p>84.596168015867</text:p>
          </table:table-cell>
          <table:table-cell office:value-type="float" office:value="998.149918982875" calcext:value-type="float">
            <text:p>998.149918982875</text:p>
          </table:table-cell>
          <table:table-cell office:value-type="float" office:value="1184.43161356042" calcext:value-type="float">
            <text:p>1184.43161356042</text:p>
          </table:table-cell>
          <table:table-cell office:value-type="float" office:value="1137.86118991603" calcext:value-type="float">
            <text:p>1137.8611899160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637.47900990099" calcext:value-type="float">
            <text:p>1637.47900990099</text:p>
          </table:table-cell>
          <table:table-cell office:value-type="float" office:value="1652.91900990099" calcext:value-type="float">
            <text:p>1652.91900990099</text:p>
          </table:table-cell>
          <table:table-cell office:value-type="float" office:value="0.511824055281495" calcext:value-type="float">
            <text:p>0.511824055281495</text:p>
          </table:table-cell>
          <table:table-cell office:value-type="float" office:value="0.512084904067281" calcext:value-type="float">
            <text:p>0.512084904067281</text:p>
          </table:table-cell>
          <table:table-cell office:value-type="float" office:value="0.135940838690148" calcext:value-type="float">
            <text:p>0.135940838690148</text:p>
          </table:table-cell>
          <table:table-cell office:value-type="float" office:value="0.136032191848285" calcext:value-type="float">
            <text:p>0.136032191848285</text:p>
          </table:table-cell>
          <table:table-cell office:value-type="float" office:value="-96.9664496289933" calcext:value-type="float">
            <text:p>-96.9664496289933</text:p>
          </table:table-cell>
          <table:table-cell office:value-type="float" office:value="96.9664496289933" calcext:value-type="float">
            <text:p>96.9664496289933</text:p>
          </table:table-cell>
          <table:table-cell office:value-type="float" office:value="1540.58110948774" calcext:value-type="float">
            <text:p>1540.58110948774</text:p>
          </table:table-cell>
          <table:table-cell office:value-type="float" office:value="1749.88545952998" calcext:value-type="float">
            <text:p>1749.88545952998</text:p>
          </table:table-cell>
          <table:table-cell office:value-type="float" office:value="1697.55937201942" calcext:value-type="float">
            <text:p>1697.5593720194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469.42297029703" calcext:value-type="float">
            <text:p>1469.42297029703</text:p>
          </table:table-cell>
          <table:table-cell office:value-type="float" office:value="1489.74297029703" calcext:value-type="float">
            <text:p>1489.74297029703</text:p>
          </table:table-cell>
          <table:table-cell office:value-type="float" office:value="0.509599156100576" calcext:value-type="float">
            <text:p>0.509599156100576</text:p>
          </table:table-cell>
          <table:table-cell office:value-type="float" office:value="0.509825267756935" calcext:value-type="float">
            <text:p>0.509825267756935</text:p>
          </table:table-cell>
          <table:table-cell office:value-type="float" office:value="0.122739148627617" calcext:value-type="float">
            <text:p>0.122739148627617</text:p>
          </table:table-cell>
          <table:table-cell office:value-type="float" office:value="0.122784306139493" calcext:value-type="float">
            <text:p>0.122784306139493</text:p>
          </table:table-cell>
          <table:table-cell office:value-type="float" office:value="-87.0991627961603" calcext:value-type="float">
            <text:p>-87.0991627961603</text:p>
          </table:table-cell>
          <table:table-cell office:value-type="float" office:value="87.0991627961603" calcext:value-type="float">
            <text:p>87.0991627961603</text:p>
          </table:table-cell>
          <table:table-cell office:value-type="float" office:value="1382.32380750087" calcext:value-type="float">
            <text:p>1382.32380750087</text:p>
          </table:table-cell>
          <table:table-cell office:value-type="float" office:value="1576.80874153806" calcext:value-type="float">
            <text:p>1576.80874153806</text:p>
          </table:table-cell>
          <table:table-cell office:value-type="float" office:value="1528.18750802876" calcext:value-type="float">
            <text:p>1528.18750802876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124.47643564356" calcext:value-type="float">
            <text:p>1124.47643564356</text:p>
          </table:table-cell>
          <table:table-cell office:value-type="float" office:value="1139.91643564356" calcext:value-type="float">
            <text:p>1139.91643564356</text:p>
          </table:table-cell>
          <table:table-cell office:value-type="float" office:value="0.505332142128399" calcext:value-type="float">
            <text:p>0.505332142128399</text:p>
          </table:table-cell>
          <table:table-cell office:value-type="float" office:value="0.505601828789481" calcext:value-type="float">
            <text:p>0.505601828789481</text:p>
          </table:table-cell>
          <table:table-cell office:value-type="float" office:value="0.163578448396669" calcext:value-type="float">
            <text:p>0.163578448396669</text:p>
          </table:table-cell>
          <table:table-cell office:value-type="float" office:value="0.163642616555876" calcext:value-type="float">
            <text:p>0.163642616555876</text:p>
          </table:table-cell>
          <table:table-cell office:value-type="float" office:value="-118.053320620976" calcext:value-type="float">
            <text:p>-118.053320620976</text:p>
          </table:table-cell>
          <table:table-cell office:value-type="float" office:value="118.053320620976" calcext:value-type="float">
            <text:p>118.053320620976</text:p>
          </table:table-cell>
          <table:table-cell office:value-type="float" office:value="1006.47305038714" calcext:value-type="float">
            <text:p>1006.47305038714</text:p>
          </table:table-cell>
          <table:table-cell office:value-type="float" office:value="1257.96975626454" calcext:value-type="float">
            <text:p>1257.96975626454</text:p>
          </table:table-cell>
          <table:table-cell office:value-type="float" office:value="1195.09557979519" calcext:value-type="float">
            <text:p>1195.09557979519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-8.24" calcext:value-type="float">
            <text:p>-8.24</text:p>
          </table:table-cell>
          <table:table-cell office:value-type="float" office:value="8.24" calcext:value-type="float">
            <text:p>8.24</text:p>
          </table:table-cell>
          <table:table-cell office:value-type="float" office:value="1447.97227722772" calcext:value-type="float">
            <text:p>1447.97227722772</text:p>
          </table:table-cell>
          <table:table-cell office:value-type="float" office:value="1464.45227722772" calcext:value-type="float">
            <text:p>1464.45227722772</text:p>
          </table:table-cell>
          <table:table-cell office:value-type="float" office:value="0.509367412078697" calcext:value-type="float">
            <text:p>0.509367412078697</text:p>
          </table:table-cell>
          <table:table-cell office:value-type="float" office:value="0.509544890986733" calcext:value-type="float">
            <text:p>0.509544890986733</text:p>
          </table:table-cell>
          <table:table-cell office:value-type="float" office:value="0.145559255437158" calcext:value-type="float">
            <text:p>0.145559255437158</text:p>
          </table:table-cell>
          <table:table-cell office:value-type="float" office:value="0.145627262166372" calcext:value-type="float">
            <text:p>0.145627262166372</text:p>
          </table:table-cell>
          <table:table-cell office:value-type="float" office:value="-104.208622666599" calcext:value-type="float">
            <text:p>-104.208622666599</text:p>
          </table:table-cell>
          <table:table-cell office:value-type="float" office:value="104.208622666599" calcext:value-type="float">
            <text:p>104.208622666599</text:p>
          </table:table-cell>
          <table:table-cell office:value-type="float" office:value="1343.81528849695" calcext:value-type="float">
            <text:p>1343.81528849695</text:p>
          </table:table-cell>
          <table:table-cell office:value-type="float" office:value="1568.66089989432" calcext:value-type="float">
            <text:p>1568.66089989432</text:p>
          </table:table-cell>
          <table:table-cell office:value-type="float" office:value="1512.44949704498" calcext:value-type="float">
            <text:p>1512.44949704498</text:p>
          </table:table-cell>
        </table:table-row>
        <table:table-row table:style-name="ro1">
          <table:table-cell office:value-type="string" calcext:value-type="string">
            <text:p>daniferdoser_96434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346.94356435644" calcext:value-type="float">
            <text:p>1346.94356435644</text:p>
          </table:table-cell>
          <table:table-cell office:value-type="float" office:value="1364.06356435644" calcext:value-type="float">
            <text:p>1364.06356435644</text:p>
          </table:table-cell>
          <table:table-cell office:value-type="float" office:value="0.508310968492591" calcext:value-type="float">
            <text:p>0.508310968492591</text:p>
          </table:table-cell>
          <table:table-cell office:value-type="float" office:value="0.508491143906111" calcext:value-type="float">
            <text:p>0.508491143906111</text:p>
          </table:table-cell>
          <table:table-cell office:value-type="float" office:value="0.159932234683675" calcext:value-type="float">
            <text:p>0.159932234683675</text:p>
          </table:table-cell>
          <table:table-cell office:value-type="float" office:value="0.159996109579438" calcext:value-type="float">
            <text:p>0.159996109579438</text:p>
          </table:table-cell>
          <table:table-cell office:value-type="float" office:value="-115.222995664559" calcext:value-type="float">
            <text:p>-115.222995664559</text:p>
          </table:table-cell>
          <table:table-cell office:value-type="float" office:value="115.222995664559" calcext:value-type="float">
            <text:p>115.222995664559</text:p>
          </table:table-cell>
          <table:table-cell office:value-type="float" office:value="1231.77001449892" calcext:value-type="float">
            <text:p>1231.77001449892</text:p>
          </table:table-cell>
          <table:table-cell office:value-type="float" office:value="1479.28656002099" calcext:value-type="float">
            <text:p>1479.28656002099</text:p>
          </table:table-cell>
          <table:table-cell office:value-type="float" office:value="1417.40742364048" calcext:value-type="float">
            <text:p>1417.4074236404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266.72831683168" calcext:value-type="float">
            <text:p>1266.72831683168</text:p>
          </table:table-cell>
          <table:table-cell office:value-type="float" office:value="1285.36831683168" calcext:value-type="float">
            <text:p>1285.36831683168</text:p>
          </table:table-cell>
          <table:table-cell office:value-type="float" office:value="0.507411681617072" calcext:value-type="float">
            <text:p>0.507411681617072</text:p>
          </table:table-cell>
          <table:table-cell office:value-type="float" office:value="0.507631865513897" calcext:value-type="float">
            <text:p>0.507631865513897</text:p>
          </table:table-cell>
          <table:table-cell office:value-type="float" office:value="0.162382707308985" calcext:value-type="float">
            <text:p>0.162382707308985</text:p>
          </table:table-cell>
          <table:table-cell office:value-type="float" office:value="0.162419001357912" calcext:value-type="float">
            <text:p>0.162419001357912</text:p>
          </table:table-cell>
          <table:table-cell office:value-type="float" office:value="-117.101915206662" calcext:value-type="float">
            <text:p>-117.101915206662</text:p>
          </table:table-cell>
          <table:table-cell office:value-type="float" office:value="117.101915206662" calcext:value-type="float">
            <text:p>117.101915206662</text:p>
          </table:table-cell>
          <table:table-cell office:value-type="float" office:value="1149.62640162502" calcext:value-type="float">
            <text:p>1149.62640162502</text:p>
          </table:table-cell>
          <table:table-cell office:value-type="float" office:value="1402.44203798608" calcext:value-type="float">
            <text:p>1402.44203798608</text:p>
          </table:table-cell>
          <table:table-cell office:value-type="float" office:value="1339.23812889582" calcext:value-type="float">
            <text:p>1339.23812889582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9.16" calcext:value-type="float">
            <text:p>-9.16</text:p>
          </table:table-cell>
          <table:table-cell office:value-type="float" office:value="9.16" calcext:value-type="float">
            <text:p>9.16</text:p>
          </table:table-cell>
          <table:table-cell office:value-type="float" office:value="1703.02792079208" calcext:value-type="float">
            <text:p>1703.02792079208</text:p>
          </table:table-cell>
          <table:table-cell office:value-type="float" office:value="1721.34792079208" calcext:value-type="float">
            <text:p>1721.34792079208</text:p>
          </table:table-cell>
          <table:table-cell office:value-type="float" office:value="0.513023356806101" calcext:value-type="float">
            <text:p>0.513023356806101</text:p>
          </table:table-cell>
          <table:table-cell office:value-type="float" office:value="0.513405158282159" calcext:value-type="float">
            <text:p>0.513405158282159</text:p>
          </table:table-cell>
          <table:table-cell office:value-type="float" office:value="0.162481926402673" calcext:value-type="float">
            <text:p>0.162481926402673</text:p>
          </table:table-cell>
          <table:table-cell office:value-type="float" office:value="0.162698639328405" calcext:value-type="float">
            <text:p>0.162698639328405</text:p>
          </table:table-cell>
          <table:table-cell office:value-type="float" office:value="-117.319194300927" calcext:value-type="float">
            <text:p>-117.319194300927</text:p>
          </table:table-cell>
          <table:table-cell office:value-type="float" office:value="117.319194300927" calcext:value-type="float">
            <text:p>117.319194300927</text:p>
          </table:table-cell>
          <table:table-cell office:value-type="float" office:value="1585.70872649115" calcext:value-type="float">
            <text:p>1585.70872649115</text:p>
          </table:table-cell>
          <table:table-cell office:value-type="float" office:value="1838.4987211443" calcext:value-type="float">
            <text:p>1838.4987211443</text:p>
          </table:table-cell>
          <table:table-cell office:value-type="float" office:value="1775.30122248101" calcext:value-type="float">
            <text:p>1775.30122248101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20.48" calcext:value-type="float">
            <text:p>-20.48</text:p>
          </table:table-cell>
          <table:table-cell office:value-type="float" office:value="20.48" calcext:value-type="float">
            <text:p>20.48</text:p>
          </table:table-cell>
          <table:table-cell office:value-type="float" office:value="1166.64316831683" calcext:value-type="float">
            <text:p>1166.64316831683</text:p>
          </table:table-cell>
          <table:table-cell office:value-type="float" office:value="1207.60316831683" calcext:value-type="float">
            <text:p>1207.60316831683</text:p>
          </table:table-cell>
          <table:table-cell office:value-type="float" office:value="0.506039457069687" calcext:value-type="float">
            <text:p>0.506039457069687</text:p>
          </table:table-cell>
          <table:table-cell office:value-type="float" office:value="0.506646255966582" calcext:value-type="float">
            <text:p>0.506646255966582</text:p>
          </table:table-cell>
          <table:table-cell office:value-type="float" office:value="0.166370497471489" calcext:value-type="float">
            <text:p>0.166370497471489</text:p>
          </table:table-cell>
          <table:table-cell office:value-type="float" office:value="0.166565902371874" calcext:value-type="float">
            <text:p>0.166565902371874</text:p>
          </table:table-cell>
          <table:table-cell office:value-type="float" office:value="-120.33323373777" calcext:value-type="float">
            <text:p>-120.33323373777</text:p>
          </table:table-cell>
          <table:table-cell office:value-type="float" office:value="120.33323373777" calcext:value-type="float">
            <text:p>120.33323373777</text:p>
          </table:table-cell>
          <table:table-cell office:value-type="float" office:value="1046.46264303403" calcext:value-type="float">
            <text:p>1046.46264303403</text:p>
          </table:table-cell>
          <table:table-cell office:value-type="float" office:value="1327.9364020546" calcext:value-type="float">
            <text:p>1327.9364020546</text:p>
          </table:table-cell>
          <table:table-cell office:value-type="float" office:value="1257.56796229946" calcext:value-type="float">
            <text:p>1257.56796229946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634.70831683168" calcext:value-type="float">
            <text:p>1634.70831683168</text:p>
          </table:table-cell>
          <table:table-cell office:value-type="float" office:value="1648.30831683168" calcext:value-type="float">
            <text:p>1648.30831683168</text:p>
          </table:table-cell>
          <table:table-cell office:value-type="float" office:value="0.511778538973765" calcext:value-type="float">
            <text:p>0.511778538973765</text:p>
          </table:table-cell>
          <table:table-cell office:value-type="float" office:value="0.512005706689631" calcext:value-type="float">
            <text:p>0.512005706689631</text:p>
          </table:table-cell>
          <table:table-cell office:value-type="float" office:value="0.149138063118004" calcext:value-type="float">
            <text:p>0.149138063118004</text:p>
          </table:table-cell>
          <table:table-cell office:value-type="float" office:value="0.149155863168364" calcext:value-type="float">
            <text:p>0.149155863168364</text:p>
          </table:table-cell>
          <table:table-cell office:value-type="float" office:value="-106.893904329391" calcext:value-type="float">
            <text:p>-106.893904329391</text:p>
          </table:table-cell>
          <table:table-cell office:value-type="float" office:value="106.893904329391" calcext:value-type="float">
            <text:p>106.893904329391</text:p>
          </table:table-cell>
          <table:table-cell office:value-type="float" office:value="1527.8279892974" calcext:value-type="float">
            <text:p>1527.8279892974</text:p>
          </table:table-cell>
          <table:table-cell office:value-type="float" office:value="1755.20222116107" calcext:value-type="float">
            <text:p>1755.20222116107</text:p>
          </table:table-cell>
          <table:table-cell office:value-type="float" office:value="1698.35866319516" calcext:value-type="float">
            <text:p>1698.35866319516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13.8" calcext:value-type="float">
            <text:p>-13.8</text:p>
          </table:table-cell>
          <table:table-cell office:value-type="float" office:value="13.8" calcext:value-type="float">
            <text:p>13.8</text:p>
          </table:table-cell>
          <table:table-cell office:value-type="float" office:value="1880.74732673267" calcext:value-type="float">
            <text:p>1880.74732673267</text:p>
          </table:table-cell>
          <table:table-cell office:value-type="float" office:value="1908.34732673267" calcext:value-type="float">
            <text:p>1908.34732673267</text:p>
          </table:table-cell>
          <table:table-cell office:value-type="float" office:value="0.517824267381285" calcext:value-type="float">
            <text:p>0.517824267381285</text:p>
          </table:table-cell>
          <table:table-cell office:value-type="float" office:value="0.518825870731826" calcext:value-type="float">
            <text:p>0.518825870731826</text:p>
          </table:table-cell>
          <table:table-cell office:value-type="float" office:value="0.191029382467686" calcext:value-type="float">
            <text:p>0.191029382467686</text:p>
          </table:table-cell>
          <table:table-cell office:value-type="float" office:value="0.191071973341168" calcext:value-type="float">
            <text:p>0.191071973341168</text:p>
          </table:table-cell>
          <table:table-cell office:value-type="float" office:value="-139.866388034351" calcext:value-type="float">
            <text:p>-139.866388034351</text:p>
          </table:table-cell>
          <table:table-cell office:value-type="float" office:value="139.866388034351" calcext:value-type="float">
            <text:p>139.866388034351</text:p>
          </table:table-cell>
          <table:table-cell office:value-type="float" office:value="1740.88093869832" calcext:value-type="float">
            <text:p>1740.88093869832</text:p>
          </table:table-cell>
          <table:table-cell office:value-type="float" office:value="2048.17905994234" calcext:value-type="float">
            <text:p>2048.17905994234</text:p>
          </table:table-cell>
          <table:table-cell office:value-type="float" office:value="1971.35452963133" calcext:value-type="float">
            <text:p>1971.35452963133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.8" calcext:value-type="float">
            <text:p>-10.8</text:p>
          </table:table-cell>
          <table:table-cell office:value-type="float" office:value="10.8" calcext:value-type="float">
            <text:p>10.8</text:p>
          </table:table-cell>
          <table:table-cell office:value-type="float" office:value="1499.19188118812" calcext:value-type="float">
            <text:p>1499.19188118812</text:p>
          </table:table-cell>
          <table:table-cell office:value-type="float" office:value="1520.79188118812" calcext:value-type="float">
            <text:p>1520.79188118812</text:p>
          </table:table-cell>
          <table:table-cell office:value-type="float" office:value="0.509933089473932" calcext:value-type="float">
            <text:p>0.509933089473932</text:p>
          </table:table-cell>
          <table:table-cell office:value-type="float" office:value="0.510187142185198" calcext:value-type="float">
            <text:p>0.510187142185198</text:p>
          </table:table-cell>
          <table:table-cell office:value-type="float" office:value="0.17391337302865" calcext:value-type="float">
            <text:p>0.17391337302865</text:p>
          </table:table-cell>
          <table:table-cell office:value-type="float" office:value="0.173958769929755" calcext:value-type="float">
            <text:p>0.173958769929755</text:p>
          </table:table-cell>
          <table:table-cell office:value-type="float" office:value="-126.144322407321" calcext:value-type="float">
            <text:p>-126.144322407321</text:p>
          </table:table-cell>
          <table:table-cell office:value-type="float" office:value="126.144322407321" calcext:value-type="float">
            <text:p>126.144322407321</text:p>
          </table:table-cell>
          <table:table-cell office:value-type="float" office:value="1373.08344676395" calcext:value-type="float">
            <text:p>1373.08344676395</text:p>
          </table:table-cell>
          <table:table-cell office:value-type="float" office:value="1646.93620359544" calcext:value-type="float">
            <text:p>1646.93620359544</text:p>
          </table:table-cell>
          <table:table-cell office:value-type="float" office:value="1578.47301438757" calcext:value-type="float">
            <text:p>1578.4730143875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522.0398019802" calcext:value-type="float">
            <text:p>1522.0398019802</text:p>
          </table:table-cell>
          <table:table-cell office:value-type="float" office:value="1538.9998019802" calcext:value-type="float">
            <text:p>1538.9998019802</text:p>
          </table:table-cell>
          <table:table-cell office:value-type="float" office:value="0.510202173646689" calcext:value-type="float">
            <text:p>0.510202173646689</text:p>
          </table:table-cell>
          <table:table-cell office:value-type="float" office:value="0.510410716096336" calcext:value-type="float">
            <text:p>0.510410716096336</text:p>
          </table:table-cell>
          <table:table-cell office:value-type="float" office:value="0.172109065548736" calcext:value-type="float">
            <text:p>0.172109065548736</text:p>
          </table:table-cell>
          <table:table-cell office:value-type="float" office:value="0.17212032464898" calcext:value-type="float">
            <text:p>0.17212032464898</text:p>
          </table:table-cell>
          <table:table-cell office:value-type="float" office:value="-124.693012836284" calcext:value-type="float">
            <text:p>-124.693012836284</text:p>
          </table:table-cell>
          <table:table-cell office:value-type="float" office:value="124.693012836284" calcext:value-type="float">
            <text:p>124.693012836284</text:p>
          </table:table-cell>
          <table:table-cell office:value-type="float" office:value="1397.3556644358" calcext:value-type="float">
            <text:p>1397.3556644358</text:p>
          </table:table-cell>
          <table:table-cell office:value-type="float" office:value="1663.69281481648" calcext:value-type="float">
            <text:p>1663.69281481648</text:p>
          </table:table-cell>
          <table:table-cell office:value-type="float" office:value="1597.10852722131" calcext:value-type="float">
            <text:p>1597.10852722131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-11.6" calcext:value-type="float">
            <text:p>-11.6</text:p>
          </table:table-cell>
          <table:table-cell office:value-type="float" office:value="11.6" calcext:value-type="float">
            <text:p>11.6</text:p>
          </table:table-cell>
          <table:table-cell office:value-type="float" office:value="2015.9699009901" calcext:value-type="float">
            <text:p>2015.9699009901</text:p>
          </table:table-cell>
          <table:table-cell office:value-type="float" office:value="2039.1699009901" calcext:value-type="float">
            <text:p>2039.1699009901</text:p>
          </table:table-cell>
          <table:table-cell office:value-type="float" office:value="0.523546052403187" calcext:value-type="float">
            <text:p>0.523546052403187</text:p>
          </table:table-cell>
          <table:table-cell office:value-type="float" office:value="0.524750037261258" calcext:value-type="float">
            <text:p>0.524750037261258</text:p>
          </table:table-cell>
          <table:table-cell office:value-type="float" office:value="0.137671493076446" calcext:value-type="float">
            <text:p>0.137671493076446</text:p>
          </table:table-cell>
          <table:table-cell office:value-type="float" office:value="0.138027568865813" calcext:value-type="float">
            <text:p>0.138027568865813</text:p>
          </table:table-cell>
          <table:table-cell office:value-type="float" office:value="-98.4655800450458" calcext:value-type="float">
            <text:p>-98.4655800450458</text:p>
          </table:table-cell>
          <table:table-cell office:value-type="float" office:value="98.4655800450458" calcext:value-type="float">
            <text:p>98.4655800450458</text:p>
          </table:table-cell>
          <table:table-cell office:value-type="float" office:value="1917.77210177437" calcext:value-type="float">
            <text:p>1917.77210177437</text:p>
          </table:table-cell>
          <table:table-cell office:value-type="float" office:value="2137.63548103514" calcext:value-type="float">
            <text:p>2137.63548103514</text:p>
          </table:table-cell>
          <table:table-cell office:value-type="float" office:value="2082.66963621995" calcext:value-type="float">
            <text:p>2082.66963621995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5.28" calcext:value-type="float">
            <text:p>-5.28</text:p>
          </table:table-cell>
          <table:table-cell office:value-type="float" office:value="5.28" calcext:value-type="float">
            <text:p>5.28</text:p>
          </table:table-cell>
          <table:table-cell office:value-type="float" office:value="1639.61366336634" calcext:value-type="float">
            <text:p>1639.61366336634</text:p>
          </table:table-cell>
          <table:table-cell office:value-type="float" office:value="1650.17366336634" calcext:value-type="float">
            <text:p>1650.17366336634</text:p>
          </table:table-cell>
          <table:table-cell office:value-type="float" office:value="0.511859386357836" calcext:value-type="float">
            <text:p>0.511859386357836</text:p>
          </table:table-cell>
          <table:table-cell office:value-type="float" office:value="0.512037611694215" calcext:value-type="float">
            <text:p>0.512037611694215</text:p>
          </table:table-cell>
          <table:table-cell office:value-type="float" office:value="0.128400967348656" calcext:value-type="float">
            <text:p>0.128400967348656</text:p>
          </table:table-cell>
          <table:table-cell office:value-type="float" office:value="0.128405310154273" calcext:value-type="float">
            <text:p>0.128405310154273</text:p>
          </table:table-cell>
          <table:table-cell office:value-type="float" office:value="-91.2681388163043" calcext:value-type="float">
            <text:p>-91.2681388163043</text:p>
          </table:table-cell>
          <table:table-cell office:value-type="float" office:value="91.2681388163043" calcext:value-type="float">
            <text:p>91.2681388163043</text:p>
          </table:table-cell>
          <table:table-cell office:value-type="float" office:value="1548.34552455003" calcext:value-type="float">
            <text:p>1548.34552455003</text:p>
          </table:table-cell>
          <table:table-cell office:value-type="float" office:value="1741.43857142552" calcext:value-type="float">
            <text:p>1741.43857142552</text:p>
          </table:table-cell>
          <table:table-cell office:value-type="float" office:value="1693.16530970664" calcext:value-type="float">
            <text:p>1693.1653097066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3.04" calcext:value-type="float">
            <text:p>-13.04</text:p>
          </table:table-cell>
          <table:table-cell office:value-type="float" office:value="13.04" calcext:value-type="float">
            <text:p>13.04</text:p>
          </table:table-cell>
          <table:table-cell office:value-type="float" office:value="1500.43128712871" calcext:value-type="float">
            <text:p>1500.43128712871</text:p>
          </table:table-cell>
          <table:table-cell office:value-type="float" office:value="1526.51128712871" calcext:value-type="float">
            <text:p>1526.51128712871</text:p>
          </table:table-cell>
          <table:table-cell office:value-type="float" office:value="0.509947372676562" calcext:value-type="float">
            <text:p>0.509947372676562</text:p>
          </table:table-cell>
          <table:table-cell office:value-type="float" office:value="0.510256375033293" calcext:value-type="float">
            <text:p>0.510256375033293</text:p>
          </table:table-cell>
          <table:table-cell office:value-type="float" office:value="0.119740928022848" calcext:value-type="float">
            <text:p>0.119740928022848</text:p>
          </table:table-cell>
          <table:table-cell office:value-type="float" office:value="0.119843387476059" calcext:value-type="float">
            <text:p>0.119843387476059</text:p>
          </table:table-cell>
          <table:table-cell office:value-type="float" office:value="-84.927769355739" calcext:value-type="float">
            <text:p>-84.927769355739</text:p>
          </table:table-cell>
          <table:table-cell office:value-type="float" office:value="84.927769355739" calcext:value-type="float">
            <text:p>84.927769355739</text:p>
          </table:table-cell>
          <table:table-cell office:value-type="float" office:value="1415.5790494611" calcext:value-type="float">
            <text:p>1415.5790494611</text:p>
          </table:table-cell>
          <table:table-cell office:value-type="float" office:value="1611.43905648445" calcext:value-type="float">
            <text:p>1611.43905648445</text:p>
          </table:table-cell>
          <table:table-cell office:value-type="float" office:value="1562.47405472861" calcext:value-type="float">
            <text:p>1562.47405472861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7.16" calcext:value-type="float">
            <text:p>-7.16</text:p>
          </table:table-cell>
          <table:table-cell office:value-type="float" office:value="7.16" calcext:value-type="float">
            <text:p>7.16</text:p>
          </table:table-cell>
          <table:table-cell office:value-type="float" office:value="1772.65603960396" calcext:value-type="float">
            <text:p>1772.65603960396</text:p>
          </table:table-cell>
          <table:table-cell office:value-type="float" office:value="1786.97603960396" calcext:value-type="float">
            <text:p>1786.97603960396</text:p>
          </table:table-cell>
          <table:table-cell office:value-type="float" office:value="0.514599493170279" calcext:value-type="float">
            <text:p>0.514599493170279</text:p>
          </table:table-cell>
          <table:table-cell office:value-type="float" office:value="0.514968444051385" calcext:value-type="float">
            <text:p>0.514968444051385</text:p>
          </table:table-cell>
          <table:table-cell office:value-type="float" office:value="0.131855471654605" calcext:value-type="float">
            <text:p>0.131855471654605</text:p>
          </table:table-cell>
          <table:table-cell office:value-type="float" office:value="0.131968995002638" calcext:value-type="float">
            <text:p>0.131968995002638</text:p>
          </table:table-cell>
          <table:table-cell office:value-type="float" office:value="-93.9245457148663" calcext:value-type="float">
            <text:p>-93.9245457148663</text:p>
          </table:table-cell>
          <table:table-cell office:value-type="float" office:value="93.9245457148664" calcext:value-type="float">
            <text:p>93.9245457148664</text:p>
          </table:table-cell>
          <table:table-cell office:value-type="float" office:value="1678.8162793429" calcext:value-type="float">
            <text:p>1678.8162793429</text:p>
          </table:table-cell>
          <table:table-cell office:value-type="float" office:value="1880.90058531883" calcext:value-type="float">
            <text:p>1880.90058531883</text:p>
          </table:table-cell>
          <table:table-cell office:value-type="float" office:value="1830.37950882485" calcext:value-type="float">
            <text:p>1830.37950882485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6.84" calcext:value-type="float">
            <text:p>-6.84</text:p>
          </table:table-cell>
          <table:table-cell office:value-type="float" office:value="6.84" calcext:value-type="float">
            <text:p>6.84</text:p>
          </table:table-cell>
          <table:table-cell office:value-type="float" office:value="1619.19188118812" calcext:value-type="float">
            <text:p>1619.19188118812</text:p>
          </table:table-cell>
          <table:table-cell office:value-type="float" office:value="1632.87188118812" calcext:value-type="float">
            <text:p>1632.87188118812</text:p>
          </table:table-cell>
          <table:table-cell office:value-type="float" office:value="0.51153057853023" calcext:value-type="float">
            <text:p>0.51153057853023</text:p>
          </table:table-cell>
          <table:table-cell office:value-type="float" office:value="0.511748581355805" calcext:value-type="float">
            <text:p>0.511748581355805</text:p>
          </table:table-cell>
          <table:table-cell office:value-type="float" office:value="0.157677373566367" calcext:value-type="float">
            <text:p>0.157677373566367</text:p>
          </table:table-cell>
          <table:table-cell office:value-type="float" office:value="0.157778198571219" calcext:value-type="float">
            <text:p>0.157778198571219</text:p>
          </table:table-cell>
          <table:table-cell office:value-type="float" office:value="-113.508720821664" calcext:value-type="float">
            <text:p>-113.508720821664</text:p>
          </table:table-cell>
          <table:table-cell office:value-type="float" office:value="113.508720821664" calcext:value-type="float">
            <text:p>113.508720821664</text:p>
          </table:table-cell>
          <table:table-cell office:value-type="float" office:value="1505.76096307624" calcext:value-type="float">
            <text:p>1505.76096307624</text:p>
          </table:table-cell>
          <table:table-cell office:value-type="float" office:value="1746.38060200978" calcext:value-type="float">
            <text:p>1746.38060200978</text:p>
          </table:table-cell>
          <table:table-cell office:value-type="float" office:value="1686.2256922764" calcext:value-type="float">
            <text:p>1686.2256922764</text:p>
          </table:table-cell>
        </table:table-row>
        <table:table-row table:style-name="ro1">
          <table:table-cell office:value-type="string" calcext:value-type="string">
            <text:p>qablo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1079.92138613861" calcext:value-type="float">
            <text:p>1079.92138613861</text:p>
          </table:table-cell>
          <table:table-cell office:value-type="float" office:value="1089.84138613861" calcext:value-type="float">
            <text:p>1089.84138613861</text:p>
          </table:table-cell>
          <table:table-cell office:value-type="float" office:value="0.504476652809161" calcext:value-type="float">
            <text:p>0.504476652809161</text:p>
          </table:table-cell>
          <table:table-cell office:value-type="float" office:value="0.504677647549824" calcext:value-type="float">
            <text:p>0.504677647549824</text:p>
          </table:table-cell>
          <table:table-cell office:value-type="float" office:value="0.314011838120743" calcext:value-type="float">
            <text:p>0.314011838120743</text:p>
          </table:table-cell>
          <table:table-cell office:value-type="float" office:value="0.314212832861407" calcext:value-type="float">
            <text:p>0.314212832861407</text:p>
          </table:table-cell>
          <table:table-cell office:value-type="float" office:value="-256.688892133442" calcext:value-type="float">
            <text:p>-256.688892133442</text:p>
          </table:table-cell>
          <table:table-cell office:value-type="float" office:value="256.688892133442" calcext:value-type="float">
            <text:p>256.688892133442</text:p>
          </table:table-cell>
          <table:table-cell office:value-type="float" office:value="823.463218723697" calcext:value-type="float">
            <text:p>823.463218723697</text:p>
          </table:table-cell>
          <table:table-cell office:value-type="float" office:value="1346.53027827206" calcext:value-type="float">
            <text:p>1346.53027827206</text:p>
          </table:table-cell>
          <table:table-cell office:value-type="float" office:value="1215.76351338497" calcext:value-type="float">
            <text:p>1215.7635133849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6.16" calcext:value-type="float">
            <text:p>-6.16</text:p>
          </table:table-cell>
          <table:table-cell office:value-type="float" office:value="6.16" calcext:value-type="float">
            <text:p>6.16</text:p>
          </table:table-cell>
          <table:table-cell office:value-type="float" office:value="1564.05782178218" calcext:value-type="float">
            <text:p>1564.05782178218</text:p>
          </table:table-cell>
          <table:table-cell office:value-type="float" office:value="1576.37782178218" calcext:value-type="float">
            <text:p>1576.37782178218</text:p>
          </table:table-cell>
          <table:table-cell office:value-type="float" office:value="0.510734914356842" calcext:value-type="float">
            <text:p>0.510734914356842</text:p>
          </table:table-cell>
          <table:table-cell office:value-type="float" office:value="0.510902205871504" calcext:value-type="float">
            <text:p>0.510902205871504</text:p>
          </table:table-cell>
          <table:table-cell office:value-type="float" office:value="0.142253104406484" calcext:value-type="float">
            <text:p>0.142253104406484</text:p>
          </table:table-cell>
          <table:table-cell office:value-type="float" office:value="0.142294747444773" calcext:value-type="float">
            <text:p>0.142294747444773</text:p>
          </table:table-cell>
          <table:table-cell office:value-type="float" office:value="-101.683621226957" calcext:value-type="float">
            <text:p>-101.683621226957</text:p>
          </table:table-cell>
          <table:table-cell office:value-type="float" office:value="101.683621226957" calcext:value-type="float">
            <text:p>101.683621226957</text:p>
          </table:table-cell>
          <table:table-cell office:value-type="float" office:value="1462.40568643431" calcext:value-type="float">
            <text:p>1462.40568643431</text:p>
          </table:table-cell>
          <table:table-cell office:value-type="float" office:value="1678.06144300914" calcext:value-type="float">
            <text:p>1678.06144300914</text:p>
          </table:table-cell>
          <table:table-cell office:value-type="float" office:value="1624.14750386543" calcext:value-type="float">
            <text:p>1624.14750386543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1261.87821782178" calcext:value-type="float">
            <text:p>1261.87821782178</text:p>
          </table:table-cell>
          <table:table-cell office:value-type="float" office:value="1276.27821782178" calcext:value-type="float">
            <text:p>1276.27821782178</text:p>
          </table:table-cell>
          <table:table-cell office:value-type="float" office:value="0.507352942883838" calcext:value-type="float">
            <text:p>0.507352942883838</text:p>
          </table:table-cell>
          <table:table-cell office:value-type="float" office:value="0.507525548869224" calcext:value-type="float">
            <text:p>0.507525548869224</text:p>
          </table:table-cell>
          <table:table-cell office:value-type="float" office:value="0.200304035547326" calcext:value-type="float">
            <text:p>0.200304035547326</text:p>
          </table:table-cell>
          <table:table-cell office:value-type="float" office:value="0.200394008375828" calcext:value-type="float">
            <text:p>0.200394008375828</text:p>
          </table:table-cell>
          <table:table-cell office:value-type="float" office:value="-147.516771162189" calcext:value-type="float">
            <text:p>-147.516771162189</text:p>
          </table:table-cell>
          <table:table-cell office:value-type="float" office:value="147.516771162189" calcext:value-type="float">
            <text:p>147.516771162189</text:p>
          </table:table-cell>
          <table:table-cell office:value-type="float" office:value="1114.43592422178" calcext:value-type="float">
            <text:p>1114.43592422178</text:p>
          </table:table-cell>
          <table:table-cell office:value-type="float" office:value="1423.79498898397" calcext:value-type="float">
            <text:p>1423.79498898397</text:p>
          </table:table-cell>
          <table:table-cell office:value-type="float" office:value="1346.45522279342" calcext:value-type="float">
            <text:p>1346.45522279342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56" calcext:value-type="float">
            <text:p>-4.56</text:p>
          </table:table-cell>
          <table:table-cell office:value-type="float" office:value="4.56" calcext:value-type="float">
            <text:p>4.56</text:p>
          </table:table-cell>
          <table:table-cell office:value-type="float" office:value="1725.75386138614" calcext:value-type="float">
            <text:p>1725.75386138614</text:p>
          </table:table-cell>
          <table:table-cell office:value-type="float" office:value="1734.87386138614" calcext:value-type="float">
            <text:p>1734.87386138614</text:p>
          </table:table-cell>
          <table:table-cell office:value-type="float" office:value="0.513500323704429" calcext:value-type="float">
            <text:p>0.513500323704429</text:p>
          </table:table-cell>
          <table:table-cell office:value-type="float" office:value="0.513701563171894" calcext:value-type="float">
            <text:p>0.513701563171894</text:p>
          </table:table-cell>
          <table:table-cell office:value-type="float" office:value="0.144501291177258" calcext:value-type="float">
            <text:p>0.144501291177258</text:p>
          </table:table-cell>
          <table:table-cell office:value-type="float" office:value="0.144536289345513" calcext:value-type="float">
            <text:p>0.144536289345513</text:p>
          </table:table-cell>
          <table:table-cell office:value-type="float" office:value="-103.380841734036" calcext:value-type="float">
            <text:p>-103.380841734036</text:p>
          </table:table-cell>
          <table:table-cell office:value-type="float" office:value="103.380841734036" calcext:value-type="float">
            <text:p>103.380841734036</text:p>
          </table:table-cell>
          <table:table-cell office:value-type="float" office:value="1622.3730196521" calcext:value-type="float">
            <text:p>1622.3730196521</text:p>
          </table:table-cell>
          <table:table-cell office:value-type="float" office:value="1838.22816700247" calcext:value-type="float">
            <text:p>1838.22816700247</text:p>
          </table:table-cell>
          <table:table-cell office:value-type="float" office:value="1784.26438016488" calcext:value-type="float">
            <text:p>1784.26438016488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8.08" calcext:value-type="float">
            <text:p>-8.08</text:p>
          </table:table-cell>
          <table:table-cell office:value-type="float" office:value="8.08" calcext:value-type="float">
            <text:p>8.08</text:p>
          </table:table-cell>
          <table:table-cell office:value-type="float" office:value="1722.28752475248" calcext:value-type="float">
            <text:p>1722.28752475248</text:p>
          </table:table-cell>
          <table:table-cell office:value-type="float" office:value="1738.44752475248" calcext:value-type="float">
            <text:p>1738.44752475248</text:p>
          </table:table-cell>
          <table:table-cell office:value-type="float" office:value="0.513425342220249" calcext:value-type="float">
            <text:p>0.513425342220249</text:p>
          </table:table-cell>
          <table:table-cell office:value-type="float" office:value="0.513782009578783" calcext:value-type="float">
            <text:p>0.513782009578783</text:p>
          </table:table-cell>
          <table:table-cell office:value-type="float" office:value="0.146942910503123" calcext:value-type="float">
            <text:p>0.146942910503123</text:p>
          </table:table-cell>
          <table:table-cell office:value-type="float" office:value="0.147119454881259" calcext:value-type="float">
            <text:p>0.147119454881259</text:p>
          </table:table-cell>
          <table:table-cell office:value-type="float" office:value="-105.34269636531" calcext:value-type="float">
            <text:p>-105.34269636531</text:p>
          </table:table-cell>
          <table:table-cell office:value-type="float" office:value="105.34269636531" calcext:value-type="float">
            <text:p>105.34269636531</text:p>
          </table:table-cell>
          <table:table-cell office:value-type="float" office:value="1617.07911621557" calcext:value-type="float">
            <text:p>1617.07911621557</text:p>
          </table:table-cell>
          <table:table-cell office:value-type="float" office:value="1843.79022111778" calcext:value-type="float">
            <text:p>1843.79022111778</text:p>
          </table:table-cell>
          <table:table-cell office:value-type="float" office:value="1787.11244489223" calcext:value-type="float">
            <text:p>1787.11244489223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338.73920792079" calcext:value-type="float">
            <text:p>1338.73920792079</text:p>
          </table:table-cell>
          <table:table-cell office:value-type="float" office:value="1349.05920792079" calcext:value-type="float">
            <text:p>1349.05920792079</text:p>
          </table:table-cell>
          <table:table-cell office:value-type="float" office:value="0.508223673992793" calcext:value-type="float">
            <text:p>0.508223673992793</text:p>
          </table:table-cell>
          <table:table-cell office:value-type="float" office:value="0.50833336788214" calcext:value-type="float">
            <text:p>0.50833336788214</text:p>
          </table:table-cell>
          <table:table-cell office:value-type="float" office:value="0.202955764410959" calcext:value-type="float">
            <text:p>0.202955764410959</text:p>
          </table:table-cell>
          <table:table-cell office:value-type="float" office:value="0.202977619333013" calcext:value-type="float">
            <text:p>0.202977619333013</text:p>
          </table:table-cell>
          <table:table-cell office:value-type="float" office:value="-149.660929576731" calcext:value-type="float">
            <text:p>-149.660929576731</text:p>
          </table:table-cell>
          <table:table-cell office:value-type="float" office:value="149.660929576731" calcext:value-type="float">
            <text:p>149.660929576731</text:p>
          </table:table-cell>
          <table:table-cell office:value-type="float" office:value="1189.09646084694" calcext:value-type="float">
            <text:p>1189.09646084694</text:p>
          </table:table-cell>
          <table:table-cell office:value-type="float" office:value="1498.72013749752" calcext:value-type="float">
            <text:p>1498.72013749752</text:p>
          </table:table-cell>
          <table:table-cell office:value-type="float" office:value="1421.31421833488" calcext:value-type="float">
            <text:p>1421.31421833488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742.07504950495" calcext:value-type="float">
            <text:p>1742.07504950495</text:p>
          </table:table-cell>
          <table:table-cell office:value-type="float" office:value="1758.39504950495" calcext:value-type="float">
            <text:p>1758.39504950495</text:p>
          </table:table-cell>
          <table:table-cell office:value-type="float" office:value="0.513864599295973" calcext:value-type="float">
            <text:p>0.513864599295973</text:p>
          </table:table-cell>
          <table:table-cell office:value-type="float" office:value="0.514248029545203" calcext:value-type="float">
            <text:p>0.514248029545203</text:p>
          </table:table-cell>
          <table:table-cell office:value-type="float" office:value="0.132310021560616" calcext:value-type="float">
            <text:p>0.132310021560616</text:p>
          </table:table-cell>
          <table:table-cell office:value-type="float" office:value="0.132361499773723" calcext:value-type="float">
            <text:p>0.132361499773723</text:p>
          </table:table-cell>
          <table:table-cell office:value-type="float" office:value="-94.217774025441" calcext:value-type="float">
            <text:p>-94.217774025441</text:p>
          </table:table-cell>
          <table:table-cell office:value-type="float" office:value="94.217774025441" calcext:value-type="float">
            <text:p>94.217774025441</text:p>
          </table:table-cell>
          <table:table-cell office:value-type="float" office:value="1647.85727547951" calcext:value-type="float">
            <text:p>1647.85727547951</text:p>
          </table:table-cell>
          <table:table-cell office:value-type="float" office:value="1852.57435827389" calcext:value-type="float">
            <text:p>1852.57435827389</text:p>
          </table:table-cell>
          <table:table-cell office:value-type="float" office:value="1801.3950875753" calcext:value-type="float">
            <text:p>1801.395087575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9.8" calcext:value-type="float">
            <text:p>-9.8</text:p>
          </table:table-cell>
          <table:table-cell office:value-type="float" office:value="9.8" calcext:value-type="float">
            <text:p>9.8</text:p>
          </table:table-cell>
          <table:table-cell office:value-type="float" office:value="1573.66237623762" calcext:value-type="float">
            <text:p>1573.66237623762</text:p>
          </table:table-cell>
          <table:table-cell office:value-type="float" office:value="1593.26237623762" calcext:value-type="float">
            <text:p>1593.26237623762</text:p>
          </table:table-cell>
          <table:table-cell office:value-type="float" office:value="0.510864854817992" calcext:value-type="float">
            <text:p>0.510864854817992</text:p>
          </table:table-cell>
          <table:table-cell office:value-type="float" office:value="0.511140857405215" calcext:value-type="float">
            <text:p>0.511140857405215</text:p>
          </table:table-cell>
          <table:table-cell office:value-type="float" office:value="0.150283223731016" calcext:value-type="float">
            <text:p>0.150283223731016</text:p>
          </table:table-cell>
          <table:table-cell office:value-type="float" office:value="0.150389510441623" calcext:value-type="float">
            <text:p>0.150389510441623</text:p>
          </table:table-cell>
          <table:table-cell office:value-type="float" office:value="-107.835629501144" calcext:value-type="float">
            <text:p>-107.835629501144</text:p>
          </table:table-cell>
          <table:table-cell office:value-type="float" office:value="107.835629501144" calcext:value-type="float">
            <text:p>107.835629501144</text:p>
          </table:table-cell>
          <table:table-cell office:value-type="float" office:value="1465.90794276092" calcext:value-type="float">
            <text:p>1465.90794276092</text:p>
          </table:table-cell>
          <table:table-cell office:value-type="float" office:value="1701.09800573877" calcext:value-type="float">
            <text:p>1701.09800573877</text:p>
          </table:table-cell>
          <table:table-cell office:value-type="float" office:value="1642.30048999431" calcext:value-type="float">
            <text:p>1642.30048999431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8.84" calcext:value-type="float">
            <text:p>-8.84</text:p>
          </table:table-cell>
          <table:table-cell office:value-type="float" office:value="8.84" calcext:value-type="float">
            <text:p>8.84</text:p>
          </table:table-cell>
          <table:table-cell office:value-type="float" office:value="1790.88" calcext:value-type="float">
            <text:p>1790.88</text:p>
          </table:table-cell>
          <table:table-cell office:value-type="float" office:value="1808.56" calcext:value-type="float">
            <text:p>1808.56</text:p>
          </table:table-cell>
          <table:table-cell office:value-type="float" office:value="0.515071895265144" calcext:value-type="float">
            <text:p>0.515071895265144</text:p>
          </table:table-cell>
          <table:table-cell office:value-type="float" office:value="0.515556247282285" calcext:value-type="float">
            <text:p>0.515556247282285</text:p>
          </table:table-cell>
          <table:table-cell office:value-type="float" office:value="0.130809501903167" calcext:value-type="float">
            <text:p>0.130809501903167</text:p>
          </table:table-cell>
          <table:table-cell office:value-type="float" office:value="0.130952053667409" calcext:value-type="float">
            <text:p>0.130952053667409</text:p>
          </table:table-cell>
          <table:table-cell office:value-type="float" office:value="-93.1654261371734" calcext:value-type="float">
            <text:p>-93.1654261371734</text:p>
          </table:table-cell>
          <table:table-cell office:value-type="float" office:value="93.1654261371734" calcext:value-type="float">
            <text:p>93.1654261371734</text:p>
          </table:table-cell>
          <table:table-cell office:value-type="float" office:value="1697.82091540301" calcext:value-type="float">
            <text:p>1697.82091540301</text:p>
          </table:table-cell>
          <table:table-cell office:value-type="float" office:value="1901.72542613717" calcext:value-type="float">
            <text:p>1901.72542613717</text:p>
          </table:table-cell>
          <table:table-cell office:value-type="float" office:value="1850.74929845363" calcext:value-type="float">
            <text:p>1850.74929845363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-9.14285714285714" calcext:value-type="float">
            <text:p>-9.14285714285714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1002.05128205128" calcext:value-type="float">
            <text:p>1002.05128205128</text:p>
          </table:table-cell>
          <table:table-cell office:value-type="float" office:value="1020.336996337" calcext:value-type="float">
            <text:p>1020.336996337</text:p>
          </table:table-cell>
          <table:table-cell office:value-type="float" office:value="0.502660628670625" calcext:value-type="float">
            <text:p>0.502660628670625</text:p>
          </table:table-cell>
          <table:table-cell office:value-type="float" office:value="0.503127657779185" calcext:value-type="float">
            <text:p>0.503127657779185</text:p>
          </table:table-cell>
          <table:table-cell office:value-type="float" office:value="0.113662600433529" calcext:value-type="float">
            <text:p>0.113662600433529</text:p>
          </table:table-cell>
          <table:table-cell office:value-type="float" office:value="0.113754174768541" calcext:value-type="float">
            <text:p>0.113754174768541</text:p>
          </table:table-cell>
          <table:table-cell office:value-type="float" office:value="-80.4522643476283" calcext:value-type="float">
            <text:p>-80.4522643476283</text:p>
          </table:table-cell>
          <table:table-cell office:value-type="float" office:value="80.4522643476283" calcext:value-type="float">
            <text:p>80.4522643476283</text:p>
          </table:table-cell>
          <table:table-cell office:value-type="float" office:value="921.666120518831" calcext:value-type="float">
            <text:p>921.666120518831</text:p>
          </table:table-cell>
          <table:table-cell office:value-type="float" office:value="1100.78926068462" calcext:value-type="float">
            <text:p>1100.78926068462</text:p>
          </table:table-cell>
          <table:table-cell office:value-type="float" office:value="1056.00847564318" calcext:value-type="float">
            <text:p>1056.00847564318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float" office:value="-10.24" calcext:value-type="float">
            <text:p>-10.24</text:p>
          </table:table-cell>
          <table:table-cell office:value-type="float" office:value="10.24" calcext:value-type="float">
            <text:p>10.24</text:p>
          </table:table-cell>
          <table:table-cell office:value-type="float" office:value="1631.07306930693" calcext:value-type="float">
            <text:p>1631.07306930693</text:p>
          </table:table-cell>
          <table:table-cell office:value-type="float" office:value="1651.55306930693" calcext:value-type="float">
            <text:p>1651.55306930693</text:p>
          </table:table-cell>
          <table:table-cell office:value-type="float" office:value="0.511719399065741" calcext:value-type="float">
            <text:p>0.511719399065741</text:p>
          </table:table-cell>
          <table:table-cell office:value-type="float" office:value="0.512061323665301" calcext:value-type="float">
            <text:p>0.512061323665301</text:p>
          </table:table-cell>
          <table:table-cell office:value-type="float" office:value="0.137000592563377" calcext:value-type="float">
            <text:p>0.137000592563377</text:p>
          </table:table-cell>
          <table:table-cell office:value-type="float" office:value="0.137154319772257" calcext:value-type="float">
            <text:p>0.137154319772257</text:p>
          </table:table-cell>
          <table:table-cell office:value-type="float" office:value="-97.8090699274087" calcext:value-type="float">
            <text:p>-97.8090699274087</text:p>
          </table:table-cell>
          <table:table-cell office:value-type="float" office:value="97.8090699274087" calcext:value-type="float">
            <text:p>97.8090699274087</text:p>
          </table:table-cell>
          <table:table-cell office:value-type="float" office:value="1533.37950120974" calcext:value-type="float">
            <text:p>1533.37950120974</text:p>
          </table:table-cell>
          <table:table-cell office:value-type="float" office:value="1749.36213923434" calcext:value-type="float">
            <text:p>1749.36213923434</text:p>
          </table:table-cell>
          <table:table-cell office:value-type="float" office:value="1695.36647972819" calcext:value-type="float">
            <text:p>1695.3664797281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4.48" calcext:value-type="float">
            <text:p>-4.48</text:p>
          </table:table-cell>
          <table:table-cell office:value-type="float" office:value="4.48" calcext:value-type="float">
            <text:p>4.48</text:p>
          </table:table-cell>
          <table:table-cell office:value-type="float" office:value="2168.21287128713" calcext:value-type="float">
            <text:p>2168.21287128713</text:p>
          </table:table-cell>
          <table:table-cell office:value-type="float" office:value="2177.17287128713" calcext:value-type="float">
            <text:p>2177.17287128713</text:p>
          </table:table-cell>
          <table:table-cell office:value-type="float" office:value="0.532829893638519" calcext:value-type="float">
            <text:p>0.532829893638519</text:p>
          </table:table-cell>
          <table:table-cell office:value-type="float" office:value="0.533484836477684" calcext:value-type="float">
            <text:p>0.533484836477684</text:p>
          </table:table-cell>
          <table:table-cell office:value-type="float" office:value="0.161464180616715" calcext:value-type="float">
            <text:p>0.161464180616715</text:p>
          </table:table-cell>
          <table:table-cell office:value-type="float" office:value="0.161691048059808" calcext:value-type="float">
            <text:p>0.161691048059808</text:p>
          </table:table-cell>
          <table:table-cell office:value-type="float" office:value="-116.536707770478" calcext:value-type="float">
            <text:p>-116.536707770478</text:p>
          </table:table-cell>
          <table:table-cell office:value-type="float" office:value="116.536707770478" calcext:value-type="float">
            <text:p>116.536707770478</text:p>
          </table:table-cell>
          <table:table-cell office:value-type="float" office:value="2051.85218943019" calcext:value-type="float">
            <text:p>2051.85218943019</text:p>
          </table:table-cell>
          <table:table-cell office:value-type="float" office:value="2293.70957905761" calcext:value-type="float">
            <text:p>2293.70957905761</text:p>
          </table:table-cell>
          <table:table-cell office:value-type="float" office:value="2233.24523165075" calcext:value-type="float">
            <text:p>2233.24523165075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6.48" calcext:value-type="float">
            <text:p>-6.48</text:p>
          </table:table-cell>
          <table:table-cell office:value-type="float" office:value="6.48" calcext:value-type="float">
            <text:p>6.48</text:p>
          </table:table-cell>
          <table:table-cell office:value-type="float" office:value="1305.08316831683" calcext:value-type="float">
            <text:p>1305.08316831683</text:p>
          </table:table-cell>
          <table:table-cell office:value-type="float" office:value="1318.04316831683" calcext:value-type="float">
            <text:p>1318.04316831683</text:p>
          </table:table-cell>
          <table:table-cell office:value-type="float" office:value="0.507856267467784" calcext:value-type="float">
            <text:p>0.507856267467784</text:p>
          </table:table-cell>
          <table:table-cell office:value-type="float" office:value="0.507999784443923" calcext:value-type="float">
            <text:p>0.507999784443923</text:p>
          </table:table-cell>
          <table:table-cell office:value-type="float" office:value="0.152552293906772" calcext:value-type="float">
            <text:p>0.152552293906772</text:p>
          </table:table-cell>
          <table:table-cell office:value-type="float" office:value="0.152567310733229" calcext:value-type="float">
            <text:p>0.152567310733229</text:p>
          </table:table-cell>
          <table:table-cell office:value-type="float" office:value="-109.501854713698" calcext:value-type="float">
            <text:p>-109.501854713698</text:p>
          </table:table-cell>
          <table:table-cell office:value-type="float" office:value="109.501854713698" calcext:value-type="float">
            <text:p>109.501854713698</text:p>
          </table:table-cell>
          <table:table-cell office:value-type="float" office:value="1195.59281954256" calcext:value-type="float">
            <text:p>1195.59281954256</text:p>
          </table:table-cell>
          <table:table-cell office:value-type="float" office:value="1427.54502303053" calcext:value-type="float">
            <text:p>1427.54502303053</text:p>
          </table:table-cell>
          <table:table-cell office:value-type="float" office:value="1369.55697215854" calcext:value-type="float">
            <text:p>1369.55697215854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8.84" calcext:value-type="float">
            <text:p>-8.84</text:p>
          </table:table-cell>
          <table:table-cell office:value-type="float" office:value="8.84" calcext:value-type="float">
            <text:p>8.84</text:p>
          </table:table-cell>
          <table:table-cell office:value-type="float" office:value="2003.39207920792" calcext:value-type="float">
            <text:p>2003.39207920792</text:p>
          </table:table-cell>
          <table:table-cell office:value-type="float" office:value="2021.07207920792" calcext:value-type="float">
            <text:p>2021.07207920792</text:p>
          </table:table-cell>
          <table:table-cell office:value-type="float" office:value="0.522922436967391" calcext:value-type="float">
            <text:p>0.522922436967391</text:p>
          </table:table-cell>
          <table:table-cell office:value-type="float" office:value="0.52380480260306" calcext:value-type="float">
            <text:p>0.52380480260306</text:p>
          </table:table-cell>
          <table:table-cell office:value-type="float" office:value="0.165309355311345" calcext:value-type="float">
            <text:p>0.165309355311345</text:p>
          </table:table-cell>
          <table:table-cell office:value-type="float" office:value="0.165629755637723" calcext:value-type="float">
            <text:p>0.165629755637723</text:p>
          </table:table-cell>
          <table:table-cell office:value-type="float" office:value="-119.602042157914" calcext:value-type="float">
            <text:p>-119.602042157914</text:p>
          </table:table-cell>
          <table:table-cell office:value-type="float" office:value="119.602042157914" calcext:value-type="float">
            <text:p>119.602042157914</text:p>
          </table:table-cell>
          <table:table-cell office:value-type="float" office:value="1884.04005629419" calcext:value-type="float">
            <text:p>1884.04005629419</text:p>
          </table:table-cell>
          <table:table-cell office:value-type="float" office:value="2140.67412136583" calcext:value-type="float">
            <text:p>2140.67412136583</text:p>
          </table:table-cell>
          <table:table-cell office:value-type="float" office:value="2076.51560509792" calcext:value-type="float">
            <text:p>2076.51560509792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082.71544554455" calcext:value-type="float">
            <text:p>1082.71544554455</text:p>
          </table:table-cell>
          <table:table-cell office:value-type="float" office:value="1099.83544554455" calcext:value-type="float">
            <text:p>1099.83544554455</text:p>
          </table:table-cell>
          <table:table-cell office:value-type="float" office:value="0.504533903342789" calcext:value-type="float">
            <text:p>0.504533903342789</text:p>
          </table:table-cell>
          <table:table-cell office:value-type="float" office:value="0.50487387783" calcext:value-type="float">
            <text:p>0.50487387783</text:p>
          </table:table-cell>
          <table:table-cell office:value-type="float" office:value="0.119351904633832" calcext:value-type="float">
            <text:p>0.119351904633832</text:p>
          </table:table-cell>
          <table:table-cell office:value-type="float" office:value="0.119393487753147" calcext:value-type="float">
            <text:p>0.119393487753147</text:p>
          </table:table-cell>
          <table:table-cell office:value-type="float" office:value="-84.5961680158669" calcext:value-type="float">
            <text:p>-84.5961680158669</text:p>
          </table:table-cell>
          <table:table-cell office:value-type="float" office:value="84.596168015867" calcext:value-type="float">
            <text:p>84.596168015867</text:p>
          </table:table-cell>
          <table:table-cell office:value-type="float" office:value="998.149918982875" calcext:value-type="float">
            <text:p>998.149918982875</text:p>
          </table:table-cell>
          <table:table-cell office:value-type="float" office:value="1184.43161356042" calcext:value-type="float">
            <text:p>1184.43161356042</text:p>
          </table:table-cell>
          <table:table-cell office:value-type="float" office:value="1137.86118991603" calcext:value-type="float">
            <text:p>1137.8611899160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637.47900990099" calcext:value-type="float">
            <text:p>1637.47900990099</text:p>
          </table:table-cell>
          <table:table-cell office:value-type="float" office:value="1652.91900990099" calcext:value-type="float">
            <text:p>1652.91900990099</text:p>
          </table:table-cell>
          <table:table-cell office:value-type="float" office:value="0.511824055281495" calcext:value-type="float">
            <text:p>0.511824055281495</text:p>
          </table:table-cell>
          <table:table-cell office:value-type="float" office:value="0.512084904067281" calcext:value-type="float">
            <text:p>0.512084904067281</text:p>
          </table:table-cell>
          <table:table-cell office:value-type="float" office:value="0.135940838690148" calcext:value-type="float">
            <text:p>0.135940838690148</text:p>
          </table:table-cell>
          <table:table-cell office:value-type="float" office:value="0.136032191848285" calcext:value-type="float">
            <text:p>0.136032191848285</text:p>
          </table:table-cell>
          <table:table-cell office:value-type="float" office:value="-96.9664496289933" calcext:value-type="float">
            <text:p>-96.9664496289933</text:p>
          </table:table-cell>
          <table:table-cell office:value-type="float" office:value="96.9664496289933" calcext:value-type="float">
            <text:p>96.9664496289933</text:p>
          </table:table-cell>
          <table:table-cell office:value-type="float" office:value="1540.58110948774" calcext:value-type="float">
            <text:p>1540.58110948774</text:p>
          </table:table-cell>
          <table:table-cell office:value-type="float" office:value="1749.88545952998" calcext:value-type="float">
            <text:p>1749.88545952998</text:p>
          </table:table-cell>
          <table:table-cell office:value-type="float" office:value="1697.55937201942" calcext:value-type="float">
            <text:p>1697.5593720194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469.42297029703" calcext:value-type="float">
            <text:p>1469.42297029703</text:p>
          </table:table-cell>
          <table:table-cell office:value-type="float" office:value="1489.74297029703" calcext:value-type="float">
            <text:p>1489.74297029703</text:p>
          </table:table-cell>
          <table:table-cell office:value-type="float" office:value="0.509599156100576" calcext:value-type="float">
            <text:p>0.509599156100576</text:p>
          </table:table-cell>
          <table:table-cell office:value-type="float" office:value="0.509825267756935" calcext:value-type="float">
            <text:p>0.509825267756935</text:p>
          </table:table-cell>
          <table:table-cell office:value-type="float" office:value="0.122739148627617" calcext:value-type="float">
            <text:p>0.122739148627617</text:p>
          </table:table-cell>
          <table:table-cell office:value-type="float" office:value="0.122784306139493" calcext:value-type="float">
            <text:p>0.122784306139493</text:p>
          </table:table-cell>
          <table:table-cell office:value-type="float" office:value="-87.0991627961603" calcext:value-type="float">
            <text:p>-87.0991627961603</text:p>
          </table:table-cell>
          <table:table-cell office:value-type="float" office:value="87.0991627961603" calcext:value-type="float">
            <text:p>87.0991627961603</text:p>
          </table:table-cell>
          <table:table-cell office:value-type="float" office:value="1382.32380750087" calcext:value-type="float">
            <text:p>1382.32380750087</text:p>
          </table:table-cell>
          <table:table-cell office:value-type="float" office:value="1576.80874153806" calcext:value-type="float">
            <text:p>1576.80874153806</text:p>
          </table:table-cell>
          <table:table-cell office:value-type="float" office:value="1528.18750802876" calcext:value-type="float">
            <text:p>1528.18750802876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124.47643564356" calcext:value-type="float">
            <text:p>1124.47643564356</text:p>
          </table:table-cell>
          <table:table-cell office:value-type="float" office:value="1139.91643564356" calcext:value-type="float">
            <text:p>1139.91643564356</text:p>
          </table:table-cell>
          <table:table-cell office:value-type="float" office:value="0.505332142128399" calcext:value-type="float">
            <text:p>0.505332142128399</text:p>
          </table:table-cell>
          <table:table-cell office:value-type="float" office:value="0.505601828789481" calcext:value-type="float">
            <text:p>0.505601828789481</text:p>
          </table:table-cell>
          <table:table-cell office:value-type="float" office:value="0.163578448396669" calcext:value-type="float">
            <text:p>0.163578448396669</text:p>
          </table:table-cell>
          <table:table-cell office:value-type="float" office:value="0.163642616555876" calcext:value-type="float">
            <text:p>0.163642616555876</text:p>
          </table:table-cell>
          <table:table-cell office:value-type="float" office:value="-118.053320620976" calcext:value-type="float">
            <text:p>-118.053320620976</text:p>
          </table:table-cell>
          <table:table-cell office:value-type="float" office:value="118.053320620976" calcext:value-type="float">
            <text:p>118.053320620976</text:p>
          </table:table-cell>
          <table:table-cell office:value-type="float" office:value="1006.47305038714" calcext:value-type="float">
            <text:p>1006.47305038714</text:p>
          </table:table-cell>
          <table:table-cell office:value-type="float" office:value="1257.96975626454" calcext:value-type="float">
            <text:p>1257.96975626454</text:p>
          </table:table-cell>
          <table:table-cell office:value-type="float" office:value="1195.09557979519" calcext:value-type="float">
            <text:p>1195.09557979519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-8.24" calcext:value-type="float">
            <text:p>-8.24</text:p>
          </table:table-cell>
          <table:table-cell office:value-type="float" office:value="8.24" calcext:value-type="float">
            <text:p>8.24</text:p>
          </table:table-cell>
          <table:table-cell office:value-type="float" office:value="1447.97227722772" calcext:value-type="float">
            <text:p>1447.97227722772</text:p>
          </table:table-cell>
          <table:table-cell office:value-type="float" office:value="1464.45227722772" calcext:value-type="float">
            <text:p>1464.45227722772</text:p>
          </table:table-cell>
          <table:table-cell office:value-type="float" office:value="0.509367412078697" calcext:value-type="float">
            <text:p>0.509367412078697</text:p>
          </table:table-cell>
          <table:table-cell office:value-type="float" office:value="0.509544890986733" calcext:value-type="float">
            <text:p>0.509544890986733</text:p>
          </table:table-cell>
          <table:table-cell office:value-type="float" office:value="0.145559255437158" calcext:value-type="float">
            <text:p>0.145559255437158</text:p>
          </table:table-cell>
          <table:table-cell office:value-type="float" office:value="0.145627262166372" calcext:value-type="float">
            <text:p>0.145627262166372</text:p>
          </table:table-cell>
          <table:table-cell office:value-type="float" office:value="-104.208622666599" calcext:value-type="float">
            <text:p>-104.208622666599</text:p>
          </table:table-cell>
          <table:table-cell office:value-type="float" office:value="104.208622666599" calcext:value-type="float">
            <text:p>104.208622666599</text:p>
          </table:table-cell>
          <table:table-cell office:value-type="float" office:value="1343.81528849695" calcext:value-type="float">
            <text:p>1343.81528849695</text:p>
          </table:table-cell>
          <table:table-cell office:value-type="float" office:value="1568.66089989432" calcext:value-type="float">
            <text:p>1568.66089989432</text:p>
          </table:table-cell>
          <table:table-cell office:value-type="float" office:value="1512.44949704498" calcext:value-type="float">
            <text:p>1512.44949704498</text:p>
          </table:table-cell>
        </table:table-row>
        <table:table-row table:style-name="ro1">
          <table:table-cell office:value-type="string" calcext:value-type="string">
            <text:p>daniferdoser_96434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346.94356435644" calcext:value-type="float">
            <text:p>1346.94356435644</text:p>
          </table:table-cell>
          <table:table-cell office:value-type="float" office:value="1364.06356435644" calcext:value-type="float">
            <text:p>1364.06356435644</text:p>
          </table:table-cell>
          <table:table-cell office:value-type="float" office:value="0.508310968492591" calcext:value-type="float">
            <text:p>0.508310968492591</text:p>
          </table:table-cell>
          <table:table-cell office:value-type="float" office:value="0.508491143906111" calcext:value-type="float">
            <text:p>0.508491143906111</text:p>
          </table:table-cell>
          <table:table-cell office:value-type="float" office:value="0.159932234683675" calcext:value-type="float">
            <text:p>0.159932234683675</text:p>
          </table:table-cell>
          <table:table-cell office:value-type="float" office:value="0.159996109579438" calcext:value-type="float">
            <text:p>0.159996109579438</text:p>
          </table:table-cell>
          <table:table-cell office:value-type="float" office:value="-115.222995664559" calcext:value-type="float">
            <text:p>-115.222995664559</text:p>
          </table:table-cell>
          <table:table-cell office:value-type="float" office:value="115.222995664559" calcext:value-type="float">
            <text:p>115.222995664559</text:p>
          </table:table-cell>
          <table:table-cell office:value-type="float" office:value="1231.77001449892" calcext:value-type="float">
            <text:p>1231.77001449892</text:p>
          </table:table-cell>
          <table:table-cell office:value-type="float" office:value="1479.28656002099" calcext:value-type="float">
            <text:p>1479.28656002099</text:p>
          </table:table-cell>
          <table:table-cell office:value-type="float" office:value="1417.40742364048" calcext:value-type="float">
            <text:p>1417.4074236404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266.72831683168" calcext:value-type="float">
            <text:p>1266.72831683168</text:p>
          </table:table-cell>
          <table:table-cell office:value-type="float" office:value="1285.36831683168" calcext:value-type="float">
            <text:p>1285.36831683168</text:p>
          </table:table-cell>
          <table:table-cell office:value-type="float" office:value="0.507411681617072" calcext:value-type="float">
            <text:p>0.507411681617072</text:p>
          </table:table-cell>
          <table:table-cell office:value-type="float" office:value="0.507631865513897" calcext:value-type="float">
            <text:p>0.507631865513897</text:p>
          </table:table-cell>
          <table:table-cell office:value-type="float" office:value="0.162382707308985" calcext:value-type="float">
            <text:p>0.162382707308985</text:p>
          </table:table-cell>
          <table:table-cell office:value-type="float" office:value="0.162419001357912" calcext:value-type="float">
            <text:p>0.162419001357912</text:p>
          </table:table-cell>
          <table:table-cell office:value-type="float" office:value="-117.101915206662" calcext:value-type="float">
            <text:p>-117.101915206662</text:p>
          </table:table-cell>
          <table:table-cell office:value-type="float" office:value="117.101915206662" calcext:value-type="float">
            <text:p>117.101915206662</text:p>
          </table:table-cell>
          <table:table-cell office:value-type="float" office:value="1149.62640162502" calcext:value-type="float">
            <text:p>1149.62640162502</text:p>
          </table:table-cell>
          <table:table-cell office:value-type="float" office:value="1402.44203798608" calcext:value-type="float">
            <text:p>1402.44203798608</text:p>
          </table:table-cell>
          <table:table-cell office:value-type="float" office:value="1339.23812889582" calcext:value-type="float">
            <text:p>1339.23812889582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9.16" calcext:value-type="float">
            <text:p>-9.16</text:p>
          </table:table-cell>
          <table:table-cell office:value-type="float" office:value="9.16" calcext:value-type="float">
            <text:p>9.16</text:p>
          </table:table-cell>
          <table:table-cell office:value-type="float" office:value="1703.02792079208" calcext:value-type="float">
            <text:p>1703.02792079208</text:p>
          </table:table-cell>
          <table:table-cell office:value-type="float" office:value="1721.34792079208" calcext:value-type="float">
            <text:p>1721.34792079208</text:p>
          </table:table-cell>
          <table:table-cell office:value-type="float" office:value="0.513023356806101" calcext:value-type="float">
            <text:p>0.513023356806101</text:p>
          </table:table-cell>
          <table:table-cell office:value-type="float" office:value="0.513405158282159" calcext:value-type="float">
            <text:p>0.513405158282159</text:p>
          </table:table-cell>
          <table:table-cell office:value-type="float" office:value="0.162481926402673" calcext:value-type="float">
            <text:p>0.162481926402673</text:p>
          </table:table-cell>
          <table:table-cell office:value-type="float" office:value="0.162698639328405" calcext:value-type="float">
            <text:p>0.162698639328405</text:p>
          </table:table-cell>
          <table:table-cell office:value-type="float" office:value="-117.319194300927" calcext:value-type="float">
            <text:p>-117.319194300927</text:p>
          </table:table-cell>
          <table:table-cell office:value-type="float" office:value="117.319194300927" calcext:value-type="float">
            <text:p>117.319194300927</text:p>
          </table:table-cell>
          <table:table-cell office:value-type="float" office:value="1585.70872649115" calcext:value-type="float">
            <text:p>1585.70872649115</text:p>
          </table:table-cell>
          <table:table-cell office:value-type="float" office:value="1838.4987211443" calcext:value-type="float">
            <text:p>1838.4987211443</text:p>
          </table:table-cell>
          <table:table-cell office:value-type="float" office:value="1775.30122248101" calcext:value-type="float">
            <text:p>1775.30122248101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20.48" calcext:value-type="float">
            <text:p>-20.48</text:p>
          </table:table-cell>
          <table:table-cell office:value-type="float" office:value="20.48" calcext:value-type="float">
            <text:p>20.48</text:p>
          </table:table-cell>
          <table:table-cell office:value-type="float" office:value="1166.64316831683" calcext:value-type="float">
            <text:p>1166.64316831683</text:p>
          </table:table-cell>
          <table:table-cell office:value-type="float" office:value="1207.60316831683" calcext:value-type="float">
            <text:p>1207.60316831683</text:p>
          </table:table-cell>
          <table:table-cell office:value-type="float" office:value="0.506039457069687" calcext:value-type="float">
            <text:p>0.506039457069687</text:p>
          </table:table-cell>
          <table:table-cell office:value-type="float" office:value="0.506646255966582" calcext:value-type="float">
            <text:p>0.506646255966582</text:p>
          </table:table-cell>
          <table:table-cell office:value-type="float" office:value="0.166370497471489" calcext:value-type="float">
            <text:p>0.166370497471489</text:p>
          </table:table-cell>
          <table:table-cell office:value-type="float" office:value="0.166565902371874" calcext:value-type="float">
            <text:p>0.166565902371874</text:p>
          </table:table-cell>
          <table:table-cell office:value-type="float" office:value="-120.33323373777" calcext:value-type="float">
            <text:p>-120.33323373777</text:p>
          </table:table-cell>
          <table:table-cell office:value-type="float" office:value="120.33323373777" calcext:value-type="float">
            <text:p>120.33323373777</text:p>
          </table:table-cell>
          <table:table-cell office:value-type="float" office:value="1046.46264303403" calcext:value-type="float">
            <text:p>1046.46264303403</text:p>
          </table:table-cell>
          <table:table-cell office:value-type="float" office:value="1327.9364020546" calcext:value-type="float">
            <text:p>1327.9364020546</text:p>
          </table:table-cell>
          <table:table-cell office:value-type="float" office:value="1257.56796229946" calcext:value-type="float">
            <text:p>1257.56796229946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634.70831683168" calcext:value-type="float">
            <text:p>1634.70831683168</text:p>
          </table:table-cell>
          <table:table-cell office:value-type="float" office:value="1648.30831683168" calcext:value-type="float">
            <text:p>1648.30831683168</text:p>
          </table:table-cell>
          <table:table-cell office:value-type="float" office:value="0.511778538973765" calcext:value-type="float">
            <text:p>0.511778538973765</text:p>
          </table:table-cell>
          <table:table-cell office:value-type="float" office:value="0.512005706689631" calcext:value-type="float">
            <text:p>0.512005706689631</text:p>
          </table:table-cell>
          <table:table-cell office:value-type="float" office:value="0.149138063118004" calcext:value-type="float">
            <text:p>0.149138063118004</text:p>
          </table:table-cell>
          <table:table-cell office:value-type="float" office:value="0.149155863168364" calcext:value-type="float">
            <text:p>0.149155863168364</text:p>
          </table:table-cell>
          <table:table-cell office:value-type="float" office:value="-106.893904329391" calcext:value-type="float">
            <text:p>-106.893904329391</text:p>
          </table:table-cell>
          <table:table-cell office:value-type="float" office:value="106.893904329391" calcext:value-type="float">
            <text:p>106.893904329391</text:p>
          </table:table-cell>
          <table:table-cell office:value-type="float" office:value="1527.8279892974" calcext:value-type="float">
            <text:p>1527.8279892974</text:p>
          </table:table-cell>
          <table:table-cell office:value-type="float" office:value="1755.20222116107" calcext:value-type="float">
            <text:p>1755.20222116107</text:p>
          </table:table-cell>
          <table:table-cell office:value-type="float" office:value="1698.35866319516" calcext:value-type="float">
            <text:p>1698.35866319516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13.8" calcext:value-type="float">
            <text:p>-13.8</text:p>
          </table:table-cell>
          <table:table-cell office:value-type="float" office:value="13.8" calcext:value-type="float">
            <text:p>13.8</text:p>
          </table:table-cell>
          <table:table-cell office:value-type="float" office:value="1880.74732673267" calcext:value-type="float">
            <text:p>1880.74732673267</text:p>
          </table:table-cell>
          <table:table-cell office:value-type="float" office:value="1908.34732673267" calcext:value-type="float">
            <text:p>1908.34732673267</text:p>
          </table:table-cell>
          <table:table-cell office:value-type="float" office:value="0.517824267381285" calcext:value-type="float">
            <text:p>0.517824267381285</text:p>
          </table:table-cell>
          <table:table-cell office:value-type="float" office:value="0.518825870731826" calcext:value-type="float">
            <text:p>0.518825870731826</text:p>
          </table:table-cell>
          <table:table-cell office:value-type="float" office:value="0.191029382467686" calcext:value-type="float">
            <text:p>0.191029382467686</text:p>
          </table:table-cell>
          <table:table-cell office:value-type="float" office:value="0.191071973341168" calcext:value-type="float">
            <text:p>0.191071973341168</text:p>
          </table:table-cell>
          <table:table-cell office:value-type="float" office:value="-139.866388034351" calcext:value-type="float">
            <text:p>-139.866388034351</text:p>
          </table:table-cell>
          <table:table-cell office:value-type="float" office:value="139.866388034351" calcext:value-type="float">
            <text:p>139.866388034351</text:p>
          </table:table-cell>
          <table:table-cell office:value-type="float" office:value="1740.88093869832" calcext:value-type="float">
            <text:p>1740.88093869832</text:p>
          </table:table-cell>
          <table:table-cell office:value-type="float" office:value="2048.17905994234" calcext:value-type="float">
            <text:p>2048.17905994234</text:p>
          </table:table-cell>
          <table:table-cell office:value-type="float" office:value="1971.35452963133" calcext:value-type="float">
            <text:p>1971.35452963133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.8" calcext:value-type="float">
            <text:p>-10.8</text:p>
          </table:table-cell>
          <table:table-cell office:value-type="float" office:value="10.8" calcext:value-type="float">
            <text:p>10.8</text:p>
          </table:table-cell>
          <table:table-cell office:value-type="float" office:value="1499.19188118812" calcext:value-type="float">
            <text:p>1499.19188118812</text:p>
          </table:table-cell>
          <table:table-cell office:value-type="float" office:value="1520.79188118812" calcext:value-type="float">
            <text:p>1520.79188118812</text:p>
          </table:table-cell>
          <table:table-cell office:value-type="float" office:value="0.509933089473932" calcext:value-type="float">
            <text:p>0.509933089473932</text:p>
          </table:table-cell>
          <table:table-cell office:value-type="float" office:value="0.510187142185198" calcext:value-type="float">
            <text:p>0.510187142185198</text:p>
          </table:table-cell>
          <table:table-cell office:value-type="float" office:value="0.17391337302865" calcext:value-type="float">
            <text:p>0.17391337302865</text:p>
          </table:table-cell>
          <table:table-cell office:value-type="float" office:value="0.173958769929755" calcext:value-type="float">
            <text:p>0.173958769929755</text:p>
          </table:table-cell>
          <table:table-cell office:value-type="float" office:value="-126.144322407321" calcext:value-type="float">
            <text:p>-126.144322407321</text:p>
          </table:table-cell>
          <table:table-cell office:value-type="float" office:value="126.144322407321" calcext:value-type="float">
            <text:p>126.144322407321</text:p>
          </table:table-cell>
          <table:table-cell office:value-type="float" office:value="1373.08344676395" calcext:value-type="float">
            <text:p>1373.08344676395</text:p>
          </table:table-cell>
          <table:table-cell office:value-type="float" office:value="1646.93620359544" calcext:value-type="float">
            <text:p>1646.93620359544</text:p>
          </table:table-cell>
          <table:table-cell office:value-type="float" office:value="1578.47301438757" calcext:value-type="float">
            <text:p>1578.4730143875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522.0398019802" calcext:value-type="float">
            <text:p>1522.0398019802</text:p>
          </table:table-cell>
          <table:table-cell office:value-type="float" office:value="1538.9998019802" calcext:value-type="float">
            <text:p>1538.9998019802</text:p>
          </table:table-cell>
          <table:table-cell office:value-type="float" office:value="0.510202173646689" calcext:value-type="float">
            <text:p>0.510202173646689</text:p>
          </table:table-cell>
          <table:table-cell office:value-type="float" office:value="0.510410716096336" calcext:value-type="float">
            <text:p>0.510410716096336</text:p>
          </table:table-cell>
          <table:table-cell office:value-type="float" office:value="0.172109065548736" calcext:value-type="float">
            <text:p>0.172109065548736</text:p>
          </table:table-cell>
          <table:table-cell office:value-type="float" office:value="0.17212032464898" calcext:value-type="float">
            <text:p>0.17212032464898</text:p>
          </table:table-cell>
          <table:table-cell office:value-type="float" office:value="-124.693012836284" calcext:value-type="float">
            <text:p>-124.693012836284</text:p>
          </table:table-cell>
          <table:table-cell office:value-type="float" office:value="124.693012836284" calcext:value-type="float">
            <text:p>124.693012836284</text:p>
          </table:table-cell>
          <table:table-cell office:value-type="float" office:value="1397.3556644358" calcext:value-type="float">
            <text:p>1397.3556644358</text:p>
          </table:table-cell>
          <table:table-cell office:value-type="float" office:value="1663.69281481648" calcext:value-type="float">
            <text:p>1663.69281481648</text:p>
          </table:table-cell>
          <table:table-cell office:value-type="float" office:value="1597.10852722131" calcext:value-type="float">
            <text:p>1597.10852722131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-11.6" calcext:value-type="float">
            <text:p>-11.6</text:p>
          </table:table-cell>
          <table:table-cell office:value-type="float" office:value="11.6" calcext:value-type="float">
            <text:p>11.6</text:p>
          </table:table-cell>
          <table:table-cell office:value-type="float" office:value="2015.9699009901" calcext:value-type="float">
            <text:p>2015.9699009901</text:p>
          </table:table-cell>
          <table:table-cell office:value-type="float" office:value="2039.1699009901" calcext:value-type="float">
            <text:p>2039.1699009901</text:p>
          </table:table-cell>
          <table:table-cell office:value-type="float" office:value="0.523546052403187" calcext:value-type="float">
            <text:p>0.523546052403187</text:p>
          </table:table-cell>
          <table:table-cell office:value-type="float" office:value="0.524750037261258" calcext:value-type="float">
            <text:p>0.524750037261258</text:p>
          </table:table-cell>
          <table:table-cell office:value-type="float" office:value="0.137671493076446" calcext:value-type="float">
            <text:p>0.137671493076446</text:p>
          </table:table-cell>
          <table:table-cell office:value-type="float" office:value="0.138027568865813" calcext:value-type="float">
            <text:p>0.138027568865813</text:p>
          </table:table-cell>
          <table:table-cell office:value-type="float" office:value="-98.4655800450458" calcext:value-type="float">
            <text:p>-98.4655800450458</text:p>
          </table:table-cell>
          <table:table-cell office:value-type="float" office:value="98.4655800450458" calcext:value-type="float">
            <text:p>98.4655800450458</text:p>
          </table:table-cell>
          <table:table-cell office:value-type="float" office:value="1917.77210177437" calcext:value-type="float">
            <text:p>1917.77210177437</text:p>
          </table:table-cell>
          <table:table-cell office:value-type="float" office:value="2137.63548103514" calcext:value-type="float">
            <text:p>2137.63548103514</text:p>
          </table:table-cell>
          <table:table-cell office:value-type="float" office:value="2082.66963621995" calcext:value-type="float">
            <text:p>2082.66963621995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5.28" calcext:value-type="float">
            <text:p>-5.28</text:p>
          </table:table-cell>
          <table:table-cell office:value-type="float" office:value="5.28" calcext:value-type="float">
            <text:p>5.28</text:p>
          </table:table-cell>
          <table:table-cell office:value-type="float" office:value="1639.61366336634" calcext:value-type="float">
            <text:p>1639.61366336634</text:p>
          </table:table-cell>
          <table:table-cell office:value-type="float" office:value="1650.17366336634" calcext:value-type="float">
            <text:p>1650.17366336634</text:p>
          </table:table-cell>
          <table:table-cell office:value-type="float" office:value="0.511859386357836" calcext:value-type="float">
            <text:p>0.511859386357836</text:p>
          </table:table-cell>
          <table:table-cell office:value-type="float" office:value="0.512037611694215" calcext:value-type="float">
            <text:p>0.512037611694215</text:p>
          </table:table-cell>
          <table:table-cell office:value-type="float" office:value="0.128400967348656" calcext:value-type="float">
            <text:p>0.128400967348656</text:p>
          </table:table-cell>
          <table:table-cell office:value-type="float" office:value="0.128405310154273" calcext:value-type="float">
            <text:p>0.128405310154273</text:p>
          </table:table-cell>
          <table:table-cell office:value-type="float" office:value="-91.2681388163043" calcext:value-type="float">
            <text:p>-91.2681388163043</text:p>
          </table:table-cell>
          <table:table-cell office:value-type="float" office:value="91.2681388163043" calcext:value-type="float">
            <text:p>91.2681388163043</text:p>
          </table:table-cell>
          <table:table-cell office:value-type="float" office:value="1548.34552455003" calcext:value-type="float">
            <text:p>1548.34552455003</text:p>
          </table:table-cell>
          <table:table-cell office:value-type="float" office:value="1741.43857142552" calcext:value-type="float">
            <text:p>1741.43857142552</text:p>
          </table:table-cell>
          <table:table-cell office:value-type="float" office:value="1693.16530970664" calcext:value-type="float">
            <text:p>1693.1653097066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3.04" calcext:value-type="float">
            <text:p>-13.04</text:p>
          </table:table-cell>
          <table:table-cell office:value-type="float" office:value="13.04" calcext:value-type="float">
            <text:p>13.04</text:p>
          </table:table-cell>
          <table:table-cell office:value-type="float" office:value="1500.43128712871" calcext:value-type="float">
            <text:p>1500.43128712871</text:p>
          </table:table-cell>
          <table:table-cell office:value-type="float" office:value="1526.51128712871" calcext:value-type="float">
            <text:p>1526.51128712871</text:p>
          </table:table-cell>
          <table:table-cell office:value-type="float" office:value="0.509947372676562" calcext:value-type="float">
            <text:p>0.509947372676562</text:p>
          </table:table-cell>
          <table:table-cell office:value-type="float" office:value="0.510256375033293" calcext:value-type="float">
            <text:p>0.510256375033293</text:p>
          </table:table-cell>
          <table:table-cell office:value-type="float" office:value="0.119740928022848" calcext:value-type="float">
            <text:p>0.119740928022848</text:p>
          </table:table-cell>
          <table:table-cell office:value-type="float" office:value="0.119843387476059" calcext:value-type="float">
            <text:p>0.119843387476059</text:p>
          </table:table-cell>
          <table:table-cell office:value-type="float" office:value="-84.927769355739" calcext:value-type="float">
            <text:p>-84.927769355739</text:p>
          </table:table-cell>
          <table:table-cell office:value-type="float" office:value="84.927769355739" calcext:value-type="float">
            <text:p>84.927769355739</text:p>
          </table:table-cell>
          <table:table-cell office:value-type="float" office:value="1415.5790494611" calcext:value-type="float">
            <text:p>1415.5790494611</text:p>
          </table:table-cell>
          <table:table-cell office:value-type="float" office:value="1611.43905648445" calcext:value-type="float">
            <text:p>1611.43905648445</text:p>
          </table:table-cell>
          <table:table-cell office:value-type="float" office:value="1562.47405472861" calcext:value-type="float">
            <text:p>1562.47405472861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7.16" calcext:value-type="float">
            <text:p>-7.16</text:p>
          </table:table-cell>
          <table:table-cell office:value-type="float" office:value="7.16" calcext:value-type="float">
            <text:p>7.16</text:p>
          </table:table-cell>
          <table:table-cell office:value-type="float" office:value="1772.65603960396" calcext:value-type="float">
            <text:p>1772.65603960396</text:p>
          </table:table-cell>
          <table:table-cell office:value-type="float" office:value="1786.97603960396" calcext:value-type="float">
            <text:p>1786.97603960396</text:p>
          </table:table-cell>
          <table:table-cell office:value-type="float" office:value="0.514599493170279" calcext:value-type="float">
            <text:p>0.514599493170279</text:p>
          </table:table-cell>
          <table:table-cell office:value-type="float" office:value="0.514968444051385" calcext:value-type="float">
            <text:p>0.514968444051385</text:p>
          </table:table-cell>
          <table:table-cell office:value-type="float" office:value="0.131855471654605" calcext:value-type="float">
            <text:p>0.131855471654605</text:p>
          </table:table-cell>
          <table:table-cell office:value-type="float" office:value="0.131968995002638" calcext:value-type="float">
            <text:p>0.131968995002638</text:p>
          </table:table-cell>
          <table:table-cell office:value-type="float" office:value="-93.9245457148663" calcext:value-type="float">
            <text:p>-93.9245457148663</text:p>
          </table:table-cell>
          <table:table-cell office:value-type="float" office:value="93.9245457148664" calcext:value-type="float">
            <text:p>93.9245457148664</text:p>
          </table:table-cell>
          <table:table-cell office:value-type="float" office:value="1678.8162793429" calcext:value-type="float">
            <text:p>1678.8162793429</text:p>
          </table:table-cell>
          <table:table-cell office:value-type="float" office:value="1880.90058531883" calcext:value-type="float">
            <text:p>1880.90058531883</text:p>
          </table:table-cell>
          <table:table-cell office:value-type="float" office:value="1830.37950882485" calcext:value-type="float">
            <text:p>1830.37950882485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6.84" calcext:value-type="float">
            <text:p>-6.84</text:p>
          </table:table-cell>
          <table:table-cell office:value-type="float" office:value="6.84" calcext:value-type="float">
            <text:p>6.84</text:p>
          </table:table-cell>
          <table:table-cell office:value-type="float" office:value="1619.19188118812" calcext:value-type="float">
            <text:p>1619.19188118812</text:p>
          </table:table-cell>
          <table:table-cell office:value-type="float" office:value="1632.87188118812" calcext:value-type="float">
            <text:p>1632.87188118812</text:p>
          </table:table-cell>
          <table:table-cell office:value-type="float" office:value="0.51153057853023" calcext:value-type="float">
            <text:p>0.51153057853023</text:p>
          </table:table-cell>
          <table:table-cell office:value-type="float" office:value="0.511748581355805" calcext:value-type="float">
            <text:p>0.511748581355805</text:p>
          </table:table-cell>
          <table:table-cell office:value-type="float" office:value="0.157677373566367" calcext:value-type="float">
            <text:p>0.157677373566367</text:p>
          </table:table-cell>
          <table:table-cell office:value-type="float" office:value="0.157778198571219" calcext:value-type="float">
            <text:p>0.157778198571219</text:p>
          </table:table-cell>
          <table:table-cell office:value-type="float" office:value="-113.508720821664" calcext:value-type="float">
            <text:p>-113.508720821664</text:p>
          </table:table-cell>
          <table:table-cell office:value-type="float" office:value="113.508720821664" calcext:value-type="float">
            <text:p>113.508720821664</text:p>
          </table:table-cell>
          <table:table-cell office:value-type="float" office:value="1505.76096307624" calcext:value-type="float">
            <text:p>1505.76096307624</text:p>
          </table:table-cell>
          <table:table-cell office:value-type="float" office:value="1746.38060200978" calcext:value-type="float">
            <text:p>1746.38060200978</text:p>
          </table:table-cell>
          <table:table-cell office:value-type="float" office:value="1686.2256922764" calcext:value-type="float">
            <text:p>1686.2256922764</text:p>
          </table:table-cell>
        </table:table-row>
        <table:table-row table:style-name="ro1">
          <table:table-cell office:value-type="string" calcext:value-type="string">
            <text:p>qablo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1079.92138613861" calcext:value-type="float">
            <text:p>1079.92138613861</text:p>
          </table:table-cell>
          <table:table-cell office:value-type="float" office:value="1089.84138613861" calcext:value-type="float">
            <text:p>1089.84138613861</text:p>
          </table:table-cell>
          <table:table-cell office:value-type="float" office:value="0.504476652809161" calcext:value-type="float">
            <text:p>0.504476652809161</text:p>
          </table:table-cell>
          <table:table-cell office:value-type="float" office:value="0.504677647549824" calcext:value-type="float">
            <text:p>0.504677647549824</text:p>
          </table:table-cell>
          <table:table-cell office:value-type="float" office:value="0.314011838120743" calcext:value-type="float">
            <text:p>0.314011838120743</text:p>
          </table:table-cell>
          <table:table-cell office:value-type="float" office:value="0.314212832861407" calcext:value-type="float">
            <text:p>0.314212832861407</text:p>
          </table:table-cell>
          <table:table-cell office:value-type="float" office:value="-256.688892133442" calcext:value-type="float">
            <text:p>-256.688892133442</text:p>
          </table:table-cell>
          <table:table-cell office:value-type="float" office:value="256.688892133442" calcext:value-type="float">
            <text:p>256.688892133442</text:p>
          </table:table-cell>
          <table:table-cell office:value-type="float" office:value="823.463218723697" calcext:value-type="float">
            <text:p>823.463218723697</text:p>
          </table:table-cell>
          <table:table-cell office:value-type="float" office:value="1346.53027827206" calcext:value-type="float">
            <text:p>1346.53027827206</text:p>
          </table:table-cell>
          <table:table-cell office:value-type="float" office:value="1215.76351338497" calcext:value-type="float">
            <text:p>1215.7635133849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6.16" calcext:value-type="float">
            <text:p>-6.16</text:p>
          </table:table-cell>
          <table:table-cell office:value-type="float" office:value="6.16" calcext:value-type="float">
            <text:p>6.16</text:p>
          </table:table-cell>
          <table:table-cell office:value-type="float" office:value="1564.05782178218" calcext:value-type="float">
            <text:p>1564.05782178218</text:p>
          </table:table-cell>
          <table:table-cell office:value-type="float" office:value="1576.37782178218" calcext:value-type="float">
            <text:p>1576.37782178218</text:p>
          </table:table-cell>
          <table:table-cell office:value-type="float" office:value="0.510734914356842" calcext:value-type="float">
            <text:p>0.510734914356842</text:p>
          </table:table-cell>
          <table:table-cell office:value-type="float" office:value="0.510902205871504" calcext:value-type="float">
            <text:p>0.510902205871504</text:p>
          </table:table-cell>
          <table:table-cell office:value-type="float" office:value="0.142253104406484" calcext:value-type="float">
            <text:p>0.142253104406484</text:p>
          </table:table-cell>
          <table:table-cell office:value-type="float" office:value="0.142294747444773" calcext:value-type="float">
            <text:p>0.142294747444773</text:p>
          </table:table-cell>
          <table:table-cell office:value-type="float" office:value="-101.683621226957" calcext:value-type="float">
            <text:p>-101.683621226957</text:p>
          </table:table-cell>
          <table:table-cell office:value-type="float" office:value="101.683621226957" calcext:value-type="float">
            <text:p>101.683621226957</text:p>
          </table:table-cell>
          <table:table-cell office:value-type="float" office:value="1462.40568643431" calcext:value-type="float">
            <text:p>1462.40568643431</text:p>
          </table:table-cell>
          <table:table-cell office:value-type="float" office:value="1678.06144300914" calcext:value-type="float">
            <text:p>1678.06144300914</text:p>
          </table:table-cell>
          <table:table-cell office:value-type="float" office:value="1624.14750386543" calcext:value-type="float">
            <text:p>1624.14750386543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1261.87821782178" calcext:value-type="float">
            <text:p>1261.87821782178</text:p>
          </table:table-cell>
          <table:table-cell office:value-type="float" office:value="1276.27821782178" calcext:value-type="float">
            <text:p>1276.27821782178</text:p>
          </table:table-cell>
          <table:table-cell office:value-type="float" office:value="0.507352942883838" calcext:value-type="float">
            <text:p>0.507352942883838</text:p>
          </table:table-cell>
          <table:table-cell office:value-type="float" office:value="0.507525548869224" calcext:value-type="float">
            <text:p>0.507525548869224</text:p>
          </table:table-cell>
          <table:table-cell office:value-type="float" office:value="0.200304035547326" calcext:value-type="float">
            <text:p>0.200304035547326</text:p>
          </table:table-cell>
          <table:table-cell office:value-type="float" office:value="0.200394008375828" calcext:value-type="float">
            <text:p>0.200394008375828</text:p>
          </table:table-cell>
          <table:table-cell office:value-type="float" office:value="-147.516771162189" calcext:value-type="float">
            <text:p>-147.516771162189</text:p>
          </table:table-cell>
          <table:table-cell office:value-type="float" office:value="147.516771162189" calcext:value-type="float">
            <text:p>147.516771162189</text:p>
          </table:table-cell>
          <table:table-cell office:value-type="float" office:value="1114.43592422178" calcext:value-type="float">
            <text:p>1114.43592422178</text:p>
          </table:table-cell>
          <table:table-cell office:value-type="float" office:value="1423.79498898397" calcext:value-type="float">
            <text:p>1423.79498898397</text:p>
          </table:table-cell>
          <table:table-cell office:value-type="float" office:value="1346.45522279342" calcext:value-type="float">
            <text:p>1346.45522279342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56" calcext:value-type="float">
            <text:p>-4.56</text:p>
          </table:table-cell>
          <table:table-cell office:value-type="float" office:value="4.56" calcext:value-type="float">
            <text:p>4.56</text:p>
          </table:table-cell>
          <table:table-cell office:value-type="float" office:value="1725.75386138614" calcext:value-type="float">
            <text:p>1725.75386138614</text:p>
          </table:table-cell>
          <table:table-cell office:value-type="float" office:value="1734.87386138614" calcext:value-type="float">
            <text:p>1734.87386138614</text:p>
          </table:table-cell>
          <table:table-cell office:value-type="float" office:value="0.513500323704429" calcext:value-type="float">
            <text:p>0.513500323704429</text:p>
          </table:table-cell>
          <table:table-cell office:value-type="float" office:value="0.513701563171894" calcext:value-type="float">
            <text:p>0.513701563171894</text:p>
          </table:table-cell>
          <table:table-cell office:value-type="float" office:value="0.144501291177258" calcext:value-type="float">
            <text:p>0.144501291177258</text:p>
          </table:table-cell>
          <table:table-cell office:value-type="float" office:value="0.144536289345513" calcext:value-type="float">
            <text:p>0.144536289345513</text:p>
          </table:table-cell>
          <table:table-cell office:value-type="float" office:value="-103.380841734036" calcext:value-type="float">
            <text:p>-103.380841734036</text:p>
          </table:table-cell>
          <table:table-cell office:value-type="float" office:value="103.380841734036" calcext:value-type="float">
            <text:p>103.380841734036</text:p>
          </table:table-cell>
          <table:table-cell office:value-type="float" office:value="1622.3730196521" calcext:value-type="float">
            <text:p>1622.3730196521</text:p>
          </table:table-cell>
          <table:table-cell office:value-type="float" office:value="1838.22816700247" calcext:value-type="float">
            <text:p>1838.22816700247</text:p>
          </table:table-cell>
          <table:table-cell office:value-type="float" office:value="1784.26438016488" calcext:value-type="float">
            <text:p>1784.26438016488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8.08" calcext:value-type="float">
            <text:p>-8.08</text:p>
          </table:table-cell>
          <table:table-cell office:value-type="float" office:value="8.08" calcext:value-type="float">
            <text:p>8.08</text:p>
          </table:table-cell>
          <table:table-cell office:value-type="float" office:value="1722.28752475248" calcext:value-type="float">
            <text:p>1722.28752475248</text:p>
          </table:table-cell>
          <table:table-cell office:value-type="float" office:value="1738.44752475248" calcext:value-type="float">
            <text:p>1738.44752475248</text:p>
          </table:table-cell>
          <table:table-cell office:value-type="float" office:value="0.513425342220249" calcext:value-type="float">
            <text:p>0.513425342220249</text:p>
          </table:table-cell>
          <table:table-cell office:value-type="float" office:value="0.513782009578783" calcext:value-type="float">
            <text:p>0.513782009578783</text:p>
          </table:table-cell>
          <table:table-cell office:value-type="float" office:value="0.146942910503123" calcext:value-type="float">
            <text:p>0.146942910503123</text:p>
          </table:table-cell>
          <table:table-cell office:value-type="float" office:value="0.147119454881259" calcext:value-type="float">
            <text:p>0.147119454881259</text:p>
          </table:table-cell>
          <table:table-cell office:value-type="float" office:value="-105.34269636531" calcext:value-type="float">
            <text:p>-105.34269636531</text:p>
          </table:table-cell>
          <table:table-cell office:value-type="float" office:value="105.34269636531" calcext:value-type="float">
            <text:p>105.34269636531</text:p>
          </table:table-cell>
          <table:table-cell office:value-type="float" office:value="1617.07911621557" calcext:value-type="float">
            <text:p>1617.07911621557</text:p>
          </table:table-cell>
          <table:table-cell office:value-type="float" office:value="1843.79022111778" calcext:value-type="float">
            <text:p>1843.79022111778</text:p>
          </table:table-cell>
          <table:table-cell office:value-type="float" office:value="1787.11244489223" calcext:value-type="float">
            <text:p>1787.11244489223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338.73920792079" calcext:value-type="float">
            <text:p>1338.73920792079</text:p>
          </table:table-cell>
          <table:table-cell office:value-type="float" office:value="1349.05920792079" calcext:value-type="float">
            <text:p>1349.05920792079</text:p>
          </table:table-cell>
          <table:table-cell office:value-type="float" office:value="0.508223673992793" calcext:value-type="float">
            <text:p>0.508223673992793</text:p>
          </table:table-cell>
          <table:table-cell office:value-type="float" office:value="0.50833336788214" calcext:value-type="float">
            <text:p>0.50833336788214</text:p>
          </table:table-cell>
          <table:table-cell office:value-type="float" office:value="0.202955764410959" calcext:value-type="float">
            <text:p>0.202955764410959</text:p>
          </table:table-cell>
          <table:table-cell office:value-type="float" office:value="0.202977619333013" calcext:value-type="float">
            <text:p>0.202977619333013</text:p>
          </table:table-cell>
          <table:table-cell office:value-type="float" office:value="-149.660929576731" calcext:value-type="float">
            <text:p>-149.660929576731</text:p>
          </table:table-cell>
          <table:table-cell office:value-type="float" office:value="149.660929576731" calcext:value-type="float">
            <text:p>149.660929576731</text:p>
          </table:table-cell>
          <table:table-cell office:value-type="float" office:value="1189.09646084694" calcext:value-type="float">
            <text:p>1189.09646084694</text:p>
          </table:table-cell>
          <table:table-cell office:value-type="float" office:value="1498.72013749752" calcext:value-type="float">
            <text:p>1498.72013749752</text:p>
          </table:table-cell>
          <table:table-cell office:value-type="float" office:value="1421.31421833488" calcext:value-type="float">
            <text:p>1421.31421833488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742.07504950495" calcext:value-type="float">
            <text:p>1742.07504950495</text:p>
          </table:table-cell>
          <table:table-cell office:value-type="float" office:value="1758.39504950495" calcext:value-type="float">
            <text:p>1758.39504950495</text:p>
          </table:table-cell>
          <table:table-cell office:value-type="float" office:value="0.513864599295973" calcext:value-type="float">
            <text:p>0.513864599295973</text:p>
          </table:table-cell>
          <table:table-cell office:value-type="float" office:value="0.514248029545203" calcext:value-type="float">
            <text:p>0.514248029545203</text:p>
          </table:table-cell>
          <table:table-cell office:value-type="float" office:value="0.132310021560616" calcext:value-type="float">
            <text:p>0.132310021560616</text:p>
          </table:table-cell>
          <table:table-cell office:value-type="float" office:value="0.132361499773723" calcext:value-type="float">
            <text:p>0.132361499773723</text:p>
          </table:table-cell>
          <table:table-cell office:value-type="float" office:value="-94.217774025441" calcext:value-type="float">
            <text:p>-94.217774025441</text:p>
          </table:table-cell>
          <table:table-cell office:value-type="float" office:value="94.217774025441" calcext:value-type="float">
            <text:p>94.217774025441</text:p>
          </table:table-cell>
          <table:table-cell office:value-type="float" office:value="1647.85727547951" calcext:value-type="float">
            <text:p>1647.85727547951</text:p>
          </table:table-cell>
          <table:table-cell office:value-type="float" office:value="1852.57435827389" calcext:value-type="float">
            <text:p>1852.57435827389</text:p>
          </table:table-cell>
          <table:table-cell office:value-type="float" office:value="1801.3950875753" calcext:value-type="float">
            <text:p>1801.395087575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9.8" calcext:value-type="float">
            <text:p>-9.8</text:p>
          </table:table-cell>
          <table:table-cell office:value-type="float" office:value="9.8" calcext:value-type="float">
            <text:p>9.8</text:p>
          </table:table-cell>
          <table:table-cell office:value-type="float" office:value="1573.66237623762" calcext:value-type="float">
            <text:p>1573.66237623762</text:p>
          </table:table-cell>
          <table:table-cell office:value-type="float" office:value="1593.26237623762" calcext:value-type="float">
            <text:p>1593.26237623762</text:p>
          </table:table-cell>
          <table:table-cell office:value-type="float" office:value="0.510864854817992" calcext:value-type="float">
            <text:p>0.510864854817992</text:p>
          </table:table-cell>
          <table:table-cell office:value-type="float" office:value="0.511140857405215" calcext:value-type="float">
            <text:p>0.511140857405215</text:p>
          </table:table-cell>
          <table:table-cell office:value-type="float" office:value="0.150283223731016" calcext:value-type="float">
            <text:p>0.150283223731016</text:p>
          </table:table-cell>
          <table:table-cell office:value-type="float" office:value="0.150389510441623" calcext:value-type="float">
            <text:p>0.150389510441623</text:p>
          </table:table-cell>
          <table:table-cell office:value-type="float" office:value="-107.835629501144" calcext:value-type="float">
            <text:p>-107.835629501144</text:p>
          </table:table-cell>
          <table:table-cell office:value-type="float" office:value="107.835629501144" calcext:value-type="float">
            <text:p>107.835629501144</text:p>
          </table:table-cell>
          <table:table-cell office:value-type="float" office:value="1465.90794276092" calcext:value-type="float">
            <text:p>1465.90794276092</text:p>
          </table:table-cell>
          <table:table-cell office:value-type="float" office:value="1701.09800573877" calcext:value-type="float">
            <text:p>1701.09800573877</text:p>
          </table:table-cell>
          <table:table-cell office:value-type="float" office:value="1642.30048999431" calcext:value-type="float">
            <text:p>1642.30048999431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8.84" calcext:value-type="float">
            <text:p>-8.84</text:p>
          </table:table-cell>
          <table:table-cell office:value-type="float" office:value="8.84" calcext:value-type="float">
            <text:p>8.84</text:p>
          </table:table-cell>
          <table:table-cell office:value-type="float" office:value="1790.88" calcext:value-type="float">
            <text:p>1790.88</text:p>
          </table:table-cell>
          <table:table-cell office:value-type="float" office:value="1808.56" calcext:value-type="float">
            <text:p>1808.56</text:p>
          </table:table-cell>
          <table:table-cell office:value-type="float" office:value="0.515071895265144" calcext:value-type="float">
            <text:p>0.515071895265144</text:p>
          </table:table-cell>
          <table:table-cell office:value-type="float" office:value="0.515556247282285" calcext:value-type="float">
            <text:p>0.515556247282285</text:p>
          </table:table-cell>
          <table:table-cell office:value-type="float" office:value="0.129166698075486" calcext:value-type="float">
            <text:p>0.129166698075486</text:p>
          </table:table-cell>
          <table:table-cell office:value-type="float" office:value="0.129293745021215" calcext:value-type="float">
            <text:p>0.129293745021215</text:p>
          </table:table-cell>
          <table:table-cell office:value-type="float" office:value="-91.9294004069055" calcext:value-type="float">
            <text:p>-91.9294004069055</text:p>
          </table:table-cell>
          <table:table-cell office:value-type="float" office:value="91.9294004069055" calcext:value-type="float">
            <text:p>91.9294004069055</text:p>
          </table:table-cell>
          <table:table-cell office:value-type="float" office:value="1699.04520035494" calcext:value-type="float">
            <text:p>1699.04520035494</text:p>
          </table:table-cell>
          <table:table-cell office:value-type="float" office:value="1900.48940040691" calcext:value-type="float">
            <text:p>1900.48940040691</text:p>
          </table:table-cell>
          <table:table-cell office:value-type="float" office:value="1850.12835039391" calcext:value-type="float">
            <text:p>1850.12835039391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-9.14285714285714" calcext:value-type="float">
            <text:p>-9.14285714285714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1002.05128205128" calcext:value-type="float">
            <text:p>1002.05128205128</text:p>
          </table:table-cell>
          <table:table-cell office:value-type="float" office:value="1020.336996337" calcext:value-type="float">
            <text:p>1020.336996337</text:p>
          </table:table-cell>
          <table:table-cell office:value-type="float" office:value="0.502660628670625" calcext:value-type="float">
            <text:p>0.502660628670625</text:p>
          </table:table-cell>
          <table:table-cell office:value-type="float" office:value="0.503127657779185" calcext:value-type="float">
            <text:p>0.503127657779185</text:p>
          </table:table-cell>
          <table:table-cell office:value-type="float" office:value="0.113662600433529" calcext:value-type="float">
            <text:p>0.113662600433529</text:p>
          </table:table-cell>
          <table:table-cell office:value-type="float" office:value="0.113754174768541" calcext:value-type="float">
            <text:p>0.113754174768541</text:p>
          </table:table-cell>
          <table:table-cell office:value-type="float" office:value="-80.4522643476283" calcext:value-type="float">
            <text:p>-80.4522643476283</text:p>
          </table:table-cell>
          <table:table-cell office:value-type="float" office:value="80.4522643476283" calcext:value-type="float">
            <text:p>80.4522643476283</text:p>
          </table:table-cell>
          <table:table-cell office:value-type="float" office:value="921.666120518831" calcext:value-type="float">
            <text:p>921.666120518831</text:p>
          </table:table-cell>
          <table:table-cell office:value-type="float" office:value="1100.78926068462" calcext:value-type="float">
            <text:p>1100.78926068462</text:p>
          </table:table-cell>
          <table:table-cell office:value-type="float" office:value="1056.00847564318" calcext:value-type="float">
            <text:p>1056.00847564318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float" office:value="-10.24" calcext:value-type="float">
            <text:p>-10.24</text:p>
          </table:table-cell>
          <table:table-cell office:value-type="float" office:value="10.24" calcext:value-type="float">
            <text:p>10.24</text:p>
          </table:table-cell>
          <table:table-cell office:value-type="float" office:value="1631.07306930693" calcext:value-type="float">
            <text:p>1631.07306930693</text:p>
          </table:table-cell>
          <table:table-cell office:value-type="float" office:value="1651.55306930693" calcext:value-type="float">
            <text:p>1651.55306930693</text:p>
          </table:table-cell>
          <table:table-cell office:value-type="float" office:value="0.511719399065741" calcext:value-type="float">
            <text:p>0.511719399065741</text:p>
          </table:table-cell>
          <table:table-cell office:value-type="float" office:value="0.512061323665301" calcext:value-type="float">
            <text:p>0.512061323665301</text:p>
          </table:table-cell>
          <table:table-cell office:value-type="float" office:value="0.137000592563377" calcext:value-type="float">
            <text:p>0.137000592563377</text:p>
          </table:table-cell>
          <table:table-cell office:value-type="float" office:value="0.137154319772257" calcext:value-type="float">
            <text:p>0.137154319772257</text:p>
          </table:table-cell>
          <table:table-cell office:value-type="float" office:value="-97.8090699274087" calcext:value-type="float">
            <text:p>-97.8090699274087</text:p>
          </table:table-cell>
          <table:table-cell office:value-type="float" office:value="97.8090699274087" calcext:value-type="float">
            <text:p>97.8090699274087</text:p>
          </table:table-cell>
          <table:table-cell office:value-type="float" office:value="1533.37950120974" calcext:value-type="float">
            <text:p>1533.37950120974</text:p>
          </table:table-cell>
          <table:table-cell office:value-type="float" office:value="1749.36213923434" calcext:value-type="float">
            <text:p>1749.36213923434</text:p>
          </table:table-cell>
          <table:table-cell office:value-type="float" office:value="1695.36647972819" calcext:value-type="float">
            <text:p>1695.3664797281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4.48" calcext:value-type="float">
            <text:p>-4.48</text:p>
          </table:table-cell>
          <table:table-cell office:value-type="float" office:value="4.48" calcext:value-type="float">
            <text:p>4.48</text:p>
          </table:table-cell>
          <table:table-cell office:value-type="float" office:value="2168.21287128713" calcext:value-type="float">
            <text:p>2168.21287128713</text:p>
          </table:table-cell>
          <table:table-cell office:value-type="float" office:value="2177.17287128713" calcext:value-type="float">
            <text:p>2177.17287128713</text:p>
          </table:table-cell>
          <table:table-cell office:value-type="float" office:value="0.532829893638519" calcext:value-type="float">
            <text:p>0.532829893638519</text:p>
          </table:table-cell>
          <table:table-cell office:value-type="float" office:value="0.533484836477684" calcext:value-type="float">
            <text:p>0.533484836477684</text:p>
          </table:table-cell>
          <table:table-cell office:value-type="float" office:value="0.161464180616715" calcext:value-type="float">
            <text:p>0.161464180616715</text:p>
          </table:table-cell>
          <table:table-cell office:value-type="float" office:value="0.161691048059808" calcext:value-type="float">
            <text:p>0.161691048059808</text:p>
          </table:table-cell>
          <table:table-cell office:value-type="float" office:value="-116.536707770478" calcext:value-type="float">
            <text:p>-116.536707770478</text:p>
          </table:table-cell>
          <table:table-cell office:value-type="float" office:value="116.536707770478" calcext:value-type="float">
            <text:p>116.536707770478</text:p>
          </table:table-cell>
          <table:table-cell office:value-type="float" office:value="2051.85218943019" calcext:value-type="float">
            <text:p>2051.85218943019</text:p>
          </table:table-cell>
          <table:table-cell office:value-type="float" office:value="2293.70957905761" calcext:value-type="float">
            <text:p>2293.70957905761</text:p>
          </table:table-cell>
          <table:table-cell office:value-type="float" office:value="2233.24523165075" calcext:value-type="float">
            <text:p>2233.24523165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51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22:07:29.785928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5-24T22:09:50.789445828</dc:date>
    <meta:editing-duration>PT23M22S</meta:editing-duration>
    <meta:editing-cycles>7</meta:editing-cycles>
    <meta:document-statistic meta:table-count="5" meta:cell-count="1604" meta:object-count="0"/>
  </office:meta>
</office:document-meta>
</file>